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20000038D6E33D761.png" manifest:media-type="image/png"/>
  <manifest:file-entry manifest:full-path="Pictures/100000010000053F00000231ED86AD4C.png" manifest:media-type="image/png"/>
  <manifest:file-entry manifest:full-path="Pictures/1000000100000557000003B9C1BE00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P81" style:family="paragraph" style:parent-style-name="Text_20_body">
      <style:text-properties style:font-name="Liberation Mono" fo:font-size="16pt" officeooo:rsid="00386e1f" officeooo:paragraph-rsid="00386e1f" style:font-size-asian="16pt" style:font-size-complex="16pt"/>
    </style:style>
    <style:style style:name="P82" style:family="paragraph" style:parent-style-name="Text_20_body">
      <style:text-properties style:font-name="Liberation Mono" fo:font-size="8pt" officeooo:rsid="00386e1f" officeooo:paragraph-rsid="00386e1f" style:font-size-asian="7pt" style:font-size-complex="8pt"/>
    </style:style>
    <style:style style:name="P83" style:family="paragraph" style:parent-style-name="Text_20_body">
      <style:text-properties style:font-name="Liberation Mono" fo:font-size="8pt" officeooo:rsid="00386e1f" officeooo:paragraph-rsid="00386e1f" style:font-size-asian="8pt" style:font-size-complex="8pt"/>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85" style:family="paragraph" style:parent-style-name="Heading_20_2">
      <style:text-properties style:font-name="Liberation Mono" fo:font-size="8pt" officeooo:rsid="00386e1f" officeooo:paragraph-rsid="00386e1f" style:font-size-asian="8pt" style:font-size-complex="8pt"/>
    </style:style>
    <style:style style:name="P8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386e1f" style:font-size-asian="8pt" style:font-size-complex="8pt"/>
    </style:style>
    <style:style style:name="P87"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Liberation Mono" fo:font-size="8pt" officeooo:rsid="00386e1f" style:font-size-asian="8pt" style:font-size-complex="8pt"/>
    </style:style>
    <style:style style:name="P8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Google Sans Text" fo:font-size="8pt" officeooo:rsid="00386e1f" style:font-size-asian="8pt" style:font-size-complex="8pt"/>
    </style:style>
    <style:style style:name="P89" style:family="paragraph" style:parent-style-name="Text_20_body">
      <style:text-properties style:font-name="Liberation Mono" fo:font-size="8pt" officeooo:rsid="00386e1f" style:font-size-asian="8pt" style:font-size-complex="8pt"/>
    </style:style>
    <style:style style:name="P90"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386e1f" style:font-size-asian="8pt" style:font-size-complex="8pt"/>
    </style:style>
    <style:style style:name="P91" style:family="paragraph" style:parent-style-name="Heading_20_3">
      <style:text-properties style:font-name="Liberation Mono" fo:font-size="8pt" officeooo:rsid="00386e1f" officeooo:paragraph-rsid="00386e1f" style:font-size-asian="8pt" style:font-size-complex="8pt"/>
    </style:style>
    <style:style style:name="P92" style:family="paragraph" style:parent-style-name="Text_20_body">
      <style:text-properties style:font-name="Google Sans Text" fo:font-size="8pt" officeooo:rsid="00386e1f" officeooo:paragraph-rsid="00386e1f" style:font-size-asian="8pt" style:font-size-complex="8pt"/>
    </style:style>
    <style:style style:name="P93" style:family="paragraph" style:parent-style-name="Text_20_body">
      <style:text-properties style:font-name="Liberation Mono" fo:font-size="8pt" officeooo:rsid="0041caf7" officeooo:paragraph-rsid="0041caf7" style:font-size-asian="8pt" style:font-size-complex="8pt"/>
    </style:style>
    <style:style style:name="P94" style:family="paragraph" style:parent-style-name="Heading_20_2">
      <style:text-properties style:font-name="Liberation Mono" fo:font-size="8pt" officeooo:rsid="0041caf7" officeooo:paragraph-rsid="0041caf7" style:font-size-asian="8pt" style:font-size-complex="8pt"/>
    </style:style>
    <style:style style:name="P9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officeooo:rsid="0041caf7" style:font-size-asian="8pt" style:font-size-complex="8pt"/>
    </style:style>
    <style:style style:name="P96" style:family="paragraph" style:parent-style-name="Text_20_body">
      <style:text-properties style:font-name="Google Sans Text" fo:font-size="8pt" officeooo:rsid="0041caf7" officeooo:paragraph-rsid="0041caf7" style:font-size-asian="8pt" style:font-size-complex="8pt"/>
    </style:style>
    <style:style style:name="P97" style:family="paragraph" style:parent-style-name="Heading_20_3">
      <style:paragraph-properties fo:margin-left="0in" fo:margin-right="0in" fo:margin-top="0in" fo:margin-bottom="0.0972in" style:contextual-spacing="false" fo:line-height="114%" fo:text-indent="0in" style:auto-text-indent="false"/>
      <style:text-properties style:font-name="Liberation Mono" fo:font-size="8pt" officeooo:rsid="0041caf7" style:font-size-asian="8pt" style:font-size-complex="8pt"/>
    </style:style>
    <style:style style:name="P98" style:family="paragraph" style:parent-style-name="Heading_20_3">
      <style:text-properties style:font-name="Liberation Mono" fo:font-size="8pt" officeooo:rsid="0041caf7" officeooo:paragraph-rsid="0041caf7" style:font-size-asian="8pt" style:font-size-complex="8pt"/>
    </style:style>
    <style:style style:name="P99" style:family="paragraph" style:parent-style-name="Text_20_body">
      <style:text-properties style:font-name="Liberation Mono" fo:font-size="8pt" officeooo:rsid="0041caf7" style:font-size-asian="8pt" style:font-size-complex="8pt"/>
    </style:style>
    <style:style style:name="P100" style:family="paragraph" style:parent-style-name="Text_20_body">
      <style:text-properties style:font-name="Liberation Mono" officeooo:rsid="0041caf7" style:font-size-asian="12pt"/>
    </style:style>
    <style:style style:name="P101" style:family="paragraph" style:parent-style-name="Quotations">
      <style:paragraph-properties fo:margin-top="0in" fo:margin-bottom="0.0972in" style:contextual-spacing="false" fo:line-height="115%"/>
      <style:text-properties style:font-name="Liberation Mono" officeooo:rsid="0041caf7" style:font-size-asian="12pt"/>
    </style:style>
    <style:style style:name="P102" style:family="paragraph" style:parent-style-name="Text_20_body">
      <style:text-properties style:font-name="Liberation Mono" fo:font-size="12pt" officeooo:rsid="0041caf7" officeooo:paragraph-rsid="0041caf7" style:font-size-asian="12pt" style:font-size-complex="12pt"/>
    </style:style>
    <style:style style:name="P103" style:family="paragraph" style:parent-style-name="Text_20_body">
      <style:text-properties style:font-name="Liberation Mono" fo:font-size="8pt" officeooo:rsid="004cd44d" officeooo:paragraph-rsid="004cd44d" style:font-size-asian="8pt" style:font-size-complex="8pt"/>
    </style:style>
    <style:style style:name="P104" style:family="paragraph" style:parent-style-name="Text_20_body">
      <style:text-properties style:font-name="Liberation Mono" fo:font-size="8pt" officeooo:rsid="004cd44d" style:font-size-asian="8pt" style:font-size-complex="8pt"/>
    </style:style>
    <style:style style:name="P105" style:family="paragraph" style:parent-style-name="Heading_20_3">
      <style:paragraph-properties fo:margin-top="0in" fo:margin-bottom="0.0972in" style:contextual-spacing="false" fo:line-height="115%"/>
      <style:text-properties style:font-name="Liberation Mono" fo:font-size="8pt" officeooo:rsid="0041caf7" style:font-size-asian="8pt" style:font-size-complex="8pt"/>
    </style:style>
    <style:style style:name="P106" style:family="paragraph" style:parent-style-name="Text_20_body" style:list-style-name="L16">
      <style:text-properties style:font-name="Liberation Mono" fo:font-size="8pt" officeooo:rsid="0041caf7" style:font-size-asian="8pt" style:font-size-complex="8pt"/>
    </style:style>
    <style:style style:name="P107" style:family="paragraph" style:parent-style-name="Text_20_body">
      <style:text-properties style:font-name="Liberation Mono" fo:font-size="8pt" officeooo:rsid="005b9c75" officeooo:paragraph-rsid="005b9c75" style:font-size-asian="8pt" style:font-size-complex="8pt"/>
    </style:style>
    <style:style style:name="P108" style:family="paragraph" style:parent-style-name="Heading_20_4">
      <style:paragraph-properties fo:margin-top="0in" fo:margin-bottom="0.0972in" style:contextual-spacing="false" fo:line-height="115%"/>
      <style:text-properties style:font-name="Liberation Mono" fo:font-size="8pt" officeooo:rsid="0041caf7" style:font-size-asian="8pt" style:font-size-complex="8pt"/>
    </style:style>
    <style:style style:name="P109" style:family="paragraph" style:parent-style-name="Text_20_body" style:list-style-name="L17">
      <style:text-properties style:font-name="Liberation Mono" fo:font-size="8pt" officeooo:rsid="0041caf7"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T17" style:family="text">
      <style:text-properties style:font-name="Google Sans Text" fo:font-weight="bold"/>
    </style:style>
    <style:style style:name="T18" style:family="text">
      <style:text-properties fo:font-size="8pt" style:font-size-asian="8pt" style:font-size-complex="8pt"/>
    </style:style>
    <style:style style:name="T19" style:family="text">
      <style:text-properties fo:font-size="8pt" fo:font-weight="bold"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text:p text:style-name="P81">Semana 2:</text:p>
      <text:p text:style-name="P82"/>
      <text:p text:style-name="P83"><text:bookmark text:name="p-rc_7ce3d62e4360b6df-144"/>Agora entramos no <text:span text:style-name="T3">Módulo Clínico (Gestão de Pacientes)</text:span>, que é o verdadeiro coração do sistema baseado no fluxo do seu documento. Aqui, o objetivo é permitir que a secretaria cadastre o paciente e anexe toda a documentação obrigatória. </text:p>
      <text:p text:style-name="P84">Como estamos seguindo com paciência e explicando cada passo, vamos primeiro planejar o que faremos nesta semana.</text:p>
      <text:p text:style-name="P83"/>
      <text:h text:style-name="P85" text:outline-level="2">📅 <text:span text:style-name="T9">O Plano da Semana 2: Módulo de Pacientes</text:span></text:h>
      <text:p text:style-name="P84"><text:bookmark text:name="p-rc_7ce3d62e4360b6df-145"/><text:span text:style-name="T4">Seguindo as regras do seu arquivo, um paciente não pode ficar "solto" no sistema: ele pertence a uma associação (</text:span><text:span text:style-name="Source_20_Text"><text:span text:style-name="T4">association_id</text:span></text:span><text:span text:style-name="T4">) e foi cadastrado por um usuário/secretária (</text:span><text:span text:style-name="Source_20_Text"><text:span text:style-name="T4">created_by</text:span></text:span><text:span text:style-name="T4">). </text:span></text:p>
      <text:p text:style-name="P86">Nesta semana, dividiremos o trabalho em:</text:p>
      <text:list text:style-name="L15">
        <text:list-item>
          <text:p text:style-name="P87"><text:bookmark text:name="p-rc_7ce3d62e4360b6df-146"/><text:span text:style-name="T17">Banco de Dados:</text:span><text:span text:style-name="T4"> Criar a tabela </text:span><text:span text:style-name="Source_20_Text"><text:span text:style-name="T4">patients</text:span></text:span><text:span text:style-name="T4"> com suporte aos status descritos no seu PDF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etc.). </text:span></text:p>
        </text:list-item>
        <text:list-item>
          <text:p text:style-name="P87"><text:span text:style-name="T17">Domínio em Go:</text:span><text:span text:style-name="T4"> Estruturar a entidade </text:span><text:span text:style-name="Source_20_Text"><text:span text:style-name="T4">Patient</text:span></text:span><text:span text:style-name="T4"> com validações (como checar se o nome não está vazio e o formato do CPF).</text:span></text:p>
        </text:list-item>
        <text:list-item>
          <text:p text:style-name="P88"><text:span text:style-name="T3">Casos de Uso:</text:span> Criar a lógica para cadastrar o paciente e impedir que o mesmo CPF seja registrado duas vezes na <text:span text:style-name="T3">mesma</text:span> associação (regra de multi-tenancy).</text:p>
        </text:list-item>
        <text:list-item>
          <text:p text:style-name="P88"><text:span text:style-name="T3">Interface HTTP (Gin):</text:span> Criar as rotas para salvar e listar os pacientes.</text:p>
        </text:list-item>
      </text:list>
      <text:p text:style-name="P83"/>
      <text:p text:style-name="P83"/>
      <text:h text:style-name="P85" text:outline-level="2"><text:soft-page-break/>🛠️ <text:span text:style-name="T9">Passo 1: A Nova Tabela no Banco de Dados (</text:span><text:span text:style-name="Source_20_Text"><text:span text:style-name="T4">patients</text:span></text:span><text:span text:style-name="T9">)</text:span></text:h>
      <text:p text:style-name="P86"><text:bookmark text:name="p-rc_7ce3d62e4360b6df-147"/>Para começar, vamos rodar o comando SQL diretamente no seu Docker para criar a tabela de pacientes com todos os campos exigidos na sua pesquisa (Dados pessoais, contatos e o controle de status). </text:p>
      <text:p text:style-name="P83">Abra o terminal na pasta do seu projeto e execute este bloco para injetar a tabela no PostgreSQL:</text:p>
      <text:p text:style-name="P83"/>
      <text:p text:style-name="P83">gemini-code-1782836833805.sh</text:p>
      <text:p text:style-name="P83"/>
      <text:p text:style-name="P83"/>
      <text:p text:style-name="P83"><text:span text:style-name="T3">Nota de aprendizado:</text:span> Repare no campo <text:span text:style-name="Source_20_Text">status</text:span>. Ele já nasce como <text:span text:style-name="Source_20_Text">'pending_documentation'</text:span>, exatamente como manda o primeiro passo do fluxo resumido do seu sistema ("Entrada do paciente cadastro + documentos").</text:p>
      <text:p text:style-name="P83"/>
      <text:h text:style-name="P85" text:outline-level="2">📂 Organizando a pasta do Domínio</text:h>
      <text:p text:style-name="P89">Agora que a tabela existe no banco de dados, o próximo passo é criar a camada de <text:span text:style-name="T3">Domínio</text:span> do paciente no Go (<text:span text:style-name="Source_20_Text">internal/domain/patient</text:span>), onde escreveremos as regras puras de validação.</text:p>
      <text:p text:style-name="P83"><text:span text:style-name="T4">Com a tabela de pacientes criada diretamente no PostgreSQL, vamos construir o </text:span><text:span text:style-name="T17">Domínio (</text:span><text:span text:style-name="Source_20_Text"><text:span text:style-name="T17">domain/patient</text:span></text:span><text:span text:style-name="T17">)</text:span><text:span text:style-name="T4"> no Go.</text:span></text:p>
      <text:p text:style-name="P84"><text:bookmark text:name="p-rc_60e131d01b3b5aac-155"/><text:span text:style-name="T4">Como você listou no seu documento de requisitos que o paciente possui uma série de dados pessoais e contatos (Nome, Data de Nascimento, Gênero, Telefone, E-mail, Endereço) e passa por um controle de status rigoroso (</text:span><text:span text:style-name="Source_20_Text"><text:span text:style-name="T4">pending_documentation</text:span></text:span><text:span text:style-name="T4">, </text:span><text:span text:style-name="Source_20_Text"><text:span text:style-name="T4">under_analysis</text:span></text:span><text:span text:style-name="T4">, </text:span><text:span text:style-name="Source_20_Text"><text:span text:style-name="T4">approved</text:span></text:span><text:span text:style-name="T4">, </text:span><text:span text:style-name="Source_20_Text"><text:span text:style-name="T4">denied</text:span></text:span><text:span text:style-name="T4">), vamos refletir tudo isso na nossa estrutura pura em Go. </text:span></text:p>
      <text:h text:style-name="P90" text:outline-level="3">🛠️ <text:span text:style-name="T9">Passo Prático: Criando o Domínio de Pacientes</text:span></text:h>
      <text:p text:style-name="P86">Execute o comando abaixo no seu terminal para criar a pasta correspondente e gerar os arquivos contendo a <text:span text:style-name="T3">Entidade</text:span> e o <text:span text:style-name="T3">Contrato (Interface)</text:span> do Repositório:</text:p>
      <text:p text:style-name="P83">gemini-code-1782837029267.sh</text:p>
      <text:h text:style-name="P91" text:outline-level="3">🧠 Análise do Design Multi-Tenant</text:h>
      <text:p text:style-name="P89">Preste bastante atenção na interface do repositório: as funções <text:span text:style-name="Source_20_Text">FindByID</text:span> e <text:span text:style-name="Source_20_Text">FindByEmail</text:span> recebem tanto o dado buscado quanto o <text:span text:style-name="Source_20_Text">association_id</text:span>.</text:p>
      <text:p text:style-name="P89">Isso é fundamental no modelo SaaS. Quando a secretaria buscar por um paciente, o sistema garante que ela <text:span text:style-name="T3">só consiga encontrar registros que pertençam à própria associação dela</text:span>, criando uma barreira de segurança lógica intransponível entre as instituições parceiras.</text:p>
      <text:p text:style-name="P89">Agora que definimos a entidade pura e seu contrato, o nosso próximo passo lógico é criar a <text:span text:style-name="T3">Infraestrutura</text:span>, escrevendo as queries SQL correspondentes para salvar e consultar essas informações no PostgreSQL.</text:p>
      <text:p text:style-name="P83">Agora, vamos criar a implementação prática do banco de dados para os pacientes, que chamamos de <text:span text:style-name="T3">Repositório de Infraestrutura</text:span>. Como você está aprendendo a integração com banco de dados em Go, note como estruturamos os comandos SQL para tratar as datas (<text:span text:style-name="Source_20_Text">birth_date</text:span>) e strings perfeitamente.</text:p>
      <text:p text:style-name="P83"/>
      <text:h text:style-name="P91" text:outline-level="3">🛠️ Passo Prático: Criando o Repositório Postgres de Pacientes</text:h>
      <text:p text:style-name="P89">Execute o comando abaixo no seu terminal para gerar o arquivo de persistência:</text:p>
      <text:p text:style-name="P83">gemini-code-1782837305126.sh</text:p>
      <text:h text:style-name="P91" text:outline-level="3">🧠 Dica de Aprendizado em Go: O tipo <text:span text:style-name="Source_20_Text">time.Time</text:span> e o SQL</text:h>
      <text:p text:style-name="P89">O driver do Postgres que baixamos (<text:span text:style-name="Source_20_Text">lib/pq</text:span>) é inteligente o suficiente para entender que o tipo estruturado <text:span text:style-name="Source_20_Text">time.Time</text:span> do Go deve ser convertido e salvo perfeitamente como campos do tipo <text:span text:style-name="Source_20_Text">DATE</text:span> ou <text:span text:style-name="Source_20_Text">TIMESTAMP</text:span> no banco de dados, poupando a gente de fazer conversões manuais de texto chata.</text:p>
      <text:p text:style-name="P89"><text:soft-page-break/>Com o banco de dados pronto para receber e buscar pacientes, o próximo passo é criar a camada de <text:span text:style-name="T3">Aplicação (Caso de Uso)</text:span>, onde vamos gerenciar as regras de validação antes de mandar salvar.</text:p>
      <text:p text:style-name="P83"/>
      <text:p text:style-name="P92">Vamos agora construir a camada de <text:span text:style-name="T3">Aplicação</text:span> com o Caso de Uso responsável por <text:span text:style-name="T3">Cadastrar um Novo Paciente</text:span>.</text:p>
      <text:p text:style-name="P86"><text:bookmark text:name="p-rc_c38d02a1fe93444d-159"/>Como vimos no seu modelo de requisitos, a entrada do paciente envolve coletar dados estruturados e colocá-lo no status inicial de aguardando documentação. A lógica do Caso de Uso vai garantir que um e-mail não seja duplicado dentro da <text:span text:style-name="T3">mesma</text:span> associação (respeitando o isolamento do SaaS).</text:p>
      <text:p text:style-name="P83"/>
      <text:h text:style-name="P91" text:outline-level="3">🛠️ Passo Prático: Criando o Caso de Uso de Paciente</text:h>
      <text:p text:style-name="P89">Execute o comando abaixo no terminal para criar o arquivo do caso de uso:</text:p>
      <text:p text:style-name="P93"/>
      <text:p text:style-name="P93">gemini-code-1782837448353.sh</text:p>
      <text:p text:style-name="P93"/>
      <text:h text:style-name="P94" text:outline-level="2">📂 <text:span text:style-name="T9">O Próximo Passo: Interface HTTP (Gin)</text:span></text:h>
      <text:p text:style-name="P95"><text:bookmark text:name="p-rc_c38d02a1fe93444d-160"/>Com a lógica de negócios e o banco amarrados, precisamos apenas criar o <text:span text:style-name="T3">Handler</text:span> e a <text:span text:style-name="T3">Rota</text:span> no Gin para receber esses dados de pacientes via requisições HTTP.</text:p>
      <text:p text:style-name="P93"/>
      <text:p text:style-name="P96"><text:bookmark text:name="p-rc_5e44a597e1c3e46e-163"/>Vamos criar agora o <text:span text:style-name="T3">Handler</text:span> e a <text:span text:style-name="T3">Rota</text:span> para os pacientes usando o framework Gin, completando a camada de entrega. </text:p>
      <text:p text:style-name="P95">Siga os passos abaixo para gerar esses arquivos:</text:p>
      <text:h text:style-name="P97" text:outline-level="3">🛠️ <text:span text:style-name="T9">Passo 1: Criando Handler e Rotas de Pacientes</text:span></text:h>
      <text:p text:style-name="P95">Execute o bloco abaixo no seu terminal para gerar a camada HTTP:</text:p>
      <text:p text:style-name="P93">gemini-code-1782837575247.sh</text:p>
      <text:p text:style-name="P93"/>
      <text:h text:style-name="P98" text:outline-level="3">🪢 Passo 2: Atualizando a Fiação Geral no <text:span text:style-name="Source_20_Text">main.go</text:span></text:h>
      <text:p text:style-name="P99">Para que o servidor Gin reconheça as rotas de pacientes, precisamos instanciar o repositório, caso de uso e handler e registrá-los no arquivo principal.</text:p>
      <text:p text:style-name="P99">Execute no terminal para atualizar o seu <text:span text:style-name="Source_20_Text">main.go</text:span>:</text:p>
      <text:p text:style-name="P93"/>
      <text:p text:style-name="P93">gemini-code-1782837805367.sh</text:p>
      <text:p text:style-name="P93"><text:span text:style-name="T4">O terminal deve retornar o JSON completo do paciente criado com o status </text:span><text:span text:style-name="Source_20_Text"><text:span text:style-name="T4">"pending_documentation"</text:span></text:span><text:span text:style-name="T4">.</text:span></text:p>
      <text:p text:style-name="P93"/>
      <text:h text:style-name="P98" text:outline-level="3">🧪 O Comando de Teste</text:h>
      <text:p text:style-name="P100"><text:span text:style-name="T18">Abra uma </text:span><text:span text:style-name="T19">nova aba do terminal</text:span><text:span text:style-name="T18"> (deixando o servidor rodando na primeira) e execute o comando </text:span><text:span text:style-name="Source_20_Text"><text:span text:style-name="T18">curl</text:span></text:span><text:span text:style-name="T18"> abaixo.</text:span></text:p>
      <text:p text:style-name="P101"><text:span text:style-name="T19">Atenção:</text:span><text:span text:style-name="T18"> Eu já deixei o ID da associação preenchido com o valor </text:span><text:span text:style-name="Source_20_Text"><text:span text:style-name="T18">"61a72d3e-d4f9-4b34-b37a-6b0c26ede728"</text:span></text:span><text:span text:style-name="T18"> que apareceu no seu print. Como ainda não criamos o teste de retorno do usuário para ver o ID dele, usei o mesmo UUID para o campo </text:span><text:span text:style-name="Source_20_Text"><text:span text:style-name="T18">created_by</text:span></text:span><text:span text:style-name="T18"> apenas para passar na validação do banco por enquanto.</text:span></text:p>
      <text:p text:style-name="P102"/>
      <text:p text:style-name="P102"><text:soft-page-break/></text:p>
      <text:p text:style-name="P93">gemini-code-1782838114635.sh</text:p>
      <text:p text:style-name="P93"/>
      <text:p text:style-name="P103">para testar:</text:p>
      <text:p text:style-name="P103">Precisamos passar um ID de usuário que <text:span text:style-name="T3">realmente exista</text:span> na sua tabela <text:span text:style-name="Source_20_Text">users</text:span>. Vamos criar esse usuário atrelado à sua associação agora mesmo.</text:p>
      <text:p text:style-name="P104">Execute este comando no seu terminal para criar o seu usuário administrador:</text:p>
      <text:p text:style-name="P103"/>
      <text:p text:style-name="P93">gemini-code-1782838790508.sh</text:p>
      <text:p text:style-name="P93"/>
      <text:p text:style-name="P93"/>
      <text:p text:style-name="P102"><text:span text:style-name="T18">Ao rodar esse comando, o terminal vai te devolver o JSON do usuário criado. </text:span><text:span text:style-name="T19">Copie o </text:span><text:span text:style-name="Source_20_Text"><text:span text:style-name="T19">"id"</text:span></text:span><text:span text:style-name="T19"> gerado para ele.</text:span></text:p>
      <text:h text:style-name="P105" text:outline-level="3">🏎️ Agora sim: Cadastrando o Paciente</text:h>
      <text:p text:style-name="P100"><text:span text:style-name="T18">Com o ID real do usuário que você acabou de copiar, substitua-o no campo </text:span><text:span text:style-name="Source_20_Text"><text:span text:style-name="T18">"created_by"</text:span></text:span><text:span text:style-name="T18"> abaixo e rode o comando:</text:span></text:p>
      <text:p text:style-name="P93"/>
      <text:p text:style-name="P93">gemini-code-1782838827633.sh</text:p>
      <text:p text:style-name="P93"/>
      <text:p text:style-name="P93"/>
      <text:p text:style-name="P102"/>
      <text:p text:style-name="P102"/>
      <text:p text:style-name="P102"/>
      <text:p text:style-name="P102">🏆 MARCO ALCANÇADO: FIM DA SEMANA 2!</text:p>
      <text:p text:style-name="P102"/>
      <text:p text:style-name="P93">============================================================</text:p>
      <text:p text:style-name="P93"><text:s/>🎉 PARABÉNS, LUCAS! A SEMANA 2 ESTÁ CONCLUÍDA COM SUCESSO! 🎉</text:p>
      <text:p text:style-name="P93">============================================================</text:p>
      <text:p text:style-name="P93"><text:s/>✓ Tabela de Pacientes estruturada no PostgreSQL</text:p>
      <text:p text:style-name="P93"><text:s/>✓ Domínio de Pacientes isolado por Associação (Multi-Tenant)</text:p>
      <text:p text:style-name="P93"><text:s/>✓ Lógica de Entrada de Paciente do seu PDF implementada</text:p>
      <text:p text:style-name="P93"><text:s/>✓ Validação de e-mail único por Associação ativa</text:p>
      <text:p text:style-name="P93"><text:s/>✓ Rota POST /patients operando com sucesso</text:p>
      <text:p text:style-name="P93">============================================================</text:p>
      <text:p text:style-name="P93"/>
      <text:p text:style-name="P93"/>
      <text:p text:style-name="P93"/>
      <text:p text:style-name="P93"/>
      <text:h text:style-name="P94" text:outline-level="2"><text:soft-page-break/>📅 Bem-vindo à Semana 3: O Fluxo de Documentação e Prescrições</text:h>
      <text:p text:style-name="P99">Dando sequência ao fluxo de operações do sistema, uma vez que o paciente está cadastrado e com status <text:span text:style-name="Source_20_Text">pending_documentation</text:span>, o próximo passo crítico é a <text:span text:style-name="T3">Entrada de Documentos e o Controle Clínico</text:span>.</text:p>
      <text:p text:style-name="P99">Nesta semana, vamos focar em construir a estrutura para gerenciar o coração do tratamento do paciente:</text:p>
      <text:list text:style-name="L16">
        <text:list-item>
          <text:p text:style-name="P106"><text:span text:style-name="T3">Banco de Dados:</text:span> Criar a tabela para registrar as <text:span text:style-name="T3">Prescrições Médicas</text:span> (receitas) vinculadas ao paciente.</text:p>
        </text:list-item>
        <text:list-item>
          <text:p text:style-name="P106"><text:span text:style-name="T3">Alertas de Validade:</text:span> Adicionar campos essenciais como a data de emissão e data de validade da receita médica (fundamental para o sistema alertar a associação quando o documento estiver prestes a vencer).</text:p>
        </text:list-item>
        <text:list-item>
          <text:p text:style-name="P106"><text:span text:style-name="T3">Casos de Uso em Go:</text:span> Regras de negócio para validar se uma receita inserida já não nasceu vencida e como vincular o médico responsável.</text:p>
        </text:list-item>
      </text:list>
      <text:h text:style-name="P105" text:outline-level="3">🛠️ Passo 1: Criando a Tabela de Prescrições (<text:span text:style-name="Source_20_Text">prescriptions</text:span>)</text:h>
      <text:p text:style-name="P99">Vamos rodar o comando SQL diretamente no seu container do Docker para subir a estrutura que vai armazenar as receitas e os prazos de validade.</text:p>
      <text:p text:style-name="P99">Abra o seu terminal e execute:</text:p>
      <text:p text:style-name="P93"/>
      <text:p text:style-name="P93">gemini-code-1782839094195.sh</text:p>
      <text:p text:style-name="P93"/>
      <text:p text:style-name="P93">Tabela criada no banco! O próximo passo é criar a nossa camada de <text:span text:style-name="T3">Domínio</text:span> para as prescrições (<text:span text:style-name="Source_20_Text">internal/domain/prescription</text:span>) no Go para começarmos a desenhar as regras de negócio de validação de datas.</text:p>
      <text:p text:style-name="P93"/>
      <text:p text:style-name="P93"/>
      <text:p text:style-name="P93"/>
      <text:p text:style-name="P93">Com a tabela de receitas (<text:span text:style-name="Source_20_Text">prescriptions</text:span>) rodando perfeitamente no PostgreSQL, vamos subir para o Go e construir o <text:span text:style-name="T3">Domínio da Prescrição (</text:span><text:span text:style-name="Source_20_Text"><text:span text:style-name="T3">domain/prescription</text:span></text:span><text:span text:style-name="T3">)</text:span>.</text:p>
      <text:p text:style-name="P99">Nesta camada, aplicaremos uma das regras de negócio mais importantes do módulo clínico: <text:span text:style-name="T3">impedir que uma receita seja cadastrada se a data de validade já tiver expirado</text:span>, além de garantir que os dados do médico (Nome e CRM) sejam obrigatórios.</text:p>
      <text:h text:style-name="P105" text:outline-level="3">🛠️ Passo Prático: Criando o Domínio de Prescrições</text:h>
      <text:p text:style-name="P99">Execute o comando abaixo no seu terminal para estruturar a nova pasta e criar a <text:span text:style-name="T3">Entidade</text:span> junto com o seu <text:span text:style-name="T3">Contrato (Interface)</text:span>:</text:p>
      <text:p text:style-name="P93"/>
      <text:p text:style-name="P93">gemini-code-1782840075109.sh</text:p>
      <text:p text:style-name="P93"/>
      <text:h text:style-name="P98" text:outline-level="3">🧠 O que mudou aqui?</text:h>
      <text:p text:style-name="P99">Note que na nossa <text:span text:style-name="Source_20_Text">interface Repository</text:span>, mudamos um detalhe interessante no método de busca: <text:span text:style-name="Source_20_Text">FindByPatientID(patientID string) ([]*Prescription, error)</text:span>.</text:p>
      <text:p text:style-name="P99">Usamos os colchetes <text:span text:style-name="Source_20_Text">[]</text:span> para indicar um <text:span text:style-name="T3">Slice</text:span> (uma lista/array dinâmico no Go). Fazemos isso porque, ao longo do tratamento, um único paciente pode ter <text:span text:style-name="T3">várias</text:span> receitas acumuladas no histórico do sistema. O Go vai nos retornar a lista completa delas.</text:p>
      <text:p text:style-name="P93"/>
      <text:p text:style-name="P93"/>
      <text:p text:style-name="P93"/>
      <text:p text:style-name="P93"/>
      <text:p text:style-name="P93"><text:soft-page-break/>Vamos agora implementar a camada de <text:span text:style-name="T3">Infraestrutura</text:span> para o módulo de receitas, criando o arquivo que converte as structs do Go em comandos <text:span text:style-name="Source_20_Text">INSERT</text:span> e <text:span text:style-name="Source_20_Text">SELECT</text:span> dentro da nossa tabela <text:span text:style-name="Source_20_Text">prescriptions</text:span> do PostgreSQL.</text:p>
      <text:h text:style-name="P105" text:outline-level="3">🛠️ Passo Prático: Criando o Repositório Postgres de Prescrições</text:h>
      <text:p text:style-name="P99">Execute o comando abaixo no seu terminal para gerar o repositório:</text:p>
      <text:p text:style-name="P93">gemini-code-1782841640603.sh</text:p>
      <text:p text:style-name="P93"/>
      <text:h text:style-name="P98" text:outline-level="3">🧠 Dica do Go: Entendendo o <text:span text:style-name="Source_20_Text">rows.Next()</text:span> e o <text:span text:style-name="Source_20_Text">defer rows.Close()</text:span></text:h>
      <text:p text:style-name="P99">Diferente dos métodos anteriores onde usamos <text:span text:style-name="Source_20_Text">QueryRow</text:span> (para trazer apenas um único registro), aqui usamos o <text:span text:style-name="Source_20_Text">r.db.Query</text:span>. Ele abre um ponteiro de leitura chamado <text:span text:style-name="T3">Cursor</text:span> no banco de dados. O comando <text:span text:style-name="Source_20_Text">defer rows.Close()</text:span> garante que, assim que a função terminar de rodar, essa conexão de leitura seja fechada, evitando que o banco de dados do seu Docker trave por falta de memória.</text:p>
      <text:p text:style-name="P99">Com o banco de dados pronto, o próximo passo lógico é criar o <text:span text:style-name="T3">Caso de Uso de Cadastro de Receita</text:span>. Além de salvar a receita, este caso de uso vai fazer algo muito legal: mudar automaticamente o status do paciente para <text:span text:style-name="Source_20_Text">"under_analysis"</text:span>, avançando o fluxo exatamente como manda o seu plano de negócios!</text:p>
      <text:p text:style-name="P93"/>
      <text:p text:style-name="P93"/>
      <text:p text:style-name="P93">Lucas! Agora vamos construir o <text:span text:style-name="T3">Caso de Uso de Cadastro de Prescrição (</text:span><text:span text:style-name="Source_20_Text"><text:span text:style-name="T3">create_prescription.go</text:span></text:span><text:span text:style-name="T3">)</text:span>.</text:p>
      <text:p text:style-name="P99">Aqui faremos algo muito importante para a automação do seu SaaS. Lembra que no fluxo do seu projeto, assim que a secretaria insere a receita do paciente, o status dele precisa progredir? Pois bem! Nosso Caso de Uso vai salvar a receita e, no mesmo segundo, atualizar o status do paciente no banco de dados de <text:span text:style-name="Source_20_Text">"pending_documentation"</text:span> para <text:span text:style-name="Source_20_Text">"under_analysis"</text:span>.</text:p>
      <text:p text:style-name="P99">Para que isso funcione redondinho, vamos precisar injetar <text:span text:style-name="T3">dois repositórios</text:span> dentro desse Caso de Uso: o de prescrições (para salvar a receita) e o de pacientes (para atualizar o status do paciente).</text:p>
      <text:h text:style-name="P105" text:outline-level="3">🛠️ Passo Prático: Criando o Caso de Uso de Prescrição</text:h>
      <text:p text:style-name="P99">Execute o comando abaixo no seu terminal para gerar o arquivo de caso de uso:</text:p>
      <text:p text:style-name="P93"/>
      <text:p text:style-name="P93">gemini-code-1782841722179.sh</text:p>
      <text:p text:style-name="P93"/>
      <text:h text:style-name="P98" text:outline-level="3">🧠 Entendendo a Arquitetura Limpa</text:h>
      <text:p text:style-name="P99">Veja que o caso de uso não quer saber se o banco é MySQL ou PostgreSQL. Ele apenas recebe as interfaces, executa as validações e dita o fluxo das regras de negócio organizadamente.</text:p>
      <text:p text:style-name="P99">Com a nossa lógica central de receitas finalizada, o próximo e último passo da <text:span text:style-name="T3">Semana 3</text:span> é expor a rota HTTP no Gin para que possamos fazer o teste de envio e checar se o sistema barra receitas com a validade expirada!</text:p>
      <text:p text:style-name="P93"/>
      <text:p text:style-name="P93">Excelente! Vamos fechar a nossa <text:span text:style-name="T3">Semana 3</text:span> criando a camada HTTP (<text:span text:style-name="T3">Handler</text:span> e <text:span text:style-name="T3">Rota</text:span>) do Gin para as prescrições médicas.</text:p>
      <text:p text:style-name="P99">Em seguida, faremos a fiação no <text:span text:style-name="Source_20_Text">main.go</text:span> e realizaremos dois testes fantásticos: um tentando cadastrar uma receita válida e outro tentando cadastrar uma receita com data vencida para ver o nosso domínio barrando a operação.</text:p>
      <text:h text:style-name="P105" text:outline-level="3">🛠️ Passo 1: Criando Handler e Rotas de Prescrições</text:h>
      <text:p text:style-name="P93">Execute o bloco abaixo no seu terminal para gerar a camada HTTP:</text:p>
      <text:p text:style-name="P93">gemini-code-1782841814510.sh</text:p>
      <text:p text:style-name="P93"/>
      <text:h text:style-name="P98" text:outline-level="3"><text:soft-page-break/>🪢 Passo 2: Atualizando a Fiação Geral no <text:span text:style-name="Source_20_Text">main.go</text:span></text:h>
      <text:p text:style-name="P99">Vamos abrir o arquivo principal e injetar a nova rota junto com as dependências cruzadas (já que o caso de uso de receitas pede o repositório de pacientes).</text:p>
      <text:p text:style-name="P99">Execute no terminal para atualizar o <text:span text:style-name="Source_20_Text">main.go</text:span>:</text:p>
      <text:p text:style-name="P93">gemini-code-1782841853240.sh</text:p>
      <text:p text:style-name="P93"/>
      <text:h text:style-name="P94" text:outline-level="2">🏎️ Testes Práticos da Semana 3</text:h>
      <text:p text:style-name="P99">Ligue o seu servidor: <text:span text:style-name="Source_20_Text">go run cmd/api/main.go</text:span></text:p>
      <text:p text:style-name="P99">Abra <text:span text:style-name="T3">outra aba do seu terminal</text:span>. Vamos fazer dois testes. Para eles, use o ID da sua associação (<text:span text:style-name="Source_20_Text">61a72d3e-d4f9-4b34-b37a-6b0c26ede728</text:span>) e o ID do paciente que criamos na semana passada (<text:span text:style-name="Source_20_Text">086b81b5-5ae4-4d13-b37a-6b0c26ede728</text:span> ou o UUID real que retornou do seu último print!).</text:p>
      <text:h text:style-name="P105" text:outline-level="3">❌ Teste 1: Cadastrar receita VENCIDA (Deve dar Erro!)</text:h>
      <text:p text:style-name="P99">Vamos enviar uma data de expiração no passado (ano de 2023) para ver o Go bloqueando a inserção:</text:p>
      <text:p text:style-name="P93"/>
      <text:p text:style-name="P93"/>
      <text:p text:style-name="P93">gemini-code-1782841891606.sh</text:p>
      <text:p text:style-name="P93"/>
      <text:p text:style-name="P93"><text:span text:style-name="T5">O sistema deve te retornar:</text:span> <text:span text:style-name="Source_20_Text">{"error":"não é possível cadastrar uma receita com data de validade vencida"}</text:span>.</text:p>
      <text:p text:style-name="P93"/>
      <text:h text:style-name="P98" text:outline-level="3">Teste 2: Cadastrar receita VÁLIDA (Deve dar Sucesso!)</text:h>
      <text:p text:style-name="P99">Agora, vamos colocar uma validade para o futuro (como final de 2026/2027):</text:p>
      <text:p text:style-name="P93"/>
      <text:p text:style-name="P93">gemini-code-1782841991834.sh</text:p>
      <text:p text:style-name="P93"/>
      <text:p text:style-name="P93"/>
      <text:p text:style-name="P107">Saida com erro pois não tem nada cadastrado:</text:p>
      <text:p text:style-name="P107"/>
      <text:p text:style-name="P107"><draw:frame draw:style-name="fr1" draw:name="Image1" text:anchor-type="char" svg:width="4.8898in" svg:height="3.4083in" draw:z-index="0"><draw:image xlink:href="Pictures/1000000100000557000003B9C1BE00FC.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h text:style-name="P98" text:outline-level="3"><text:soft-page-break/>🔍 Por que isso aconteceu?</text:h>
      <text:p text:style-name="P99">Essa é a nossa validação de segurança <text:span text:style-name="T3">Multi-Tenant</text:span> funcionando perfeitamente! No primeiro teste da Semana 2, o seu banco gerou um ID único real para o paciente. Como no meu exemplo de comando eu usei um ID genérico (<text:span text:style-name="Source_20_Text">086b81b5-5ae4-4d13-b37a-6b0c26ede728</text:span>), o Go foi até a tabela <text:span text:style-name="Source_20_Text">patients</text:span> procurar por ele e não achou nada.</text:p>
      <text:p text:style-name="P99">Para o teste passar, só precisamos usar o <text:span text:style-name="T3">ID real do paciente</text:span> que o banco te devolveu no passo anterior. Olhando para o seu print anterior (<text:span text:style-name="Source_20_Text">image_743eb8.png</text:span>), o ID do seu paciente criado é: 👉 <text:span text:style-name="Source_20_Text"><text:span text:style-name="T3">086b81b5-5ae4-4d13-b30b-b393e3503bd0</text:span></text:span> <text:span text:style-name="T5">(repare que o final do seu ID real termina com </text:span><text:span text:style-name="Source_20_Text"><text:span text:style-name="T5">3bd0</text:span></text:span><text:span text:style-name="T5">, e o do meu exemplo terminaitava em </text:span><text:span text:style-name="Source_20_Text"><text:span text:style-name="T5">728</text:span></text:span><text:span text:style-name="T5">!)</text:span></text:p>
      <text:h text:style-name="P105" text:outline-level="3">🏎️ Vamos refazer os testes com o ID correto!</text:h>
      <text:p text:style-name="P99">Substitua pelo ID real do seu print e execute no terminal:</text:p>
      <text:h text:style-name="P108" text:outline-level="4">❌ Teste 1: Cadastrar receita VENCIDA (Deve dar erro de data!)</text:h>
      <text:p text:style-name="P93"/>
      <text:h text:style-name="P94" text:outline-level="2">gemini-code-1782842180337.sh</text:h>
      <text:p text:style-name="P93"/>
      <text:p text:style-name="P93"><text:span text:style-name="T5">Deve retornar:</text:span> <text:span text:style-name="Source_20_Text">{"error":"não é possível cadastrar uma receita com data de validade vencida"}</text:span></text:p>
      <text:p text:style-name="P93"><text:span text:style-name="Source_20_Text"/></text:p>
      <text:p text:style-name="P93"><draw:frame draw:style-name="fr2" draw:name="Image2" text:anchor-type="char" svg:width="6.9252in" svg:height="2.8925in" draw:z-index="1"><draw:image xlink:href="Pictures/100000010000053F00000231ED86AD4C.png" xlink:type="simple" xlink:show="embed" xlink:actuate="onLoad" draw:mime-type="image/png"/></draw:frame><text:span text:style-name="Source_20_Text"/></text:p>
      <text:p text:style-name="P93"><text:span text:style-name="Source_20_Text"/></text:p>
      <text:p text:style-name="P93"><text:span text:style-name="Source_20_Text"/></text:p>
      <text:p text:style-name="P93"><text:span text:style-name="Source_20_Text"/></text:p>
      <text:p text:style-name="P93"><text:span text:style-name="Source_20_Text">🎯 Teste 2: Cadastrar receita VÁLIDA (Deve dar Sucesso - 201 Created!)</text:span></text:p>
      <text:p text:style-name="P93"><text:span text:style-name="Source_20_Text"/></text:p>
      <text:p text:style-name="P93"><text:span text:style-name="Source_20_Text">gemini-code-1782842323898.sh</text:span></text:p>
      <text:p text:style-name="P93"><text:span text:style-name="Source_20_Text"/></text:p>
      <text:p text:style-name="P93"><draw:frame draw:style-name="fr3" draw:name="Image3" text:anchor-type="char" svg:width="6.9252in" svg:height="4.6217in" draw:z-index="2"><draw:image xlink:href="Pictures/10000001000005520000038D6E33D761.png" xlink:type="simple" xlink:show="embed" xlink:actuate="onLoad" draw:mime-type="image/png"/></draw:frame><text:soft-page-break/><text:span text:style-name="Source_20_Text"/></text:p>
      <text:h text:style-name="P94" text:outline-level="2">MARCO ALCANÇADO: FIM DA SEMANA 3!</text:h>
      <text:p text:style-name="P99">Assim que você rodar os testes, você verá o poder do modelo de arquitetura que construiu. O banco de dados está protegido, as regras de saúde estão blindadas e o fluxo do seu SaaS avança com segurança.</text:p>
      <text:p text:style-name="P99">Me envie o resultado dos testes para carimbarmos oficialmente a Semana 3 e abrirmos a nossa última etapa: <text:span text:style-name="T3">Semana 4 (Módulo de Estoque e Dispensação de Medicamentos)</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P94" text:outline-level="2">📅 Bem-vindo à Semana 4: O Módulo de Estoque e Dispensação</text:h>
      <text:p text:style-name="P99">Agora que o paciente tem uma receita ativa sob análise, o passo final do fluxo do seu projeto é a <text:span text:style-name="T3">venda/entrega do medicamento (Dispensação) e a baixa automática no estoque</text:span>.</text:p>
      <text:p text:style-name="P99">Nesta semana final do desenvolvimento do backend, vamos construir:</text:p>
      <text:list text:style-name="L17">
        <text:list-item>
          <text:p text:style-name="P109"><text:span text:style-name="T3">Banco de Dados (</text:span><text:span text:style-name="Source_20_Text"><text:span text:style-name="T3">inventory</text:span></text:span><text:span text:style-name="T3">):</text:span> Uma tabela para cadastrar os produtos da associação (ex: Óleo CBD Full Spectrum 30ml) e a quantidade atual em estoque.</text:p>
        </text:list-item>
        <text:list-item>
          <text:p text:style-name="P109"><text:span text:style-name="T3">Caso de Uso de Dispensação:</text:span> A regra de ouro. Quando um pedido for feito, o sistema deve:</text:p>
          <text:list>
            <text:list-item>
              <text:p text:style-name="P109">Verificar se há estoque suficiente do produto.</text:p>
            </text:list-item>
            <text:list-item>
              <text:p text:style-name="P109">Se houver, subtrair a quantidade vendida do estoque total.</text:p>
            </text:list-item>
            <text:list-item>
              <text:p text:style-name="P109">Se não houver, barrar a operação avisando "Estoque insuficiente".</text:p>
            </text:list-item>
          </text:list>
        </text:list-item>
      </text:list>
      <text:h text:style-name="P105" text:outline-level="3">🛠️ Passo 1: Criando a Tabela de Estoque (<text:span text:style-name="Source_20_Text">products</text:span>)</text:h>
      <text:p text:style-name="P99">Vamos rodar o comando SQL diretamente no seu Docker para subir a tabela de produtos. Cada produto também pertence a uma associação específica (<text:span text:style-name="Source_20_Text">association_id</text:span>), mantendo o isolamento total dos dados.</text:p>
      <text:p text:style-name="P99">Abra o terminal e execute:</text:p>
      <text:p text:style-name="P93"/>
      <text:p text:style-name="P93">gemini-code-1782842578878.sh</text:p>
      <text:p text:style-name="P93"/>
      <text:p text:style-name="P93"/>
      <text:p text:style-name="P93"/>
      <text:p text:style-name="P93"/>
      <text:p text:style-name="P93"/>
      <text:p text:style-name="P93"/>
      <text:p text:style-name="P93"/>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5:03:10.744829365</dc:date>
    <meta:editing-duration>PT5H4M11S</meta:editing-duration>
    <meta:editing-cycles>71</meta:editing-cycles>
    <meta:document-statistic meta:table-count="0" meta:image-count="3" meta:object-count="0" meta:page-count="20" meta:paragraph-count="395" meta:word-count="6110" meta:character-count="37661" meta:non-whitespace-character-count="31777"/>
  </office:meta>
</office:document-meta>
</file>