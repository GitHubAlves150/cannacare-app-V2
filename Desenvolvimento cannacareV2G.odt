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Liberation Mono"/>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style:style>
    <style:style style:name="P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fo:font-weight="bold"/>
    </style:style>
    <style:style style:name="P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style:style>
    <style:style style:name="P6" style:family="paragraph" style:parent-style-name="Standard">
      <style:text-properties style:font-name="Liberation Mono"/>
    </style:style>
    <style:style style:name="P7" style:family="paragraph" style:parent-style-name="Standard">
      <style:text-properties style:font-name="Liberation Mono" fo:font-weight="bold" style:font-weight-asian="bold" style:font-weight-complex="bold"/>
    </style:style>
    <style:style style:name="P8" style:family="paragraph" style:parent-style-name="Standard">
      <style:text-properties style:font-name="Liberation Mono" fo:font-weight="normal" officeooo:paragraph-rsid="000df6a0" style:font-weight-asian="normal" style:font-weight-complex="normal"/>
    </style:style>
    <style:style style:name="P9" style:family="paragraph" style:parent-style-name="Standard">
      <style:text-properties style:font-name="Liberation Mono" fo:font-size="8pt" fo:font-weight="normal" officeooo:paragraph-rsid="000df6a0" style:font-size-asian="8pt" style:font-weight-asian="normal" style:font-size-complex="8pt" style:font-weight-complex="normal"/>
    </style:style>
    <style:style style:name="P10" style:family="paragraph" style:parent-style-name="Standard">
      <style:text-properties style:font-name="Liberation Mono" fo:font-size="8pt" fo:font-weight="bold" style:font-size-asian="8pt" style:font-weight-asian="bold" style:font-size-complex="8pt" style:font-weight-complex="bold"/>
    </style:style>
    <style:style style:name="P11" style:family="paragraph" style:parent-style-name="Standard">
      <style:text-properties style:font-name="Liberation Mono" fo:font-size="8pt" fo:font-weight="bold" officeooo:paragraph-rsid="000df6a0" style:font-size-asian="8pt" style:font-weight-asian="bold" style:font-size-complex="8pt" style:font-weight-complex="bold"/>
    </style:style>
    <style:style style:name="P12" style:family="paragraph" style:parent-style-name="Heading_20_2">
      <style:text-properties style:font-name="Liberation Mono" fo:font-size="8pt" fo:font-weight="bold" style:font-size-asian="8pt" style:font-weight-asian="bold" style:font-size-complex="8pt" style:font-weight-complex="bold"/>
    </style:style>
    <style:style style:name="P13" style:family="paragraph" style:parent-style-name="Text_20_body">
      <style:text-properties style:font-name="Liberation Mono" fo:font-size="8pt" fo:font-weight="bold" style:font-size-asian="8pt" style:font-weight-asian="bold" style:font-size-complex="8pt" style:font-weight-complex="bold"/>
    </style:style>
    <style:style style:name="P14" style:family="paragraph" style:parent-style-name="Text_20_body" style:list-style-name="L2">
      <style:text-properties style:font-name="Liberation Mono" fo:font-size="8pt" fo:font-weight="bold" style:font-size-asian="8pt" style:font-weight-asian="bold" style:font-size-complex="8pt" style:font-weight-complex="bold"/>
    </style:style>
    <style:style style:name="P15" style:family="paragraph" style:parent-style-name="Standard">
      <style:text-properties style:font-name="Liberation Mono" fo:font-size="8pt" fo:font-weight="bold" officeooo:rsid="0011369d" officeooo:paragraph-rsid="0011369d" fo:background-color="#3465a4" style:font-size-asian="8pt" style:font-weight-asian="bold" style:font-size-complex="8pt" style:font-weight-complex="bold"/>
    </style:style>
    <style:style style:name="P16" style:family="paragraph" style:parent-style-name="Text_20_body">
      <style:text-properties style:font-name="Google Sans Text" fo:font-size="8pt" fo:font-weight="bold" officeooo:rsid="0011369d" officeooo:paragraph-rsid="0011369d" style:font-size-asian="8pt" style:font-weight-asian="bold" style:font-size-complex="8pt" style:font-weight-complex="bold"/>
    </style:style>
    <style:style style:name="P17"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officeooo:rsid="0011369d" style:font-size-asian="8pt" style:font-weight-asian="bold" style:font-size-complex="8pt" style:font-weight-complex="bold"/>
    </style:style>
    <style:style style:name="P18"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officeooo:rsid="0011369d" style:font-size-asian="8pt" style:font-weight-asian="bold" style:font-size-complex="8pt" style:font-weight-complex="bold"/>
    </style:style>
    <style:style style:name="P19" style:family="paragraph" style:parent-style-name="Standard">
      <style:text-properties style:font-name="Liberation Mono" fo:font-size="8pt" fo:font-weight="bold" officeooo:rsid="0011369d" officeooo:paragraph-rsid="0011369d" style:font-size-asian="8pt" style:font-weight-asian="bold" style:font-size-complex="8pt" style:font-weight-complex="bold"/>
    </style:style>
    <style:style style:name="P20" style:family="paragraph" style:parent-style-name="Heading_20_3">
      <style:text-properties style:font-name="Liberation Mono" fo:font-size="8pt" fo:font-weight="bold" style:font-size-asian="8pt" style:font-weight-asian="bold" style:font-size-complex="8pt" style:font-weight-complex="bold"/>
    </style:style>
    <style:style style:name="P21" style:family="paragraph" style:parent-style-name="Heading_20_3">
      <style:text-properties style:font-name="Google Sans" fo:font-size="8pt" fo:font-weight="bold" style:font-size-asian="8pt" style:font-weight-asian="bold" style:font-size-complex="8pt" style:font-weight-complex="bold"/>
    </style:style>
    <style:style style:name="P2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fo:font-weight="bold" style:font-size-asian="8pt" style:font-weight-asian="bold" style:font-size-complex="8pt" style:font-weight-complex="bold"/>
    </style:style>
    <style:style style:name="P23"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fo:font-weight="bold" style:font-size-asian="8pt" style:font-weight-asian="bold" style:font-size-complex="8pt" style:font-weight-complex="bold"/>
    </style:style>
    <style:style style:name="P24" style:family="paragraph" style:parent-style-name="Standard">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5" style:family="paragraph" style:parent-style-name="Preformatted_20_Text">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6"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style:font-size-asian="8pt" style:font-weight-asian="bold" style:font-size-complex="8pt" style:font-weight-complex="bold"/>
    </style:style>
    <style:style style:name="P2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28"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fo:font-size="8pt" style:font-size-asian="8pt" style:font-size-complex="8pt"/>
    </style:style>
    <style:style style:name="P29"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30" style:family="paragraph" style:parent-style-name="Standard">
      <style:text-properties fo:color="#999999" loext:opacity="100%" style:font-name="Liberation Mono" fo:font-size="8pt" fo:font-weight="bold" officeooo:paragraph-rsid="0014ff79" style:font-size-asian="8pt" style:font-weight-asian="bold" style:font-size-complex="8pt" style:font-weight-complex="bold"/>
    </style:style>
    <style:style style:name="P31" style:family="paragraph" style:parent-style-name="Heading_20_3">
      <style:text-properties fo:color="#000000" loext:opacity="100%" style:font-name="Google Sans" fo:font-size="8pt" fo:font-weight="bold" officeooo:paragraph-rsid="0014ff79" style:font-size-asian="8pt" style:font-weight-asian="bold" style:font-size-complex="8pt" style:font-weight-complex="bold"/>
    </style:style>
    <style:style style:name="P32"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style:font-size-asian="8pt" style:font-weight-asian="bold" style:font-size-complex="8pt" style:font-weight-complex="bold"/>
    </style:style>
    <style:style style:name="P33"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fo:color="#999999" loext:opacity="100%" style:font-name="Liberation Mono" fo:font-size="8pt" fo:font-weight="bold" style:font-size-asian="8pt" style:font-weight-asian="bold" style:font-size-complex="8pt" style:font-weight-complex="bold"/>
    </style:style>
    <style:style style:name="P3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style:font-size-asian="8pt" style:font-weight-asian="bold" style:font-size-complex="8pt" style:font-weight-complex="bold"/>
    </style:style>
    <style:style style:name="P35" style:family="paragraph" style:parent-style-name="Standard">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6" style:family="paragraph" style:parent-style-name="Heading_20_3">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7"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officeooo:rsid="0014ff79" style:font-size-asian="8pt" style:font-weight-asian="bold" style:font-size-complex="8pt" style:font-weight-complex="bold"/>
    </style:style>
    <style:style style:name="P38"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4ff79" style:font-size-asian="8pt" style:font-weight-asian="bold" style:font-size-complex="8pt" style:font-weight-complex="bold"/>
    </style:style>
    <style:style style:name="P39" style:family="paragraph" style:parent-style-name="Standard">
      <style:text-properties fo:color="#999999" loext:opacity="100%" style:font-name="Liberation Mono" fo:font-size="8pt" fo:font-weight="bold" officeooo:rsid="0014ff79" officeooo:paragraph-rsid="001583c9" style:font-size-asian="8pt" style:font-weight-asian="bold" style:font-size-complex="8pt" style:font-weight-complex="bold"/>
    </style:style>
    <style:style style:name="P40" style:family="paragraph" style:parent-style-name="Heading_20_3">
      <style:text-properties fo:color="#000000" loext:opacity="100%" style:font-name="Liberation Mono" fo:font-size="8pt" fo:font-weight="bold" officeooo:rsid="0014ff79" officeooo:paragraph-rsid="001583c9" style:font-size-asian="8pt" style:font-weight-asian="bold" style:font-size-complex="8pt" style:font-weight-complex="bold"/>
    </style:style>
    <style:style style:name="P41" style:family="paragraph" style:parent-style-name="Standard">
      <style:text-properties fo:color="#808080" loext:opacity="100%" style:font-name="Liberation Mono" fo:font-size="8pt" fo:font-weight="bold" officeooo:rsid="0015a29f" officeooo:paragraph-rsid="0015a29f" style:font-size-asian="8pt" style:font-weight-asian="bold" style:font-size-complex="8pt" style:font-weight-complex="bold"/>
    </style:style>
    <style:style style:name="P42" style:family="paragraph" style:parent-style-name="Standard">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3" style:family="paragraph" style:parent-style-name="Text_20_body">
      <style:text-properties fo:color="#000000" loext:opacity="100%" style:font-name="Google Sans Text" fo:font-size="8pt" fo:font-weight="bold" officeooo:rsid="0015a29f" officeooo:paragraph-rsid="0015a29f" style:font-size-asian="8pt" style:font-weight-asian="bold" style:font-size-complex="8pt" style:font-weight-complex="bold"/>
    </style:style>
    <style:style style:name="P4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5a29f" style:font-size-asian="8pt" style:font-weight-asian="bold" style:font-size-complex="8pt" style:font-weight-complex="bold"/>
    </style:style>
    <style:style style:name="P45" style:family="paragraph" style:parent-style-name="Heading_20_3">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6" style:family="paragraph" style:parent-style-name="Text_20_body">
      <style:text-properties fo:color="#000000" loext:opacity="100%" style:font-name="Liberation Mono" fo:font-size="8pt" fo:font-weight="bold" officeooo:rsid="0015a29f" style:font-size-asian="8pt" style:font-weight-asian="bold" style:font-size-complex="8pt" style:font-weight-complex="bold"/>
    </style:style>
    <style:style style:name="P47" style:family="paragraph" style:parent-style-name="Text_20_body">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8"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49"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0" style:family="paragraph" style:parent-style-name="Heading_20_2">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1" style:family="paragraph" style:parent-style-name="Preformatted_20_Text">
      <style:paragraph-properties fo:margin-left="0in" fo:margin-right="0in" fo:margin-top="0in" fo:margin-bottom="0in" style:contextual-spacing="false" fo:line-height="114%"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2"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3"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4" style:family="paragraph" style:parent-style-name="Text_20_body" style:list-style-name="L9">
      <style:text-properties fo:color="#000000" loext:opacity="100%" style:font-name="Liberation Mono" fo:font-size="8pt" fo:font-weight="bold" officeooo:rsid="0015a29f" style:font-size-asian="8pt" style:font-weight-asian="bold" style:font-size-complex="8pt" style:font-weight-complex="bold"/>
    </style:style>
    <style:style style:name="P55"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56" style:family="paragraph" style:parent-style-name="Text_20_body">
      <style:paragraph-properties fo:margin-left="0in" fo:margin-right="0in"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7" style:family="paragraph" style:parent-style-name="Heading_20_3">
      <style:text-properties fo:color="#000000" loext:opacity="100%" style:font-name="Liberation Mono" fo:font-size="8pt" officeooo:rsid="0015a29f" style:font-size-asian="8pt" style:font-size-complex="8pt"/>
    </style:style>
    <style:style style:name="P58" style:family="paragraph" style:parent-style-name="Heading_20_3">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59" style:family="paragraph" style:parent-style-name="Standard">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0" style:family="paragraph" style:parent-style-name="Text_20_body">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1"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62" style:family="paragraph" style:parent-style-name="Heading_20_3">
      <style:paragraph-properties fo:margin-left="0in" fo:margin-right="0in" fo:margin-top="0in" fo:margin-bottom="0.0972in" style:contextual-spacing="false" fo:line-height="114%" fo:text-indent="0in" style:auto-text-indent="false"/>
      <style:text-properties fo:color="#000000" loext:opacity="100%" style:font-name="Liberation Mono" fo:font-size="8pt" officeooo:rsid="0015a29f" style:font-size-asian="8pt" style:font-size-complex="8pt"/>
    </style:style>
    <style:style style:name="P63" style:family="paragraph" style:parent-style-name="Text_20_body">
      <style:paragraph-properties fo:margin-left="0in" fo:margin-right="0in" fo:margin-top="0in" fo:margin-bottom="0in" style:contextual-spacing="false"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4" style:family="paragraph" style:parent-style-name="Text_20_body">
      <style:paragraph-properties fo:margin-left="0in" fo:margin-right="0in" fo:orphans="20"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5" style:family="paragraph" style:parent-style-name="Standard">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6" style:family="paragraph" style:parent-style-name="Text_20_body">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7" style:family="paragraph" style:parent-style-name="Heading_20_3">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8"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9" style:family="paragraph" style:parent-style-name="Text_20_body">
      <style:paragraph-properties fo:text-align="center" style:justify-single-word="false"/>
      <style:text-properties officeooo:paragraph-rsid="00234d93"/>
    </style:style>
    <style:style style:name="P70" style:family="paragraph" style:parent-style-name="Text_20_body">
      <style:text-properties fo:color="#999999" loext:opacity="100%" style:font-name="Liberation Mono" fo:font-size="8pt" fo:font-weight="bold" style:font-size-asian="8pt" style:font-weight-asian="bold" style:font-size-complex="8pt" style:font-weight-complex="bold"/>
    </style:style>
    <style:style style:name="P71" style:family="paragraph" style:parent-style-name="Heading_20_2">
      <style:text-properties fo:color="#000000" loext:opacity="100%" style:font-name="Liberation Mono" fo:font-size="8pt" fo:font-weight="bold" style:font-size-asian="8pt" style:font-weight-asian="bold" style:font-size-complex="8pt" style:font-weight-complex="bold"/>
    </style:style>
    <style:style style:name="P72" style:family="paragraph" style:parent-style-name="Text_20_body">
      <style:text-properties fo:color="#000000" loext:opacity="100%" style:font-name="Liberation Mono" fo:font-size="8pt" fo:font-weight="bold" style:font-size-asian="8pt" style:font-weight-asian="bold" style:font-size-complex="8pt" style:font-weight-complex="bold"/>
    </style:style>
    <style:style style:name="P73" style:family="paragraph" style:parent-style-name="Text_20_body" style:list-style-name="L12">
      <style:text-properties fo:color="#000000" loext:opacity="100%" style:font-name="Liberation Mono" fo:font-size="8pt" fo:font-weight="bold" style:font-size-asian="8pt" style:font-weight-asian="bold" style:font-size-complex="8pt" style:font-weight-complex="bold"/>
    </style:style>
    <style:style style:name="P74" style:family="paragraph" style:parent-style-name="Text_20_body" style:list-style-name="L13">
      <style:text-properties fo:color="#000000" loext:opacity="100%" style:font-name="Liberation Mono" fo:font-size="8pt" fo:font-weight="bold" style:font-size-asian="8pt" style:font-weight-asian="bold" style:font-size-complex="8pt" style:font-weight-complex="bold"/>
    </style:style>
    <style:style style:name="P75" style:family="paragraph" style:parent-style-name="Heading_20_3">
      <style:text-properties fo:color="#000000" loext:opacity="100%" style:font-name="Liberation Mono" fo:font-size="8pt" fo:font-weight="bold" style:font-size-asian="8pt" style:font-weight-asian="bold" style:font-size-complex="8pt" style:font-weight-complex="bold"/>
    </style:style>
    <style:style style:name="P76" style:family="paragraph" style:parent-style-name="Text_20_body">
      <style:text-properties fo:color="#000000" loext:opacity="100%" style:font-name="Google Sans Text" fo:font-size="8pt" fo:font-weight="bold" style:font-size-asian="8pt" style:font-weight-asian="bold" style:font-size-complex="8pt" style:font-weight-complex="bold"/>
    </style:style>
    <style:style style:name="P77"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Liberation Mono" fo:font-size="8pt" fo:font-weight="bold" style:font-size-asian="8pt" style:font-weight-asian="bold" style:font-size-complex="8pt" style:font-weight-complex="bold"/>
    </style:style>
    <style:style style:name="P78" style:family="paragraph" style:parent-style-name="Text_20_body">
      <style:text-properties fo:color="#000000" loext:opacity="100%" style:font-name="Liberation Mono" fo:font-size="8pt" fo:font-weight="bold" officeooo:rsid="003457cd" officeooo:paragraph-rsid="003457cd" style:font-size-asian="8pt" style:font-weight-asian="bold" style:font-size-complex="8pt" style:font-weight-complex="bold"/>
    </style:style>
    <style:style style:name="P79" style:family="paragraph" style:parent-style-name="Text_20_body" style:list-style-name="L14">
      <style:text-properties fo:color="#000000" loext:opacity="100%" style:font-name="Liberation Mono" fo:font-size="8pt" fo:font-weight="bold" style:font-size-asian="8pt" style:font-weight-asian="bold" style:font-size-complex="8pt" style:font-weight-complex="bold"/>
    </style:style>
    <style:style style:name="P80" style:family="paragraph" style:parent-style-name="Text_20_body">
      <style:text-properties style:font-name="Liberation Mono" fo:font-size="8pt" style:font-size-asian="8pt" style:font-size-complex="8pt"/>
    </style:style>
    <style:style style:name="P81" style:family="paragraph" style:parent-style-name="Text_20_body">
      <style:text-properties style:font-name="Liberation Mono" fo:font-size="16pt" officeooo:rsid="00386e1f" officeooo:paragraph-rsid="00386e1f" style:font-size-asian="16pt" style:font-size-complex="16pt"/>
    </style:style>
    <style:style style:name="P82" style:family="paragraph" style:parent-style-name="Text_20_body">
      <style:text-properties style:font-name="Liberation Mono" fo:font-size="8pt" officeooo:rsid="00386e1f" officeooo:paragraph-rsid="00386e1f" style:font-size-asian="7pt" style:font-size-complex="8pt"/>
    </style:style>
    <style:style style:name="P83" style:family="paragraph" style:parent-style-name="Text_20_body">
      <style:text-properties style:font-name="Liberation Mono" fo:font-size="8pt" officeooo:rsid="00386e1f" officeooo:paragraph-rsid="00386e1f" style:font-size-asian="8pt" style:font-size-complex="8pt"/>
    </style:style>
    <style:style style:name="P84"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85" style:family="paragraph" style:parent-style-name="Heading_20_2">
      <style:text-properties style:font-name="Liberation Mono" fo:font-size="8pt" officeooo:rsid="00386e1f" officeooo:paragraph-rsid="00386e1f" style:font-size-asian="8pt" style:font-size-complex="8pt"/>
    </style:style>
    <style:style style:name="P86"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386e1f" style:font-size-asian="8pt" style:font-size-complex="8pt"/>
    </style:style>
    <style:style style:name="P87"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Liberation Mono" fo:font-size="8pt" officeooo:rsid="00386e1f" style:font-size-asian="8pt" style:font-size-complex="8pt"/>
    </style:style>
    <style:style style:name="P88"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Google Sans Text" fo:font-size="8pt" officeooo:rsid="00386e1f" style:font-size-asian="8pt" style:font-size-complex="8pt"/>
    </style:style>
    <style:style style:name="P89" style:family="paragraph" style:parent-style-name="Text_20_body">
      <style:text-properties style:font-name="Liberation Mono" fo:font-size="8pt" officeooo:rsid="00386e1f" style:font-size-asian="8pt" style:font-size-complex="8pt"/>
    </style:style>
    <style:style style:name="P90"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91" style:family="paragraph" style:parent-style-name="Heading_20_3">
      <style:text-properties style:font-name="Liberation Mono" fo:font-size="8pt" officeooo:rsid="00386e1f" officeooo:paragraph-rsid="00386e1f" style:font-size-asian="8pt" style:font-size-complex="8pt"/>
    </style:style>
    <style:style style:name="P92" style:family="paragraph" style:parent-style-name="Text_20_body">
      <style:text-properties style:font-name="Google Sans Text" fo:font-size="8pt" officeooo:rsid="00386e1f" officeooo:paragraph-rsid="00386e1f" style:font-size-asian="8pt" style:font-size-complex="8pt"/>
    </style:style>
    <style:style style:name="P93" style:family="paragraph" style:parent-style-name="Text_20_body">
      <style:text-properties style:font-name="Liberation Mono" fo:font-size="8pt" officeooo:rsid="0041caf7" officeooo:paragraph-rsid="0041caf7" style:font-size-asian="8pt" style:font-size-complex="8pt"/>
    </style:style>
    <style:style style:name="P94" style:family="paragraph" style:parent-style-name="Heading_20_2">
      <style:text-properties style:font-name="Liberation Mono" fo:font-size="8pt" officeooo:rsid="0041caf7" officeooo:paragraph-rsid="0041caf7" style:font-size-asian="8pt" style:font-size-complex="8pt"/>
    </style:style>
    <style:style style:name="P95"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41caf7" style:font-size-asian="8pt" style:font-size-complex="8pt"/>
    </style:style>
    <style:style style:name="P96" style:family="paragraph" style:parent-style-name="Text_20_body">
      <style:text-properties style:font-name="Google Sans Text" fo:font-size="8pt" officeooo:rsid="0041caf7" officeooo:paragraph-rsid="0041caf7" style:font-size-asian="8pt" style:font-size-complex="8pt"/>
    </style:style>
    <style:style style:name="P97"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41caf7" style:font-size-asian="8pt" style:font-size-complex="8pt"/>
    </style:style>
    <style:style style:name="P98" style:family="paragraph" style:parent-style-name="Heading_20_3">
      <style:text-properties style:font-name="Liberation Mono" fo:font-size="8pt" officeooo:rsid="0041caf7" officeooo:paragraph-rsid="0041caf7" style:font-size-asian="8pt" style:font-size-complex="8pt"/>
    </style:style>
    <style:style style:name="P99" style:family="paragraph" style:parent-style-name="Text_20_body">
      <style:text-properties style:font-name="Liberation Mono" fo:font-size="8pt" officeooo:rsid="0041caf7" style:font-size-asian="8pt" style:font-size-complex="8pt"/>
    </style:style>
    <style:style style:name="P100" style:family="paragraph" style:parent-style-name="Text_20_body">
      <style:text-properties style:font-name="Liberation Mono" officeooo:rsid="0041caf7" style:font-size-asian="12pt"/>
    </style:style>
    <style:style style:name="P101" style:family="paragraph" style:parent-style-name="Quotations">
      <style:paragraph-properties fo:margin-top="0in" fo:margin-bottom="0.0972in" style:contextual-spacing="false" fo:line-height="115%"/>
      <style:text-properties style:font-name="Liberation Mono" officeooo:rsid="0041caf7" style:font-size-asian="12pt"/>
    </style:style>
    <style:style style:name="P102" style:family="paragraph" style:parent-style-name="Text_20_body">
      <style:text-properties style:font-name="Liberation Mono" fo:font-size="12pt" officeooo:rsid="0041caf7" officeooo:paragraph-rsid="0041caf7" style:font-size-asian="12pt" style:font-size-complex="12pt"/>
    </style:style>
    <style:style style:name="T1" style:family="text">
      <style:text-properties style:font-name="Liberation Mono" fo:font-weight="bold"/>
    </style:style>
    <style:style style:name="T2" style:family="text">
      <style:text-properties style:font-name="Liberation Mono"/>
    </style:style>
    <style:style style:name="T3" style:family="text">
      <style:text-properties fo:font-weight="bold"/>
    </style:style>
    <style:style style:name="T4" style:family="text">
      <style:text-properties style:font-name="Google Sans Text"/>
    </style:style>
    <style:style style:name="T5" style:family="text">
      <style:text-properties fo:font-style="italic"/>
    </style:style>
    <style:style style:name="T6" style:family="text">
      <style:text-properties fo:color="#999999" loext:opacity="100%"/>
    </style:style>
    <style:style style:name="T7" style:family="text">
      <style:text-properties fo:color="#000000" loext:opacity="100%" style:font-name="Google Sans Text"/>
    </style:style>
    <style:style style:name="T8" style:family="text">
      <style:text-properties fo:color="#000000" loext:opacity="100%" style:font-name="Google Sans"/>
    </style:style>
    <style:style style:name="T9" style:family="text">
      <style:text-properties style:font-name="Google Sans"/>
    </style:style>
    <style:style style:name="T10" style:family="text">
      <style:text-properties fo:color="#111111" loext:opacity="100%"/>
    </style:style>
    <style:style style:name="T11" style:family="text">
      <style:text-properties style:font-name="Google Sans Text" fo:font-style="italic"/>
    </style:style>
    <style:style style:name="T12" style:family="text">
      <style:text-properties fo:color="#000000" loext:opacity="100%"/>
    </style:style>
    <style:style style:name="T13" style:family="text">
      <style:text-properties fo:color="#000000" loext:opacity="100%" fo:font-size="9pt" style:font-size-asian="9pt" style:font-size-complex="9pt"/>
    </style:style>
    <style:style style:name="T14" style:family="text">
      <style:text-properties style:font-name="Liberation Mono" fo:font-size="8pt" fo:font-weight="bold" style:font-size-asian="8pt" style:font-weight-asian="bold" style:font-size-complex="8pt" style:font-weight-complex="bold"/>
    </style:style>
    <style:style style:name="T15" style:family="text">
      <style:text-properties style:font-name="Liberation Mono" fo:font-size="8pt" fo:font-style="italic" fo:font-weight="bold" style:font-size-asian="8pt" style:font-weight-asian="bold" style:font-size-complex="8pt" style:font-weight-complex="bold"/>
    </style:style>
    <style:style style:name="T16" style:family="text">
      <style:text-properties officeooo:rsid="003284b5"/>
    </style:style>
    <style:style style:name="T17" style:family="text">
      <style:text-properties style:font-name="Google Sans Text" fo:font-weight="bold"/>
    </style:style>
    <style:style style:name="T18" style:family="text">
      <style:text-properties fo:font-size="8pt" style:font-size-asian="8pt" style:font-size-complex="8pt"/>
    </style:style>
    <style:style style:name="T19" style:family="text">
      <style:text-properties fo:font-size="8pt" fo:font-weight="bold" style:font-size-asian="8pt" style:font-size-complex="8pt"/>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As Tecnologias do Nosso Projeto</text:h>
      <text:p text:style-name="P2"/>
      <text:list text:style-name="L1">
        <text:list-item>
          <text:p text:style-name="P3">Backend: Go (Golang) com o framework Gin</text:p>
          <text:list>
            <text:list-item>
              <text:p text:style-name="P4"><text:span text:style-name="T1">O que é:</text:span><text:span text:style-name="T2"> Go é uma linguagem criada pelo Google. Ela é extremamente rápida e consome pouquíssima memória. O Gin é uma biblioteca (framework) que nos ajuda a criar as "portas de entrada" (rotas) do sistema (ex: </text:span><text:span text:style-name="Source_20_Text"><text:span text:style-name="T2">/patients</text:span></text:span><text:span text:style-name="T2">, </text:span><text:span text:style-name="Source_20_Text"><text:span text:style-name="T2">/login</text:span></text:span><text:span text:style-name="T2">).</text:span></text:p>
            </text:list-item>
          </text:list>
        </text:list-item>
        <text:list-item>
          <text:p text:style-name="P3">Banco de Dados: PostgreSQL</text:p>
          <text:list>
            <text:list-item>
              <text:p text:style-name="P5"><text:bookmark text:name="p-rc_d646d65258261c9b-134"/><text:span text:style-name="T3">O que é:</text:span> É um banco de dados relacional. Pense nele como uma coleção de planilhas altamente inteligentes e seguras que se conectam entre si. Como seu sistema lida com saúde, receitas e financeiro, precisamos da segurança absoluta do Postgres para que nenhum dado se perca ou fique desorganizado. </text:p>
            </text:list-item>
          </text:list>
        </text:list-item>
        <text:list-item>
          <text:p text:style-name="P3">Frontend: Next.js (React) + TailwindCSS</text:p>
          <text:list>
            <text:list-item>
              <text:p text:style-name="P5"><text:bookmark text:name="p-rc_d646d65258261c9b-135"/><text:span text:style-name="T3">O que é:</text:span> O Next.js será a tecnologia para construir as telas que a secretaria, os médicos e a farmácia vão usar no navegador. O TailwindCSS é uma ferramenta que nos ajuda a deixar o design bonito e moderno de forma rápida. </text:p>
            </text:list-item>
          </text:list>
        </text:list-item>
      </text:list>
      <text:p text:style-name="P6"/>
      <text:p text:style-name="P7">📂 Organizando a Árvore de Pastas (O Esqueleto)</text:p>
      <text:p text:style-name="P8"/>
      <text:p text:style-name="P8">Clean Architecture:</text:p>
      <text:p text:style-name="P8"/>
      <text:p text:style-name="P9"/>
      <text:p text:style-name="P10">cannacare/</text:p>
      <text:p text:style-name="P10">├── cmd/</text:p>
      <text:p text:style-name="P10">│ <text:s text:c="2"/>└── api/</text:p>
      <text:p text:style-name="P10">│ <text:s text:c="6"/>└── main.go <text:s text:c="8"/># O "interruptor" do sistema. É aqui que o software liga.</text:p>
      <text:p text:style-name="P10">├── internal/ <text:s text:c="14"/># Onde fica toda a lógica protegida do sistema.</text:p>
      <text:p text:style-name="P10">│ <text:s text:c="2"/>├── config/ <text:s text:c="12"/># Código que lê as senhas e configurações (arquivo .env).</text:p>
      <text:p text:style-name="P11">│ <text:s text:c="2"/>├── domain/ <text:s text:c="12"/># CAMADA 1: O Coração. Aqui definimos o que é um Paciente, uma Receita, <text:s text:c="3"/>│ <text:s text:c="2"/>│ <text:s/><text:tab/><text:tab/><text:tab/><text:tab/>etc.</text:p>
      <text:p text:style-name="P11">│ <text:s text:c="2"/>├── application/ <text:s text:c="7"/># CAMADA 2: Os Casos de Uso. As regras (ex: "Aprovar Paciente", "Baixa</text:p>
      <text:p text:style-name="P11">│ <text:s text:c="2"/>│<text:tab/><text:tab/><text:tab/><text:tab/>Estoque").</text:p>
      <text:p text:style-name="P11">│ <text:s text:c="2"/>├── infrastructure/ <text:s text:c="4"/># CAMADA 3: Ferramentas externas. Conexão com o Banco de Dados e upload de │ <text:s text:c="2"/>│<text:tab/><text:tab/><text:tab/><text:tab/>PDFs.</text:p>
      <text:p text:style-name="P11">│ <text:s text:c="2"/>└── interfaces/ <text:s text:c="8"/># CAMADA 4: Comunicação. Onde o Go recebe os dados vindos das telas do <text:s text:c="4"/>│<text:tab/><text:tab/><text:tab/><text:tab/>Frontend.</text:p>
      <text:p text:style-name="P11">├── migrations/ <text:s text:c="12"/># Arquivos contendo os comandos SQL para criar as tabelas no banco de <text:s text:c="5"/>│<text:tab/><text:tab/><text:tab/><text:tab/>dados.</text:p>
      <text:p text:style-name="P11">├── docker-compose.yml <text:s text:c="5"/># Arquivo que instala e roda o PostgreSQL no seu computador de forma <text:s text:c="6"/>│<text:tab/><text:tab/><text:tab/><text:tab/>isolada.</text:p>
      <text:p text:style-name="P10">└── .env <text:s text:c="19"/># Arquivo secreto onde ficam as senhas e portas do sistema.</text:p>
      <text:p text:style-name="P10"/>
      <text:p text:style-name="P10"/>
      <text:p text:style-name="P10"/>
      <text:p text:style-name="P10"/>
      <text:p text:style-name="P10"/>
      <text:p text:style-name="P10"/>
      <text:p text:style-name="P10"/>
      <text:p text:style-name="P10"><text:soft-page-break/></text:p>
      <text:p text:style-name="P10"/>
      <text:h text:style-name="P12" text:outline-level="2">📝 O Nosso Primeiro Passo Prático</text:h>
      <text:p text:style-name="P13">Para começarmos a construir sem pressa, vamos focar no Passo 1: Ligar o motor.</text:p>
      <text:p text:style-name="P13">Antes de programar as telas ou o cadastro de pacientes, precisamos fazer com que:</text:p>
      <text:list text:style-name="L2">
        <text:list-item>
          <text:p text:style-name="P14">O PostgreSQL rode no seu computador via Docker.</text:p>
        </text:list-item>
        <text:list-item>
          <text:p text:style-name="P14">O Go consiga ler as configurações de senha.</text:p>
        </text:list-item>
        <text:list-item>
          <text:p text:style-name="P14">O Go se conecte com esse banco com sucesso.</text:p>
        </text:list-item>
      </text:list>
      <text:p text:style-name="P15">Iniciando a primeira etapa:</text:p>
      <text:p text:style-name="P16">Nesta etapa, vamos fazer três coisas:</text:p>
      <text:list text:style-name="L3">
        <text:list-item>
          <text:p text:style-name="P17"><text:span text:style-name="T4">Criar o arquivo que guarda as senhas e configurações do sistema (</text:span><text:span text:style-name="Source_20_Text"><text:span text:style-name="T4">.env</text:span></text:span><text:span text:style-name="T4">).</text:span></text:p>
        </text:list-item>
        <text:list-item>
          <text:p text:style-name="P18"><text:bookmark text:name="p-rc_711feb613a723c84-145"/>Criar e ligar o banco de dados PostgreSQL usando o Docker. </text:p>
        </text:list-item>
        <text:list-item>
          <text:p text:style-name="P18">Inicializar o projeto no Go.</text:p>
        </text:list-item>
      </text:list>
      <text:p text:style-name="P19"/>
      <text:h text:style-name="P20" text:outline-level="3">Passo 1: Criando o arquivo de configurações (<text:span text:style-name="Source_20_Text">.env</text:span>)</text:h>
      <text:p text:style-name="P13">No desenvolvimento de software, nunca colocamos senhas ou portas diretamente no código. Nós usamos um arquivo oculto chamado <text:span text:style-name="Source_20_Text">.env</text:span> (de <text:span text:style-name="T5">environment</text:span>, ou ambiente).</text:p>
      <text:p text:style-name="P13">Execute o comando abaixo para criar esse arquivo:</text:p>
      <text:p text:style-name="Text_20_body">cat &gt; .env &lt;&lt; 'EOF' PORT=8080 DB_HOST=localhost DB_PORT=5432 DB_USER=postgres DB_PASSWORD=senha_cannacare_2026 DB_NAME=cannacare_db DB_SSLMODE=disable EOF</text:p>
      <text:p text:style-name="Text_20_body"/>
      <text:p text:style-name="Text_20_body"><text:span text:style-name="T3">O que isso fez?</text:span> Criou um arquivo de texto simples que diz ao sistema que nossa API vai rodar na porta <text:span text:style-name="Source_20_Text">8080</text:span> e que o banco de dados se chamará</text:p>
      <text:p text:style-name="Text_20_body"/>
      <text:p text:style-name="P10"/>
      <text:h text:style-name="P21" text:outline-level="3">Passo 2: Criando e ligando o Banco de Dados com Docker</text:h>
      <text:p text:style-name="P22"><text:bookmark text:name="p-rc_711feb613a723c84-147"/><text:span text:style-name="T4">Em vez de você ter que baixar e instalar o PostgreSQL no seu sistema operacional, vamos usar o Docker. Ele cria uma "caixa isolada" (um container) contendo o banco de dados prontinho para uso, com as mesmas senhas que definimos no </text:span><text:span text:style-name="Source_20_Text"><text:span text:style-name="T4">.env</text:span></text:span><text:span text:style-name="T4">. </text:span></text:p>
      <text:p text:style-name="P23">Execute o comando abaixo para criar o arquivo de configuração do Docker:</text:p>
      <text:p text:style-name="P24"/>
      <text:p text:style-name="Text_20_body">cat &gt; docker-compose.yml &lt;&lt; 'EOF' version: '3.8'</text:p>
      <text:p text:style-name="Text_20_body">services: postgres: image: postgres:15-alpine container_name: cannacare_postgres environment: POSTGRES_USER: postgres POSTGRES_PASSWORD: senha_cannacare_2026 POSTGRES_DB: cannacare_db ports: - "5432:5432" volumes: - postgres_data:/var/lib/postgresql/data restart: always</text:p>
      <text:p text:style-name="Text_20_body">volumes: postgres_data: EOF</text:p>
      <text:p text:style-name="Text_20_body"/>
      <text:p text:style-name="Text_20_body"><text:soft-page-break/></text:p>
      <text:p text:style-name="Text_20_body">Agora, para <text:span text:style-name="T3">ligar</text:span> o banco de dados de verdade, execute o seguinte comando:</text:p>
      <text:p text:style-name="Text_20_body">docker compose up -d</text:p>
      <text:p text:style-name="Text_20_body"><text:span text:style-name="T3">Nota:</text:span> O símbolo <text:span text:style-name="Source_20_Text">-d</text:span> significa <text:span text:style-name="T5">detached</text:span> (em segundo plano). O terminal vai baixar o Postgres (se você não tiver) e deixá-lo rodando quietinho no computador.</text:p>
      <text:p text:style-name="P10"/>
      <text:p text:style-name="P10">Agora vamos dizer para o Go que esta pasta é um projeto oficial que vai usar o seu novo repositório do GitHub. Execute o comando abaixo:</text:p>
      <text:p text:style-name="P10"/>
      <text:p text:style-name="P10"/>
      <text:p text:style-name="P10">go mod init GitHubAlves150/cannacare-app-V2/cannacare</text:p>
      <text:p text:style-name="P10"/>
      <text:p text:style-name="P10">O que isso fez? Ele criou um arquivo chamado <text:span text:style-name="Source_20_Text">go.mod</text:span>. Pense nele como o diário de bordo do Go. É ali que o Go vai anotar todas as bibliotecas e versões que instalarmos daqui para frente (como o framework Gin).</text:p>
      <text:p text:style-name="P10"/>
      <text:h text:style-name="P20" text:outline-level="3">🚦 Momento de Verificação</text:h>
      <text:p text:style-name="P13">Antes de avançarmos para escrever o código em Go que conecta nesse banco, precisamos ter certeza de que o Docker funcionou.</text:p>
      <text:p text:style-name="P13">Execute este comando no seu terminal:</text:p>
      <text:p text:style-name="P25"><text:span text:style-name="Source_20_Text"><text:span text:style-name="T6">docker ps</text:span></text:span></text:p>
      <text:p text:style-name="P13">Você deverá ver uma linha na tabela mostrando o container <text:span text:style-name="Source_20_Text">cannacare_postgres</text:span> com o status <text:span text:style-name="Source_20_Text">Up</text:span> (Ativo/Rodando).</text:p>
      <text:p text:style-name="P13">Deu tudo certo até aqui? O container apareceu como ativo? Assim que me confirmar, passaremos para a criação das primeiras pastas e o código em Go para testar a conexão com o banco!</text:p>
      <text:p text:style-name="P10"/>
      <text:p text:style-name="P13"><text:bookmark text:name="p-rc_70cf0107718608c0-167"/><text:span text:style-name="T4">Agora vamos dar o nosso segundo passo prático: criar o código em Go que lê o arquivo </text:span><text:span text:style-name="Source_20_Text"><text:span text:style-name="T4">.env</text:span></text:span><text:span text:style-name="T4"> e abre as portas de comunicação com o PostgreSQL. </text:span></text:p>
      <text:p text:style-name="P23">Como estamos indo com calma, vamos dividir essa etapa em 3 partes:</text:p>
      <text:list text:style-name="L4">
        <text:list-item>
          <text:p text:style-name="P26"><text:bookmark text:name="p-rc_70cf0107718608c0-168"/>Baixar as bibliotecas que o Go vai precisar. </text:p>
        </text:list-item>
        <text:list-item>
          <text:p text:style-name="P26"><text:bookmark text:name="p-rc_70cf0107718608c0-169"/>Criar as pastas e os arquivos de configuração. </text:p>
        </text:list-item>
        <text:list-item>
          <text:p text:style-name="P27"><text:bookmark text:name="p-rc_70cf0107718608c0-170"/><text:span text:style-name="T4">Criar o arquivo principal (</text:span><text:span text:style-name="Source_20_Text"><text:span text:style-name="T4">main.go</text:span></text:span><text:span text:style-name="T4">) para testar se tudo liga perfeitamente. </text:span></text:p>
        </text:list-item>
      </text:list>
      <text:h text:style-name="P28" text:outline-level="3">Passo 1: Baixando as dependências</text:h>
      <text:p text:style-name="P22"><text:bookmark text:name="p-rc_70cf0107718608c0-171"/><text:span text:style-name="T4">O Go vem com muitas ferramentas nativas, mas para ler arquivos </text:span><text:span text:style-name="Source_20_Text"><text:span text:style-name="T4">.env</text:span></text:span><text:span text:style-name="T4"> e conectar ao Postgres de forma mais prática, usamos duas bibliotecas muito famosas no mercado: </text:span></text:p>
      <text:list text:style-name="L5">
        <text:list-item>
          <text:p text:style-name="P29"><text:bookmark text:name="p-rc_70cf0107718608c0-172"/><text:span text:style-name="Source_20_Text"><text:span text:style-name="T4">godotenv</text:span></text:span><text:span text:style-name="T4">: Serve para ler nosso arquivo </text:span><text:span text:style-name="Source_20_Text"><text:span text:style-name="T4">.env</text:span></text:span><text:span text:style-name="T4">. </text:span></text:p>
        </text:list-item>
        <text:list-item>
          <text:p text:style-name="P29"><text:bookmark text:name="p-rc_70cf0107718608c0-173"/><text:span text:style-name="Source_20_Text"><text:span text:style-name="T4">lib/pq</text:span></text:span><text:span text:style-name="T4">: É o "driver" que ensina o Go a falar o idioma do PostgreSQL. </text:span></text:p>
        </text:list-item>
      </text:list>
      <text:p text:style-name="P23">Copie e cole este comando no seu terminal para baixá-las:</text:p>
      <text:p text:style-name="P30">go get github.com/joho/godotenv</text:p>
      <text:p text:style-name="P30">go get github.com/lib/pq</text:p>
      <text:p text:style-name="P30"/>
      <text:h text:style-name="P31" text:outline-level="3">Passo 2: Criando a estrutura de pastas e arquivos de conexão</text:h>
      <text:p text:style-name="P32"><text:bookmark text:name="p-rc_70cf0107718608c0-174"/><text:span text:style-name="T7">Agora vamos usar o comando </text:span><text:span text:style-name="Source_20_Text"><text:span text:style-name="T7">mkdir -p</text:span></text:span><text:span text:style-name="T7"> para criar as pastas da nossa arquitetura e, em seguida, criaremos dois arquivos cruciais: </text:span></text:p>
      <text:list text:style-name="L6">
        <text:list-item>
          <text:p text:style-name="P33"><text:bookmark text:name="p-rc_70cf0107718608c0-175"/><text:span text:style-name="Source_20_Text"><text:span text:style-name="T7">config.go</text:span></text:span><text:span text:style-name="T7">: Vai ler o </text:span><text:span text:style-name="Source_20_Text"><text:span text:style-name="T7">.env</text:span></text:span><text:span text:style-name="T7"> e preparar os dados. </text:span></text:p>
        </text:list-item>
        <text:list-item>
          <text:p text:style-name="P33"><text:soft-page-break/><text:span text:style-name="Source_20_Text"><text:span text:style-name="T7">postgres.go</text:span></text:span><text:span text:style-name="T7">: Vai pegar esses dados e tentar se conectar com o banco do Docker. </text:span></text:p>
        </text:list-item>
      </text:list>
      <text:p text:style-name="P34">Execute o bloco abaixo no seu terminal:</text:p>
      <text:p text:style-name="P35">Ver o código na pasta “cpodigos baixados do Gemini” gemini-code-1782824583498.sh</text:p>
      <text:p text:style-name="P35"/>
      <text:p text:style-name="P35"/>
      <text:h text:style-name="P36" text:outline-level="3"><text:span text:style-name="T8">Passo 3: Criando o ponto de partida do sistema (</text:span><text:span text:style-name="Source_20_Text"><text:span text:style-name="T7">main.go</text:span></text:span><text:span text:style-name="T8">)</text:span></text:h>
      <text:p text:style-name="P37"><text:bookmark text:name="p-rc_70cf0107718608c0-177"/><text:span text:style-name="T7">Por fim, vamos criar a pasta </text:span><text:span text:style-name="Source_20_Text"><text:span text:style-name="T7">cmd/api</text:span></text:span><text:span text:style-name="T7"> e o arquivo </text:span><text:span text:style-name="Source_20_Text"><text:span text:style-name="T7">main.go</text:span></text:span><text:span text:style-name="T7">. Ele será o responsável por juntar todas essas peças quando dermos o comando para rodar o software. </text:span></text:p>
      <text:p text:style-name="P38">Execute este último bloco:</text:p>
      <text:p text:style-name="P39">Ver o código na pasta “cpodigos baixados do Gemini” gemini-code-1782824739574.sh</text:p>
      <text:p text:style-name="P39"/>
      <text:h text:style-name="P40" text:outline-level="3">🚦 <text:span text:style-name="T9">Hora do Teste!</text:span></text:h>
      <text:p text:style-name="P38"><text:bookmark text:name="p-rc_70cf0107718608c0-178"/>Agora vamos testar se o Go consegue ler as configurações e dar o "aperto de mão" com o banco de dados que está no Docker. Execute o comando abaixo no seu terminal: </text:p>
      <text:p text:style-name="P41">go run ./cmd/api</text:p>
      <text:p text:style-name="P41"/>
      <text:p text:style-name="P42">🧭 O Próximo Passo: Criando o "Coração" do SaaS (<text:span text:style-name="Source_20_Text">Associations</text:span>)</text:p>
      <text:p text:style-name="P42"/>
      <text:p text:style-name="P43"><text:bookmark text:name="p-rc_f600e6e2e7434daa-208"/>Como o Cannacare V2 é um software para ser alugado para várias associações (modelo SaaS Multi-Tenant) , o primeiro conceito de negócio que precisamos ensinar ao nosso banco de dados e ao Go é o que é uma Associação (o nosso <text:span text:style-name="T5">Tenant</text:span>). </text:p>
      <text:p text:style-name="P44"><text:bookmark text:name="p-rc_f600e6e2e7434daa-209"/>Afinal, para cadastrar usuários, secretárias, médicos ou pacientes, todos eles precisam pertencer a uma Associação contratante. </text:p>
      <text:p text:style-name="P44"><text:bookmark text:name="p-rc_f600e6e2e7434daa-210"/>Seguindo o nosso plano de ir com paciência e explicação detalhada, vamos focar em criar a nossa primeira Migration SQL. </text:p>
      <text:h text:style-name="P45" text:outline-level="3">🛠️ O que é uma Migration?</text:h>
      <text:p text:style-name="P46">Em vez de abrirmos uma ferramenta visual e criarmos tabelas clicando com o mouse, na programação profissional nós usamos arquivos de texto com comandos SQL, chamados Migrations. Elas servem como um "histórico de evolução" do banco de dados. Se amanhã você levar seu código para outro computador, o sistema lê as migrations e cria o banco idêntico em segundos.</text:p>
      <text:p text:style-name="P46"/>
      <text:p text:style-name="P42">📝 Vamos planejar a tabela <text:span text:style-name="Source_20_Text">associations</text:span></text:p>
      <text:p text:style-name="P42"><text:span text:style-name="Source_20_Text"/></text:p>
      <text:p text:style-name="P47"><text:span text:style-name="Source_20_Text"><text:span text:style-name="T4">Baseado nas regras de negócio que mapeamos, cada associação cliente do seu software precisará de:</text:span></text:span></text:p>
      <text:list text:style-name="L7">
        <text:list-item>
          <text:p text:style-name="P48"><text:span text:style-name="T4">ID: Um identificador único (usaremos </text:span><text:span text:style-name="Source_20_Text"><text:span text:style-name="T4">UUID</text:span></text:span><text:span text:style-name="T4">, que gera uma chave única universal, impossível de duplicar, muito mais seguro que números sequenciais </text:span><text:span text:style-name="Source_20_Text"><text:span text:style-name="T4">1, 2, 3...</text:span></text:span><text:span text:style-name="T4"> para SaaS).</text:span></text:p>
        </text:list-item>
        <text:list-item>
          <text:p text:style-name="P49">Name: Nome da associação.</text:p>
        </text:list-item>
        <text:list-item>
          <text:p text:style-name="P49">CNPJ: O documento oficial da instituição.</text:p>
        </text:list-item>
        <text:list-item>
          <text:p text:style-name="P48"><text:bookmark text:name="p-rc_f600e6e2e7434daa-211"/><text:span text:style-name="T4">Status: Para sabermos se o plano anual dela está </text:span><text:span text:style-name="Source_20_Text"><text:span text:style-name="T4">active</text:span></text:span><text:span text:style-name="T4"> (ativo), </text:span><text:span text:style-name="Source_20_Text"><text:span text:style-name="T4">pending</text:span></text:span><text:span text:style-name="T4"> (pendente) ou </text:span><text:span text:style-name="Source_20_Text"><text:span text:style-name="T4">suspended</text:span></text:span><text:span text:style-name="T4"> (suspenso). </text:span></text:p>
        </text:list-item>
        <text:list-item>
          <text:p text:style-name="P48"><text:span text:style-name="T4">Timestamps: Campos para registrar quando ela foi criada ou atualizada (</text:span><text:span text:style-name="Source_20_Text"><text:span text:style-name="T4">created_at</text:span></text:span><text:span text:style-name="T4">, </text:span><text:span text:style-name="Source_20_Text"><text:span text:style-name="T4">updated_at</text:span></text:span><text:span text:style-name="T4">).</text:span></text:p>
        </text:list-item>
      </text:list>
      <text:p text:style-name="P42"><text:span text:style-name="Source_20_Text"/></text:p>
      <text:p text:style-name="P42"><text:span text:style-name="Source_20_Text"/></text:p>
      <text:h text:style-name="P50" text:outline-level="2"><text:span text:style-name="Source_20_Text"><text:span text:style-name="T2">📅 </text:span></text:span><text:span text:style-name="Source_20_Text"><text:span text:style-name="T9">Linha do Tempo Estimada para o Teste Piloto</text:span></text:span></text:h>
      <text:p text:style-name="P44"><text:bookmark text:name="p-rc_c9417c7ea7fda112-218"/>Aqui está uma divisão realista de como o software vai ganhando corpo semana a semana: </text:p>
      <text:p text:style-name="P51"><text:span text:style-name="Source_20_Text"><text:span text:style-name="T4">[Semana 1: Fundação &amp; Usuários] ──&gt; [Semana 2: Módulo Paciente] ──&gt; [Semana 3: Receitas &amp; Estoque] ──&gt; [Semana 4-5: Frontend Next.js] ──&gt; [Semana 6: Teste Real]</text:span></text:span></text:p>
      <text:list text:style-name="L8">
        <text:list-item>
          <text:p text:style-name="P52"><text:bookmark text:name="p-rc_c9417c7ea7fda112-219"/><text:soft-page-break/>Semanas 1 e 2 (Fundação, Usuários e Pacientes): Criamos a estrutura que você acabou de validar, o fluxo de login seguro e a tela de cadastro do paciente com o upload de documentos. </text:p>
        </text:list-item>
        <text:list-item>
          <text:p text:style-name="P52"><text:bookmark text:name="p-rc_c9417c7ea7fda112-220"/>Semana 3 (Receitas, Pedidos e Estoque): Implementamos as regras do seu PDF: alertas de vencimento de receita e a baixa automática dos óleos de CBD no estoque quando um pedido for aprovado. </text:p>
        </text:list-item>
        <text:list-item>
          <text:p text:style-name="P52"><text:bookmark text:name="p-rc_c9417c7ea7fda112-221"/>Semanas 4 e 5 (Interface Web em Next.js): Construímos as telas visuais (formulários, tabelas e painéis) interligadas com esse backend em Go que estamos fazendo. </text:p>
        </text:list-item>
        <text:list-item>
          <text:p text:style-name="P52"><text:bookmark text:name="p-rc_c9417c7ea7fda112-222"/>Semana 6 (Homologação e Teste Piloto): Colocamos o sistema para rodar em um servidor de testes na nuvem para você ou um parceiro de uma associação simular o uso real de ponta a ponta. </text:p>
        </text:list-item>
      </text:list>
      <text:p text:style-name="P44"><text:bookmark text:name="p-rc_c9417c7ea7fda112-223"/>O segredo para cumprir esse prazo é não tentar fazer tudo de uma vez. Focaremos no fluxo principal do seu documento: o paciente entra, anexa os documentos, a receita é validada, o pedido é feito e o estoque sofre a baixa. Os relatórios avançados e gráficos complexos nós deixamos para logo após o primeiro teste piloto.</text:p>
      <text:p text:style-name="P42"><text:span text:style-name="Source_20_Text"/></text:p>
      <text:p text:style-name="P42"><text:span text:style-name="Source_20_Text"/></text:p>
      <text:p text:style-name="P42"><text:span text:style-name="Source_20_Text"/></text:p>
      <text:h text:style-name="P50" text:outline-level="2"><text:span text:style-name="Source_20_Text"><text:span text:style-name="T2">🛠️ Passo Prático: Criando a Tabela de Associações (</text:span></text:span><text:span text:style-name="Source_20_Text">0001_create_associations.sql</text:span><text:span text:style-name="Source_20_Text"><text:span text:style-name="T2">)</text:span></text:span></text:h>
      <text:p text:style-name="P46">Agora que alinhamos as expectativas de tempo, vamos voltar para o código. Vamos criar a pasta onde ficarão guardadas as nossas tabelas e estruturar o arquivo SQL da tabela <text:span text:style-name="Source_20_Text">associations</text:span> (os nossos inquilinos ou <text:span text:style-name="T5">tenants</text:span>).</text:p>
      <text:p text:style-name="P46">Execute os seguintes comandos no seu terminal:</text:p>
      <text:p text:style-name="P42"><text:span text:style-name="Source_20_Text"/></text:p>
      <text:p text:style-name="P42"><text:span text:style-name="Source_20_Text"/></text:p>
      <text:p text:style-name="P42"><text:span text:style-name="Source_20_Text"><text:span text:style-name="T6">gemini-code-1782826004359.sh</text:span></text:span></text:p>
      <text:p text:style-name="P42"><text:span text:style-name="Source_20_Text"/></text:p>
      <text:p text:style-name="P42"><text:span text:style-name="Source_20_Text"/></text:p>
      <text:p text:style-name="P42"><text:span text:style-name="Source_20_Text"><text:span text:style-name="T10"/></text:span></text:p>
      <text:p text:style-name="P42"><text:span text:style-name="Source_20_Text"/></text:p>
      <text:p text:style-name="P53"><text:span text:style-name="Source_20_Text"/></text:p>
      <text:h text:style-name="P45" text:outline-level="3">🧠 Entendendo o código SQL que você acabou de criar:</text:h>
      <text:list text:style-name="L9">
        <text:list-item>
          <text:p text:style-name="P54"><text:span text:style-name="Source_20_Text">UUID PRIMARY KEY DEFAULT gen_random_uuid()</text:span>: Em vez de usar IDs como <text:span text:style-name="Source_20_Text">1, 2, 3</text:span>, o banco vai gerar automaticamente um identificador único universal com letras e números (ex: <text:span text:style-name="Source_20_Text">f47ac10b-58cc-4372-a567-0e02b2c3d479</text:span>). Isso impede que uma associação tente adivinhar o ID de outra mudando o número na URL do navegador.</text:p>
        </text:list-item>
        <text:list-item>
          <text:p text:style-name="P54"><text:span text:style-name="Source_20_Text">TIMESTAMP WITH TIME ZONE</text:span>: Garante que as datas de criação guardem também o fuso horário correto, evitando confusão com horários de auditoria.</text:p>
        </text:list-item>
      </text:list>
      <text:p text:style-name="P46">O arquivo está criado na sua máquina! No próximo passo, vamos criar a camada de Domínio no Go (<text:span text:style-name="Source_20_Text">internal/domain/association</text:span>), onde explicaremos ao Go como ler e manipular esses dados da Associação.</text:p>
      <text:p text:style-name="P42"/>
      <text:p text:style-name="P42"><text:span text:style-name="Source_20_Text"/></text:p>
      <text:p text:style-name="P42"><text:span text:style-name="Source_20_Text"/></text:p>
      <text:h text:style-name="P45" text:outline-level="3"><text:span text:style-name="Source_20_Text"><text:span text:style-name="T2">🧠 </text:span></text:span><text:span text:style-name="Source_20_Text"><text:span text:style-name="T9">O que é a Camada de Domínio?</text:span></text:span></text:h>
      <text:p text:style-name="P44"><text:bookmark text:name="p-rc_35ced1a10b36f1d3-91"/>Na arquitetura limpa, o Domínio é o "coração" do sistema. É aqui que definimos as regras puras de negócio em Go. Essa camada não sabe o que é um banco de dados, não sabe o que é uma rota HTTP e não depende de nenhuma biblioteca externa. Ela apenas descreve os dados do nosso negócio e as validações mais importantes. </text:p>
      <text:p text:style-name="P44">Para o módulo de Associações, precisamos de dois arquivos dentro desta camada:</text:p>
      <text:list text:style-name="L10">
        <text:list-item>
          <text:p text:style-name="P55"><text:span text:style-name="Source_20_Text"><text:span text:style-name="T4">entity.go</text:span></text:span><text:span text:style-name="T4"> (Entidade): Define a estrutura de dados da Associação (os campos) e como criar uma nova associação validando as regras (como não permitir nome vazio).</text:span></text:p>
        </text:list-item>
        <text:list-item>
          <text:p text:style-name="P55"><text:bookmark text:name="p-rc_35ced1a10b36f1d3-92"/><text:span text:style-name="Source_20_Text"><text:span text:style-name="T4">repository.go</text:span></text:span><text:span text:style-name="T4"> (Repositório): É uma Interface. Em Go, uma interface não escreve o código de salvar no banco; ela apenas dita o "contrato", ou seja, avisa quais funções o banco de dados </text:span><text:span text:style-name="T11">precisa</text:span><text:span text:style-name="T4"> ter (ex: Criar, Buscar por ID). </text:span></text:p>
        </text:list-item>
      </text:list>
      <text:h text:style-name="P45" text:outline-level="3"><text:soft-page-break/><text:span text:style-name="Source_20_Text"><text:span text:style-name="T2">🛠️ Passo Prático: Criando o Domínio de Associações</text:span></text:span></text:h>
      <text:p text:style-name="P46">Execute o comando abaixo no seu terminal para criar a pasta correspondente e gerar os arquivos do domínio:</text:p>
      <text:p text:style-name="P42"><text:span text:style-name="Source_20_Text"/></text:p>
      <text:p text:style-name="P42"><text:span text:style-name="Source_20_Text"/></text:p>
      <text:p text:style-name="P42"><text:span text:style-name="Source_20_Text"><text:span text:style-name="T6">gemini-code-1782830948323.sh</text:span></text:span></text:p>
      <text:p text:style-name="P42"><text:span text:style-name="Source_20_Text"/></text:p>
      <text:p text:style-name="P42"><text:span text:style-name="Source_20_Text"/></text:p>
      <text:h text:style-name="P45" text:outline-level="3"><text:span text:style-name="Source_20_Text"><text:span text:style-name="T2">🔍 Analisando o Código Go</text:span></text:span></text:h>
      <text:p text:style-name="P46">Note como a função <text:span text:style-name="Source_20_Text">NewAssociation</text:span> protege o seu sistema: se a tela do frontend tentar enviar um cadastro sem nome ou sem CNPJ, o Go barra a operação ali mesmo e devolve um erro, antes mesmo de gastar processamento ou tocar no banco de dados.</text:p>
      <text:p text:style-name="P56"><text:bookmark text:name="p-rc_35ced1a10b36f1d3-93"/>O coração do módulo de associações está desenhado. O nosso próximo passo lógico será criar a camada de Infraestrutura, implementando o código SQL que vai fazer o Go salvar essa estrutura dentro da tabela do PostgreSQL que planejamos na migration.</text:p>
      <text:p text:style-name="P42"><text:span text:style-name="Source_20_Text"/></text:p>
      <text:p text:style-name="P47"><text:span text:style-name="Source_20_Text"><text:span text:style-name="T2">Vamos criar agora a camada que conecta o Domínio (regras puras) ao mundo real do banco de dados PostgreSQL. Essa subcamada dentro de </text:span></text:span><text:span text:style-name="Source_20_Text">infrastructure</text:span><text:span text:style-name="Source_20_Text"><text:span text:style-name="T2"> é chamada de Repositório de Infraestrutura.</text:span></text:span></text:p>
      <text:p text:style-name="P46">Em Go, para que uma estrutura de banco cumpra o contrato da <text:span text:style-name="Source_20_Text">interface Repository</text:span> que criamos no arquivo anterior, ela precisa ter os mesmos métodos com as mesmas assinaturas (<text:span text:style-name="Source_20_Text">Create</text:span>, <text:span text:style-name="Source_20_Text">FindByID</text:span>, <text:span text:style-name="Source_20_Text">FindByCNPJ</text:span>).</text:p>
      <text:h text:style-name="P57" text:outline-level="3">🛠️ Passo Prático: Criando o Repositório Postgres</text:h>
      <text:p text:style-name="P46">Execute o comando abaixo no terminal para criar a pasta de repositórios e gerar o arquivo de persistência das associações:</text:p>
      <text:p text:style-name="P42"><text:span text:style-name="Source_20_Text"/></text:p>
      <text:p text:style-name="P42"><text:span text:style-name="Source_20_Text"><text:span text:style-name="T6">gemini-code-1782831450505.sh</text:span></text:span></text:p>
      <text:p text:style-name="P42"><text:span text:style-name="Source_20_Text"><text:span text:style-name="T6"/></text:span></text:p>
      <text:p text:style-name="P42"><text:span text:style-name="Source_20_Text"><text:span text:style-name="T6"/></text:span></text:p>
      <text:h text:style-name="P58" text:outline-level="3"><text:span text:style-name="Source_20_Text"><text:span text:style-name="T2">🧠 Entendendo o código e o uso do SQL</text:span></text:span></text:h>
      <text:p text:style-name="P46">Repare que usamos <text:span text:style-name="Source_20_Text">$1</text:span>, <text:span text:style-name="Source_20_Text">$2</text:span>, <text:span text:style-name="Source_20_Text">$3</text:span> nas strings de consulta em vez de concatenar os textos diretamente. Na linguagem Go (e no PostgreSQL), isso é chamado de Prepared Statements. Fazer isso protege o seu SaaS contra um dos ataques de hackers mais perigosos da internet: o <text:span text:style-name="T5">SQL Injection</text:span> (quando alguém injeta comandos maliciosos em um campo de texto para tentar roubar ou apagar o banco de dados).</text:p>
      <text:p text:style-name="P46">O repositório está pronto. O próximo passo lógico é criar a camada de Aplicação / Casos de Uso (<text:span text:style-name="Source_20_Text">usecase</text:span>), onde escreveremos a regra de negócio que une o Domínio ao Repositório (ex: "Para criar uma associação, primeiro verifique se o CNPJ já existe; se não existir, salve").</text:p>
      <text:p text:style-name="P59"><text:span text:style-name="Source_20_Text"><text:span text:style-name="T12"/></text:span></text:p>
      <text:p text:style-name="P59"><text:span text:style-name="Source_20_Text"><text:span text:style-name="T12"/></text:span></text:p>
      <text:p text:style-name="P60"><text:span text:style-name="Source_20_Text"><text:span text:style-name="T4">Excelente! Agora que temos as regras no Domínio e a persistência na Infraestrutura, vamos criar a camada de Aplicação. É aqui que ficam os chamados Casos de Uso (</text:span></text:span><text:span text:style-name="Source_20_Text"><text:span text:style-name="T11">Use Cases</text:span></text:span><text:span text:style-name="Source_20_Text"><text:span text:style-name="T4">).</text:span></text:span></text:p>
      <text:p text:style-name="P44"><text:bookmark text:name="p-rc_9138302d2c0893ec-107"/>O Caso de Uso representa uma ação específica que o usuário pode fazer no sistema. No nosso caso, a ação é: Cadastrar uma Nova Associação.</text:p>
      <text:p text:style-name="P59"><text:span text:style-name="Source_20_Text"><text:span text:style-name="T12"/></text:span></text:p>
      <text:p text:style-name="P59"><text:span text:style-name="Source_20_Text"><text:span text:style-name="T12"/></text:span></text:p>
      <text:h text:style-name="P58" text:outline-level="3"><text:span text:style-name="Source_20_Text"><text:span text:style-name="T2">🧠 </text:span></text:span><text:span text:style-name="Source_20_Text"><text:span text:style-name="T9">A Lógica do Caso de Uso</text:span></text:span></text:h>
      <text:p text:style-name="P44"><text:bookmark text:name="p-rc_9138302d2c0893ec-108"/>Um Caso de Uso funciona como um gerente de operações. Ele dita o passo a passo que o sistema deve seguir quando alguém clica no botão "Cadastrar" no frontend: </text:p>
      <text:list text:style-name="L11">
        <text:list-item>
          <text:p text:style-name="P61"><text:bookmark text:name="p-rc_9138302d2c0893ec-109"/>Recebe os dados da tela (Nome e CNPJ). </text:p>
        </text:list-item>
        <text:list-item>
          <text:p text:style-name="P61"><text:bookmark text:name="p-rc_9138302d2c0893ec-110"/>Consulta o Repositório para ver se esse CNPJ já existe no banco. </text:p>
        </text:list-item>
        <text:list-item>
          <text:p text:style-name="P61"><text:bookmark text:name="p-rc_9138302d2c0893ec-111"/>Se o CNPJ já existir, ele barra a operação e joga um erro na tela. </text:p>
        </text:list-item>
        <text:list-item>
          <text:p text:style-name="P61"><text:bookmark text:name="p-rc_9138302d2c0893ec-112"/>Se estiver tudo limpo, ele cria a Entidade (ativando as validações que fizemos no Domínio). </text:p>
        </text:list-item>
        <text:list-item>
          <text:p text:style-name="P61"><text:bookmark text:name="p-rc_9138302d2c0893ec-113"/><text:soft-page-break/>Por fim, manda o Repositório salvar no PostgreSQL. </text:p>
        </text:list-item>
      </text:list>
      <text:p text:style-name="P44">Para entender como essa fiação se conecta entre as camadas, veja como o fluxo de dados atravessa a nossa estrutura:</text:p>
      <text:h text:style-name="P62" text:outline-level="3">🛠️ <text:span text:style-name="T9">Passo Prático: Criando o Caso de Uso de Associação</text:span></text:h>
      <text:p text:style-name="P44">Execute o comando abaixo no terminal para criar a estrutura do caso de uso:</text:p>
      <text:p text:style-name="P59"><text:span text:style-name="Source_20_Text"><text:span text:style-name="T6">gemini-code-1782831722182.sh</text:span></text:span></text:p>
      <text:p text:style-name="P59"><text:span text:style-name="Source_20_Text"><text:span text:style-name="T6"/></text:span></text:p>
      <text:p text:style-name="P59"><text:span text:style-name="Source_20_Text"><text:span text:style-name="T12"/></text:span></text:p>
      <text:h text:style-name="P58" text:outline-level="3">🔍 O que aprendemos aqui sobre Go?</text:h>
      <text:section text:style-name="Sect1" text:name="model-response-message-contentr_df59fa93a2c621f5">
        <text:p text:style-name="P63"><text:bookmark text:name="p-rc_9138302d2c0893ec-114"/>Repare na linha: <text:span text:style-name="Source_20_Text">repo association.Repository</text:span>. O nosso caso de uso não pede um <text:span text:style-name="Source_20_Text">AssociationRepositoryPostgres</text:span> (o banco físico). Ele pede a Interface do domínio.</text:p>
        <text:p text:style-name="P64">TXT</text:p>
        <text:p text:style-name="P63"><text:bookmark text:name="p-rc_9138302d2c0893ec-115"/>Isso é o que chamamos de Inversão de Dependência. Significa que se amanhã você quiser trocar o PostgreSQL por outro banco de dados, o código desse arquivo <text:span text:style-name="Source_20_Text">create_association.go</text:span> não precisará mudar nem uma única linha, pois ele só depende do contrato da interface.</text:p>
        <text:p text:style-name="P64">TXT+ 1</text:p>
        <text:p text:style-name="P63"><text:bookmark text:name="p-rc_9138302d2c0893ec-116"/>O esqueleto de negócios das associações está completo! O próximo passo será criar a Camada de Interface HTTP usando o framework Gin para expor uma rota real (ex: <text:span text:style-name="Source_20_Text">POST /associations</text:span>) e testarmos o cadastro enviando um JSON.</text:p>
        <text:p text:style-name="P64">TXT+ 1</text:p>
        <text:p text:style-name="P46">Podemos avançar para criar o Handler e a Rota no Gin? Mande o comando!</text:p>
      </text:section>
      <text:p text:style-name="P59"><text:span text:style-name="Source_20_Text"><text:span text:style-name="T12"/></text:span></text:p>
      <text:p text:style-name="P60"><text:span text:style-name="Source_20_Text"><text:span text:style-name="T2">Agora vamos criar a última camada do módulo de Associações: as Interfaces HTTP. É aqui que o framework Gin entra em ação.</text:span></text:span></text:p>
      <text:p text:style-name="P46">Essa camada funciona como a portaria do nosso prédio: ela recebe o pacote (a requisição HTTP com o JSON enviado pelo Frontend), abre o pacote, passa os dados para o nosso gerente (o Caso de Uso) e devolve a resposta de sucesso ou erro de volta para o cliente.</text:p>
      <text:p text:style-name="P46">Para o Go entender o framework Gin nas importações que faremos, execute primeiro este comando no seu terminal para baixar a biblioteca do Gin:</text:p>
      <text:p text:style-name="P59"><text:span text:style-name="Source_20_Text"><text:span text:style-name="T6">go get github.com/gin-gonic/gin</text:span></text:span></text:p>
      <text:p text:style-name="P59"><text:span text:style-name="Source_20_Text"><text:span text:style-name="T6"/></text:span></text:p>
      <text:p text:style-name="P65"><text:span text:style-name="Source_20_Text"/></text:p>
      <text:p text:style-name="P65"><text:span text:style-name="Source_20_Text"/></text:p>
      <text:p text:style-name="P66"><text:span text:style-name="Source_20_Text"><text:span text:style-name="T2">Agora, vamos criar duas subpastas: uma para o Handler (o controlador da lógica da rota) e outra para a Route (onde desenhamos o caminho da URL).</text:span></text:span></text:p>
      <text:h text:style-name="P57" text:outline-level="3">🛠️ Passo Prático: Criando Handler e Rotas de Associação</text:h>
      <text:p text:style-name="P46">Execute o bloco abaixo no seu terminal:</text:p>
      <text:p text:style-name="P65"><text:span text:style-name="Source_20_Text"><text:span text:style-name="T6">gemini-code-1782832055121.sh</text:span></text:span></text:p>
      <text:p text:style-name="P65"><text:span text:style-name="Source_20_Text"><text:span text:style-name="T6"/></text:span></text:p>
      <text:p text:style-name="P65"><text:span text:style-name="Source_20_Text"><text:span text:style-name="T12"/></text:span></text:p>
      <text:h text:style-name="P67" text:outline-level="3"><text:span text:style-name="Source_20_Text"><text:span text:style-name="T2">🧠 Entendendo o fluxo no Go</text:span></text:span></text:h>
      <text:p text:style-name="P46">Agora toda a lógica de uma Associação está completa. Para que você consiga visualizar o que acabamos de construir, o fluxo de dados no backend funciona assim:</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oft-page-break/><text:span text:style-name="Source_20_Text"><text:span text:style-name="T12"/></text:span></text:p>
      <text:p text:style-name="P69"><text:span text:style-name="Source_20_Text"><text:span text:style-name="T13">[Requisição HTTP POST]</text:span></text:span></text:p>
      <text:p text:style-name="P69"><text:span text:style-name="Source_20_Text"><text:span text:style-name="T13"><text:s/>──&gt;</text:span></text:span></text:p>
      <text:p text:style-name="P69"><text:span text:style-name="Source_20_Text"><text:span text:style-name="T13">association_routes.go</text:span></text:span></text:p>
      <text:p text:style-name="P69"><text:span text:style-name="Source_20_Text"><text:span text:style-name="T13"><text:s/>──&gt;</text:span></text:span></text:p>
      <text:p text:style-name="P69"><text:span text:style-name="Source_20_Text"><text:span text:style-name="T13">association_handler.go</text:span></text:span></text:p>
      <text:p text:style-name="P69"><text:span text:style-name="Source_20_Text"><text:span text:style-name="T13"><text:s/>──&gt;</text:span></text:span></text:p>
      <text:p text:style-name="P69"><text:span text:style-name="Source_20_Text"><text:span text:style-name="T13">create_association.go (UseCase)</text:span></text:span></text:p>
      <text:p text:style-name="P69"><text:span text:style-name="Source_20_Text"><text:span text:style-name="T13"><text:s/>──&gt;</text:span></text:span></text:p>
      <text:p text:style-name="P69"><text:span text:style-name="Source_20_Text"><text:span text:style-name="T13">association_repository_postgres.go</text:span></text:span></text:p>
      <text:p text:style-name="P69"><text:span text:style-name="Source_20_Text"><text:span text:style-name="T13">──&gt; </text:span></text:span></text:p>
      <text:p text:style-name="P69"><text:span text:style-name="Source_20_Text"><text:span text:style-name="T13">[Banco PostgreSQL]</text:span></text:span></text:p>
      <text:p text:style-name="Text_20_body"/>
      <text:p text:style-name="Text_20_body"><text:span text:style-name="T14">O nosso próximo passo será fazer a fiação (</text:span><text:span text:style-name="T15">dependency injection</text:span><text:span text:style-name="T14">) de tudo isso dentro do arquivo </text:span><text:span text:style-name="Source_20_Text"><text:span text:style-name="T14">cmd/api/main.go</text:span></text:span><text:span text:style-name="T14">. Nós vamos instanciar o repositório, o caso de uso, o handler, ligar o roteador do Gin e colocar o servidor para escutar requisições de verdade na porta </text:span><text:span text:style-name="Source_20_Text"><text:span text:style-name="T14">8080</text:span></text:span><text:span text:style-name="T14">!</text:span></text:p>
      <text:p text:style-name="P13"/>
      <text:h text:style-name="P12" text:outline-level="2">🛠️ Passo Prático: Atualizando o <text:span text:style-name="Source_20_Text">main.go</text:span> com o Novo Roteador</text:h>
      <text:p text:style-name="P13">Vamos abrir o arquivo principal do sistema e conectar o banco de dados ao repositório, o repositório ao caso de uso, o caso de uso ao handler e, finalmente, injetar as rotas no Gin. Isso se chama Injeção de Dependências.</text:p>
      <text:p text:style-name="P13">Execute o comando abaixo no seu terminal para reescrever o seu <text:span text:style-name="Source_20_Text">main.go</text:span> com a estrutura completa:</text:p>
      <text:p text:style-name="P70">gemini-code-1782832409558.sh</text:p>
      <text:p text:style-name="P70"/>
      <text:h text:style-name="P71" text:outline-level="2">🏎️ Hora de Testar a Rota Criada!</text:h>
      <text:p text:style-name="P72">Vamos colocar o servidor para rodar e testar o cadastro da primeira associação cliente no banco de dados.</text:p>
      <text:list text:style-name="L12">
        <text:list-item>
          <text:p text:style-name="P73">Garanta que o Docker continue ligado.</text:p>
        </text:list-item>
        <text:list-item>
          <text:p text:style-name="P73">Inicie o servidor Go executando:</text:p>
        </text:list-item>
      </text:list>
      <text:p text:style-name="P72"/>
      <text:p text:style-name="P72"/>
      <text:p text:style-name="P72">go run cmd/api/main.go</text:p>
      <text:p text:style-name="P72"/>
      <text:p text:style-name="P72">Você verá que o Gin vai listar no terminal a nova rota criada: <text:span text:style-name="Source_20_Text">[GIN-debug] POST /associations --&gt; ...</text:span></text:p>
      <text:list text:style-name="L13">
        <text:list-item>
          <text:p text:style-name="P74">Agora, abra outra aba do seu terminal (deixando o servidor rodando na primeira) e envie este comando <text:span text:style-name="Source_20_Text">curl</text:span> para simular uma tela cadastrando uma associação:</text:p>
        </text:list-item>
      </text:list>
      <text:p text:style-name="P72"/>
      <text:p text:style-name="P72"/>
      <text:p text:style-name="P72"/>
      <text:p text:style-name="P72"><text:soft-page-break/>curl -X POST http://localhost:8080/associations \</text:p>
      <text:p text:style-name="P72"><text:s text:c="2"/>-H "Content-Type: application/json" \</text:p>
      <text:p text:style-name="P72">-d '{"name": "Associação Canábica Esperança", "cnpj": "12.345.678/0001-99"}'</text:p>
      <text:p text:style-name="P72"/>
      <text:h text:style-name="P75" text:outline-level="3">🎯 O que deve acontecer:</text:h>
      <text:p text:style-name="P72">O terminal deve te devolver um JSON contendo os dados da associação criados e o ID (UUID) gerado automaticamente pelo PostgreSQL!</text:p>
      <text:p text:style-name="P72"/>
      <text:p text:style-name="P76">O motor e o primeiro módulo de negócios estão oficialmente conectados e salvando informações no PostgreSQL.</text:p>
      <text:p text:style-name="P77"><text:bookmark text:name="p-rc_873c18513bab6d86-128"/><text:span text:style-name="T4">Para encerrar a nossa Semana 1, precisamos construir o sistema de Usuários (</text:span><text:span text:style-name="Source_20_Text"><text:span text:style-name="T4">users</text:span></text:span><text:span text:style-name="T4">). Como este é um software SaaS, todo usuário (seja uma secretária, médico ou administrador) precisa estar obrigatoriamente vinculado a uma das associações cadastradas. Além disso, como lidamos com dados médicos sensíveis, aprenderemos a criptografar a senha antes de salvá-la no banco de dados. </text:span></text:p>
      <text:p text:style-name="P34">Vamos fazer o passo a passo com calma:</text:p>
      <text:p text:style-name="P72"/>
      <text:h text:style-name="P71" text:outline-level="2">🛠️ Passo 1: A Migration dos Usuários</text:h>
      <text:p text:style-name="P72">Vamos criar a tabela de usuários com um vínculo de chave estrangeira (<text:span text:style-name="Source_20_Text">FOREIGN KEY</text:span>) apontando para a tabela <text:span text:style-name="Source_20_Text">associations</text:span>. Desse modo, o banco garante que nenhum usuário exista "solto" no sistema.</text:p>
      <text:p text:style-name="P72">Execute no terminal:</text:p>
      <text:p text:style-name="P72">gemini-code-1782832820655.sh</text:p>
      <text:p text:style-name="P72"/>
      <text:h text:style-name="P71" text:outline-level="2">🔒 Passo 2: Baixando a biblioteca de Criptografia</text:h>
      <text:p text:style-name="P72">No Go, nunca salvamos a senha em texto aberto (como <text:span text:style-name="Source_20_Text">123456</text:span>). Usamos o algoritmo Bcrypt para transformar a senha em um código embaralhado impossível de ser descriptografado de volta.</text:p>
      <text:p text:style-name="P72">Execute no terminal para baixar a biblioteca oficial de criptografia do Go:</text:p>
      <text:p text:style-name="P72"/>
      <text:p text:style-name="P72">go get golang.org/x/crypto/bcrypt</text:p>
      <text:p text:style-name="P72"/>
      <text:h text:style-name="P71" text:outline-level="2">🧠 Passo 3: O Domínio do Usuário (<text:span text:style-name="Source_20_Text">domain/user</text:span>)</text:h>
      <text:p text:style-name="P72">Agora criamos as regras do Usuário no Go e a função que criptografa a senha na hora da criação.</text:p>
      <text:p text:style-name="P72">Execute no seu terminal:</text:p>
      <text:p text:style-name="P72"/>
      <text:p text:style-name="P72">gemini-code-1782832992944.sh</text:p>
      <text:p text:style-name="P72"/>
      <text:p text:style-name="P72"/>
      <text:h text:style-name="P71" text:outline-level="2">🏁 Parabéns, a fundação do módulo está criada!</text:h>
      <text:p text:style-name="P72">Fizemos a estrutura de banco de dados e as regras de negócio puras de segurança do Usuário. Para finalizarmos a Semana 1 por completo, nos faltam apenas o Repositório Postgres e o Caso de Uso de Criação do Usuário para testar o cadastro.</text:p>
      <text:p text:style-name="P72"><text:soft-page-break/>Vamos finalizar o módulo de usuários para fechar com sucesso a nossa Semana 1.</text:p>
      <text:p text:style-name="P72">Neste passo final, vamos criar a persistência no banco de dados e o caso de uso. Como todo usuário precisa pertencer a uma associação, o nosso caso de uso vai garantir essa validação.</text:p>
      <text:p text:style-name="P72">Siga os passos abaixo para gerar os arquivos restantes:</text:p>
      <text:p text:style-name="P72"/>
      <text:h text:style-name="P75" text:outline-level="3">🛠️ Passo 1: O Repositório do Usuário (<text:span text:style-name="Source_20_Text">infrastructure/repository</text:span>)</text:h>
      <text:p text:style-name="P72">Este arquivo implementa os comandos SQL no PostgreSQL para salvar o usuário com a sua senha criptografada e também buscar por e-mail (essencial para o futuro fluxo de login).</text:p>
      <text:p text:style-name="P72">Execute no terminal:</text:p>
      <text:p text:style-name="P72"/>
      <text:p text:style-name="P72">gemini-code-1782833140818.sh</text:p>
      <text:p text:style-name="P72"/>
      <text:h text:style-name="P75" text:outline-level="3">🛠️ Passo 2: O Caso de Uso de Criação de Usuário (<text:span text:style-name="Source_20_Text">usecase</text:span>)</text:h>
      <text:p text:style-name="P72">O caso de uso recebe os dados brutos, verifica se o e-mail já existe e aciona a regra de domínio que criptografa a senha.</text:p>
      <text:p text:style-name="P72">Execute no terminal:</text:p>
      <text:p text:style-name="P72">gemini-code-1782833193217.sh</text:p>
      <text:p text:style-name="P72"/>
      <text:p text:style-name="P72"/>
      <text:h text:style-name="P75" text:outline-level="3">🛠️ Passo 3: Handler HTTP e Rotas do Usuário (<text:span text:style-name="Source_20_Text">interfaces/http</text:span>)</text:h>
      <text:p text:style-name="P72">Vamos expor a rota para cadastrar usuários administradores e colaboradores das associações.</text:p>
      <text:p text:style-name="P72">Execute no terminal:</text:p>
      <text:p text:style-name="P72">gemini-code-1782833232982.sh</text:p>
      <text:p text:style-name="P72"/>
      <text:p text:style-name="P72"/>
      <text:h text:style-name="P75" text:outline-level="3">🪢 Passo 4: Fiação Final no <text:span text:style-name="Source_20_Text">main.go</text:span></text:h>
      <text:p text:style-name="P72">Agora, vamos atualizar o nosso arquivo central para inicializar também o módulo de usuários.</text:p>
      <text:p text:style-name="P72">Execute no terminal:</text:p>
      <text:p text:style-name="P72"/>
      <text:p text:style-name="P72">gemini-code-1782833278952.sh</text:p>
      <text:p text:style-name="P72"/>
      <text:p text:style-name="P78">Antes de testar! Esquecemos de criar as tabelas.</text:p>
      <text:p text:style-name="P78">Abra uma nova aba do terminal e execute este comando para injetar as duas tabelas que planejamos diretamente no PostgreSQL:</text:p>
      <text:p text:style-name="P78"/>
      <text:p text:style-name="P78">gemini-code-1782833870313.sh</text:p>
      <text:p text:style-name="P78"/>
      <text:h text:style-name="P71" text:outline-level="2">🏎️ Teste Prático do Usuário</text:h>
      <text:list text:style-name="L14">
        <text:list-item>
          <text:p text:style-name="P79">Execute o servidor: <text:span text:style-name="T16">go mod tidy </text:span><text:span text:style-name="Source_20_Text">go run cmd/api/main.go</text:span></text:p>
        </text:list-item>
        <text:list-item>
          <text:p text:style-name="P79"><text:soft-page-break/>Em outro terminal, envie um <text:span text:style-name="Source_20_Text">POST</text:span> para cadastrar um usuário associado. Atenção: No campo <text:span text:style-name="Source_20_Text">association_id</text:span>, você deve colocar o ID em formato UUID que o banco te retornou quando você cadastrou a associação no passo anterior!</text:p>
        </text:list-item>
      </text:list>
      <text:p text:style-name="P80">curl -X POST http://localhost:8080/associations \</text:p>
      <text:p text:style-name="P80"><text:s text:c="2"/>-H "Content-Type: application/json" \</text:p>
      <text:p text:style-name="P80">-d '{"name": "Associação Canábica Esperança", "cnpj": "12.345.678/0001-99"}'</text:p>
      <text:p text:style-name="P80"/>
      <text:p text:style-name="P80"/>
      <text:p text:style-name="P80"/>
      <text:p text:style-name="P80">============================================================</text:p>
      <text:p text:style-name="P80"><text:s/>🎉 PARABÉNS, LUCAS! A SEMANA 1 ESTÁ 100% CONCLUÍDA! 🎉</text:p>
      <text:p text:style-name="P80">============================================================</text:p>
      <text:p text:style-name="P80"><text:s/>✓ Docker e PostgreSQL Configurados na porta 5433</text:p>
      <text:p text:style-name="P80"><text:s/>✓ Conexão Segura e Pool do Banco Estabelecidos no Go</text:p>
      <text:p text:style-name="P80"><text:s/>✓ Conceitos de Clean Architecture Aplicados (Domain, UseCase, Repo)</text:p>
      <text:p text:style-name="P80"><text:s/>✓ Módulo Multi-Tenant de Associações Operando</text:p>
      <text:p text:style-name="P80"><text:s/>✓ Módulo de Usuários com Criptografia Bcrypt Ativo</text:p>
      <text:p text:style-name="P80">============================================================</text:p>
      <text:p text:style-name="P81">Semana 2:</text:p>
      <text:p text:style-name="P82"/>
      <text:p text:style-name="P83"><text:bookmark text:name="p-rc_7ce3d62e4360b6df-144"/>Agora entramos no <text:span text:style-name="T3">Módulo Clínico (Gestão de Pacientes)</text:span>, que é o verdadeiro coração do sistema baseado no fluxo do seu documento. Aqui, o objetivo é permitir que a secretaria cadastre o paciente e anexe toda a documentação obrigatória. </text:p>
      <text:p text:style-name="P84">Como estamos seguindo com paciência e explicando cada passo, vamos primeiro planejar o que faremos nesta semana.</text:p>
      <text:p text:style-name="P83"/>
      <text:h text:style-name="P85" text:outline-level="2">📅 <text:span text:style-name="T9">O Plano da Semana 2: Módulo de Pacientes</text:span></text:h>
      <text:p text:style-name="P84"><text:bookmark text:name="p-rc_7ce3d62e4360b6df-145"/><text:span text:style-name="T4">Seguindo as regras do seu arquivo, um paciente não pode ficar "solto" no sistema: ele pertence a uma associação (</text:span><text:span text:style-name="Source_20_Text"><text:span text:style-name="T4">association_id</text:span></text:span><text:span text:style-name="T4">) e foi cadastrado por um usuário/secretária (</text:span><text:span text:style-name="Source_20_Text"><text:span text:style-name="T4">created_by</text:span></text:span><text:span text:style-name="T4">). </text:span></text:p>
      <text:p text:style-name="P86">Nesta semana, dividiremos o trabalho em:</text:p>
      <text:list text:style-name="L15">
        <text:list-item>
          <text:p text:style-name="P87"><text:bookmark text:name="p-rc_7ce3d62e4360b6df-146"/><text:span text:style-name="T17">Banco de Dados:</text:span><text:span text:style-name="T4"> Criar a tabela </text:span><text:span text:style-name="Source_20_Text"><text:span text:style-name="T4">patients</text:span></text:span><text:span text:style-name="T4"> com suporte aos status descritos no seu PDF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etc.). </text:span></text:p>
        </text:list-item>
        <text:list-item>
          <text:p text:style-name="P87"><text:span text:style-name="T17">Domínio em Go:</text:span><text:span text:style-name="T4"> Estruturar a entidade </text:span><text:span text:style-name="Source_20_Text"><text:span text:style-name="T4">Patient</text:span></text:span><text:span text:style-name="T4"> com validações (como checar se o nome não está vazio e o formato do CPF).</text:span></text:p>
        </text:list-item>
        <text:list-item>
          <text:p text:style-name="P88"><text:span text:style-name="T3">Casos de Uso:</text:span> Criar a lógica para cadastrar o paciente e impedir que o mesmo CPF seja registrado duas vezes na <text:span text:style-name="T3">mesma</text:span> associação (regra de multi-tenancy).</text:p>
        </text:list-item>
        <text:list-item>
          <text:p text:style-name="P88"><text:span text:style-name="T3">Interface HTTP (Gin):</text:span> Criar as rotas para salvar e listar os pacientes.</text:p>
        </text:list-item>
      </text:list>
      <text:p text:style-name="P83"/>
      <text:p text:style-name="P83"/>
      <text:h text:style-name="P85" text:outline-level="2"><text:soft-page-break/>🛠️ <text:span text:style-name="T9">Passo 1: A Nova Tabela no Banco de Dados (</text:span><text:span text:style-name="Source_20_Text"><text:span text:style-name="T4">patients</text:span></text:span><text:span text:style-name="T9">)</text:span></text:h>
      <text:p text:style-name="P86"><text:bookmark text:name="p-rc_7ce3d62e4360b6df-147"/>Para começar, vamos rodar o comando SQL diretamente no seu Docker para criar a tabela de pacientes com todos os campos exigidos na sua pesquisa (Dados pessoais, contatos e o controle de status). </text:p>
      <text:p text:style-name="P83">Abra o terminal na pasta do seu projeto e execute este bloco para injetar a tabela no PostgreSQL:</text:p>
      <text:p text:style-name="P83"/>
      <text:p text:style-name="P83">gemini-code-1782836833805.sh</text:p>
      <text:p text:style-name="P83"/>
      <text:p text:style-name="P83"/>
      <text:p text:style-name="P83"><text:span text:style-name="T3">Nota de aprendizado:</text:span> Repare no campo <text:span text:style-name="Source_20_Text">status</text:span>. Ele já nasce como <text:span text:style-name="Source_20_Text">'pending_documentation'</text:span>, exatamente como manda o primeiro passo do fluxo resumido do seu sistema ("Entrada do paciente cadastro + documentos").</text:p>
      <text:p text:style-name="P83"/>
      <text:h text:style-name="P85" text:outline-level="2">📂 Organizando a pasta do Domínio</text:h>
      <text:p text:style-name="P89">Agora que a tabela existe no banco de dados, o próximo passo é criar a camada de <text:span text:style-name="T3">Domínio</text:span> do paciente no Go (<text:span text:style-name="Source_20_Text">internal/domain/patient</text:span>), onde escreveremos as regras puras de validação.</text:p>
      <text:p text:style-name="P83"><text:span text:style-name="T4">Com a tabela de pacientes criada diretamente no PostgreSQL, vamos construir o </text:span><text:span text:style-name="T17">Domínio (</text:span><text:span text:style-name="Source_20_Text"><text:span text:style-name="T17">domain/patient</text:span></text:span><text:span text:style-name="T17">)</text:span><text:span text:style-name="T4"> no Go.</text:span></text:p>
      <text:p text:style-name="P84"><text:bookmark text:name="p-rc_60e131d01b3b5aac-155"/><text:span text:style-name="T4">Como você listou no seu documento de requisitos que o paciente possui uma série de dados pessoais e contatos (Nome, Data de Nascimento, Gênero, Telefone, E-mail, Endereço) e passa por um controle de status rigoroso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text:span><text:span text:style-name="Source_20_Text"><text:span text:style-name="T4">denied</text:span></text:span><text:span text:style-name="T4">), vamos refletir tudo isso na nossa estrutura pura em Go. </text:span></text:p>
      <text:h text:style-name="P90" text:outline-level="3">🛠️ <text:span text:style-name="T9">Passo Prático: Criando o Domínio de Pacientes</text:span></text:h>
      <text:p text:style-name="P86">Execute o comando abaixo no seu terminal para criar a pasta correspondente e gerar os arquivos contendo a <text:span text:style-name="T3">Entidade</text:span> e o <text:span text:style-name="T3">Contrato (Interface)</text:span> do Repositório:</text:p>
      <text:p text:style-name="P83">gemini-code-1782837029267.sh</text:p>
      <text:h text:style-name="P91" text:outline-level="3">🧠 Análise do Design Multi-Tenant</text:h>
      <text:p text:style-name="P89">Preste bastante atenção na interface do repositório: as funções <text:span text:style-name="Source_20_Text">FindByID</text:span> e <text:span text:style-name="Source_20_Text">FindByEmail</text:span> recebem tanto o dado buscado quanto o <text:span text:style-name="Source_20_Text">association_id</text:span>.</text:p>
      <text:p text:style-name="P89">Isso é fundamental no modelo SaaS. Quando a secretaria buscar por um paciente, o sistema garante que ela <text:span text:style-name="T3">só consiga encontrar registros que pertençam à própria associação dela</text:span>, criando uma barreira de segurança lógica intransponível entre as instituições parceiras.</text:p>
      <text:p text:style-name="P89">Agora que definimos a entidade pura e seu contrato, o nosso próximo passo lógico é criar a <text:span text:style-name="T3">Infraestrutura</text:span>, escrevendo as queries SQL correspondentes para salvar e consultar essas informações no PostgreSQL.</text:p>
      <text:p text:style-name="P83">Agora, vamos criar a implementação prática do banco de dados para os pacientes, que chamamos de <text:span text:style-name="T3">Repositório de Infraestrutura</text:span>. Como você está aprendendo a integração com banco de dados em Go, note como estruturamos os comandos SQL para tratar as datas (<text:span text:style-name="Source_20_Text">birth_date</text:span>) e strings perfeitamente.</text:p>
      <text:p text:style-name="P83"/>
      <text:h text:style-name="P91" text:outline-level="3">🛠️ Passo Prático: Criando o Repositório Postgres de Pacientes</text:h>
      <text:p text:style-name="P89">Execute o comando abaixo no seu terminal para gerar o arquivo de persistência:</text:p>
      <text:p text:style-name="P83">gemini-code-1782837305126.sh</text:p>
      <text:h text:style-name="P91" text:outline-level="3">🧠 Dica de Aprendizado em Go: O tipo <text:span text:style-name="Source_20_Text">time.Time</text:span> e o SQL</text:h>
      <text:p text:style-name="P89">O driver do Postgres que baixamos (<text:span text:style-name="Source_20_Text">lib/pq</text:span>) é inteligente o suficiente para entender que o tipo estruturado <text:span text:style-name="Source_20_Text">time.Time</text:span> do Go deve ser convertido e salvo perfeitamente como campos do tipo <text:span text:style-name="Source_20_Text">DATE</text:span> ou <text:span text:style-name="Source_20_Text">TIMESTAMP</text:span> no banco de dados, poupando a gente de fazer conversões manuais de texto chata.</text:p>
      <text:p text:style-name="P89"><text:soft-page-break/>Com o banco de dados pronto para receber e buscar pacientes, o próximo passo é criar a camada de <text:span text:style-name="T3">Aplicação (Caso de Uso)</text:span>, onde vamos gerenciar as regras de validação antes de mandar salvar.</text:p>
      <text:p text:style-name="P83"/>
      <text:p text:style-name="P92">Vamos agora construir a camada de <text:span text:style-name="T3">Aplicação</text:span> com o Caso de Uso responsável por <text:span text:style-name="T3">Cadastrar um Novo Paciente</text:span>.</text:p>
      <text:p text:style-name="P86"><text:bookmark text:name="p-rc_c38d02a1fe93444d-159"/>Como vimos no seu modelo de requisitos, a entrada do paciente envolve coletar dados estruturados e colocá-lo no status inicial de aguardando documentação. A lógica do Caso de Uso vai garantir que um e-mail não seja duplicado dentro da <text:span text:style-name="T3">mesma</text:span> associação (respeitando o isolamento do SaaS).</text:p>
      <text:p text:style-name="P83"/>
      <text:h text:style-name="P91" text:outline-level="3">🛠️ Passo Prático: Criando o Caso de Uso de Paciente</text:h>
      <text:p text:style-name="P89">Execute o comando abaixo no terminal para criar o arquivo do caso de uso:</text:p>
      <text:p text:style-name="P93"/>
      <text:p text:style-name="P93">gemini-code-1782837448353.sh</text:p>
      <text:p text:style-name="P93"/>
      <text:h text:style-name="P94" text:outline-level="2">📂 <text:span text:style-name="T9">O Próximo Passo: Interface HTTP (Gin)</text:span></text:h>
      <text:p text:style-name="P95"><text:bookmark text:name="p-rc_c38d02a1fe93444d-160"/>Com a lógica de negócios e o banco amarrados, precisamos apenas criar o <text:span text:style-name="T3">Handler</text:span> e a <text:span text:style-name="T3">Rota</text:span> no Gin para receber esses dados de pacientes via requisições HTTP.</text:p>
      <text:p text:style-name="P93"/>
      <text:p text:style-name="P96"><text:bookmark text:name="p-rc_5e44a597e1c3e46e-163"/>Vamos criar agora o <text:span text:style-name="T3">Handler</text:span> e a <text:span text:style-name="T3">Rota</text:span> para os pacientes usando o framework Gin, completando a camada de entrega. </text:p>
      <text:p text:style-name="P95">Siga os passos abaixo para gerar esses arquivos:</text:p>
      <text:h text:style-name="P97" text:outline-level="3">🛠️ <text:span text:style-name="T9">Passo 1: Criando Handler e Rotas de Pacientes</text:span></text:h>
      <text:p text:style-name="P95">Execute o bloco abaixo no seu terminal para gerar a camada HTTP:</text:p>
      <text:p text:style-name="P93">gemini-code-1782837575247.sh</text:p>
      <text:p text:style-name="P93"/>
      <text:h text:style-name="P98" text:outline-level="3">🪢 Passo 2: Atualizando a Fiação Geral no <text:span text:style-name="Source_20_Text">main.go</text:span></text:h>
      <text:p text:style-name="P99">Para que o servidor Gin reconheça as rotas de pacientes, precisamos instanciar o repositório, caso de uso e handler e registrá-los no arquivo principal.</text:p>
      <text:p text:style-name="P99">Execute no terminal para atualizar o seu <text:span text:style-name="Source_20_Text">main.go</text:span>:</text:p>
      <text:p text:style-name="P93"/>
      <text:p text:style-name="P93">gemini-code-1782837805367.sh</text:p>
      <text:p text:style-name="P93"><text:span text:style-name="T4">O terminal deve retornar o JSON completo do paciente criado com o status </text:span><text:span text:style-name="Source_20_Text"><text:span text:style-name="T4">"pending_documentation"</text:span></text:span><text:span text:style-name="T4">.</text:span></text:p>
      <text:p text:style-name="P93"/>
      <text:h text:style-name="P98" text:outline-level="3">🧪 O Comando de Teste</text:h>
      <text:p text:style-name="P100"><text:span text:style-name="T18">Abra uma </text:span><text:span text:style-name="T19">nova aba do terminal</text:span><text:span text:style-name="T18"> (deixando o servidor rodando na primeira) e execute o comando </text:span><text:span text:style-name="Source_20_Text"><text:span text:style-name="T18">curl</text:span></text:span><text:span text:style-name="T18"> abaixo.</text:span></text:p>
      <text:p text:style-name="P101"><text:span text:style-name="T19">Atenção:</text:span><text:span text:style-name="T18"> Eu já deixei o ID da associação preenchido com o valor </text:span><text:span text:style-name="Source_20_Text"><text:span text:style-name="T18">"61a72d3e-d4f9-4b34-b37a-6b0c26ede728"</text:span></text:span><text:span text:style-name="T18"> que apareceu no seu print. Como ainda não criamos o teste de retorno do usuário para ver o ID dele, usei o mesmo UUID para o campo </text:span><text:span text:style-name="Source_20_Text"><text:span text:style-name="T18">created_by</text:span></text:span><text:span text:style-name="T18"> apenas para passar na validação do banco por enquanto.</text:span></text:p>
      <text:p text:style-name="P102"/>
      <text:p text:style-name="P102"><text:soft-page-break/></text:p>
      <text:p text:style-name="P102"/>
      <text:p text:style-name="P102"/>
      <text:p text:style-name="P102"/>
      <text:p text:style-name="P102"/>
      <text:p text:style-name="P102"/>
      <text:p text:style-name="P102">🏆 MARCO ALCANÇADO: FIM DA SEMANA 2!</text:p>
      <text:p text:style-name="P102"/>
      <text:p text:style-name="P93">============================================================</text:p>
      <text:p text:style-name="P93"><text:s/>🎉 PARABÉNS, LUCAS! A SEMANA 2 ESTÁ CONCLUÍDA COM SUCESSO! 🎉</text:p>
      <text:p text:style-name="P93">============================================================</text:p>
      <text:p text:style-name="P93"><text:s/>✓ Tabela de Pacientes estruturada no PostgreSQL</text:p>
      <text:p text:style-name="P93"><text:s/>✓ Domínio de Pacientes isolado por Associação (Multi-Tenant)</text:p>
      <text:p text:style-name="P93"><text:s/>✓ Lógica de Entrada de Paciente do seu PDF implementada</text:p>
      <text:p text:style-name="P93"><text:s/>✓ Validação de e-mail único por Associação ativa</text:p>
      <text:p text:style-name="P93"><text:s/>✓ Rota POST /patients operando com sucesso</text:p>
      <text:p text:style-name="P93">============================================================</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30T09:35:58.254007362</meta:creation-date>
    <meta:generator>LibreOffice/26.2.4.2$Linux_X86_64 LibreOffice_project/620$Build-2</meta:generator>
    <dc:date>2026-06-30T13:48:29.339749079</dc:date>
    <meta:editing-duration>PT4H7S</meta:editing-duration>
    <meta:editing-cycles>53</meta:editing-cycles>
    <meta:document-statistic meta:table-count="0" meta:image-count="0" meta:object-count="0" meta:page-count="14" meta:paragraph-count="306" meta:word-count="4616" meta:character-count="28453" meta:non-whitespace-character-count="23966"/>
  </office:meta>
</office:document-meta>
</file>