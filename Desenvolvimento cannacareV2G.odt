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20000038D741A9312.png" manifest:media-type="image/png"/>
  <manifest:file-entry manifest:full-path="Pictures/10000001000005520000038D4DDC218F.png" manifest:media-type="image/png"/>
  <manifest:file-entry manifest:full-path="Pictures/10000001000005520000038D79C39720.png" manifest:media-type="image/png"/>
  <manifest:file-entry manifest:full-path="Pictures/10000001000005520000038D6E33D761.png" manifest:media-type="image/png"/>
  <manifest:file-entry manifest:full-path="Pictures/100000010000053F00000231ED86AD4C.png" manifest:media-type="image/png"/>
  <manifest:file-entry manifest:full-path="Pictures/1000000100000557000003B9C1BE00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style:font-name="Liberation Mono"/>
    </style:style>
    <style:style style:name="P2" style:family="paragraph" style:parent-style-name="Text_20_body">
      <style:paragraph-properties fo:margin-left="0in" fo:margin-right="0in" fo:margin-top="0in" fo:margin-bottom="0.0972in" style:contextual-spacing="false" fo:line-height="114%" fo:text-indent="0in" style:auto-text-indent="false"/>
      <style:text-properties style:font-name="Liberation Mono"/>
    </style:style>
    <style:style style:name="P3"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Liberation Mono" fo:font-weight="bold"/>
    </style:style>
    <style:style style:name="P4"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style>
    <style:style style:name="P5"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Liberation Mono"/>
    </style:style>
    <style:style style:name="P6" style:family="paragraph" style:parent-style-name="Standard">
      <style:text-properties style:font-name="Liberation Mono"/>
    </style:style>
    <style:style style:name="P7" style:family="paragraph" style:parent-style-name="Standard">
      <style:text-properties style:font-name="Liberation Mono" fo:font-weight="bold" style:font-weight-asian="bold" style:font-weight-complex="bold"/>
    </style:style>
    <style:style style:name="P8" style:family="paragraph" style:parent-style-name="Standard">
      <style:text-properties style:font-name="Liberation Mono" fo:font-weight="normal" officeooo:paragraph-rsid="000df6a0" style:font-weight-asian="normal" style:font-weight-complex="normal"/>
    </style:style>
    <style:style style:name="P9" style:family="paragraph" style:parent-style-name="Standard">
      <style:text-properties style:font-name="Liberation Mono" fo:font-size="8pt" fo:font-weight="normal" officeooo:paragraph-rsid="000df6a0" style:font-size-asian="8pt" style:font-weight-asian="normal" style:font-size-complex="8pt" style:font-weight-complex="normal"/>
    </style:style>
    <style:style style:name="P10" style:family="paragraph" style:parent-style-name="Standard">
      <style:text-properties style:font-name="Liberation Mono" fo:font-size="8pt" fo:font-weight="bold" style:font-size-asian="8pt" style:font-weight-asian="bold" style:font-size-complex="8pt" style:font-weight-complex="bold"/>
    </style:style>
    <style:style style:name="P11" style:family="paragraph" style:parent-style-name="Standard">
      <style:text-properties style:font-name="Liberation Mono" fo:font-size="8pt" fo:font-weight="bold" officeooo:paragraph-rsid="000df6a0" style:font-size-asian="8pt" style:font-weight-asian="bold" style:font-size-complex="8pt" style:font-weight-complex="bold"/>
    </style:style>
    <style:style style:name="P12" style:family="paragraph" style:parent-style-name="Heading_20_2">
      <style:text-properties style:font-name="Liberation Mono" fo:font-size="8pt" fo:font-weight="bold" style:font-size-asian="8pt" style:font-weight-asian="bold" style:font-size-complex="8pt" style:font-weight-complex="bold"/>
    </style:style>
    <style:style style:name="P13" style:family="paragraph" style:parent-style-name="Text_20_body">
      <style:text-properties style:font-name="Liberation Mono" fo:font-size="8pt" fo:font-weight="bold" style:font-size-asian="8pt" style:font-weight-asian="bold" style:font-size-complex="8pt" style:font-weight-complex="bold"/>
    </style:style>
    <style:style style:name="P14" style:family="paragraph" style:parent-style-name="Text_20_body" style:list-style-name="L2">
      <style:text-properties style:font-name="Liberation Mono" fo:font-size="8pt" fo:font-weight="bold" style:font-size-asian="8pt" style:font-weight-asian="bold" style:font-size-complex="8pt" style:font-weight-complex="bold"/>
    </style:style>
    <style:style style:name="P15" style:family="paragraph" style:parent-style-name="Standard">
      <style:text-properties style:font-name="Liberation Mono" fo:font-size="8pt" fo:font-weight="bold" officeooo:rsid="0011369d" officeooo:paragraph-rsid="0011369d" fo:background-color="#3465a4" style:font-size-asian="8pt" style:font-weight-asian="bold" style:font-size-complex="8pt" style:font-weight-complex="bold"/>
    </style:style>
    <style:style style:name="P16" style:family="paragraph" style:parent-style-name="Text_20_body">
      <style:text-properties style:font-name="Google Sans Text" fo:font-size="8pt" fo:font-weight="bold" officeooo:rsid="0011369d" officeooo:paragraph-rsid="0011369d" style:font-size-asian="8pt" style:font-weight-asian="bold" style:font-size-complex="8pt" style:font-weight-complex="bold"/>
    </style:style>
    <style:style style:name="P17"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text-properties style:font-name="Liberation Mono" fo:font-size="8pt" fo:font-weight="bold" officeooo:rsid="0011369d" style:font-size-asian="8pt" style:font-weight-asian="bold" style:font-size-complex="8pt" style:font-weight-complex="bold"/>
    </style:style>
    <style:style style:name="P18"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text-properties style:font-name="Google Sans Text" fo:font-size="8pt" fo:font-weight="bold" officeooo:rsid="0011369d" style:font-size-asian="8pt" style:font-weight-asian="bold" style:font-size-complex="8pt" style:font-weight-complex="bold"/>
    </style:style>
    <style:style style:name="P19" style:family="paragraph" style:parent-style-name="Standard">
      <style:text-properties style:font-name="Liberation Mono" fo:font-size="8pt" fo:font-weight="bold" officeooo:rsid="0011369d" officeooo:paragraph-rsid="0011369d" style:font-size-asian="8pt" style:font-weight-asian="bold" style:font-size-complex="8pt" style:font-weight-complex="bold"/>
    </style:style>
    <style:style style:name="P20" style:family="paragraph" style:parent-style-name="Heading_20_3">
      <style:text-properties style:font-name="Liberation Mono" fo:font-size="8pt" fo:font-weight="bold" style:font-size-asian="8pt" style:font-weight-asian="bold" style:font-size-complex="8pt" style:font-weight-complex="bold"/>
    </style:style>
    <style:style style:name="P21" style:family="paragraph" style:parent-style-name="Heading_20_3">
      <style:text-properties style:font-name="Google Sans" fo:font-size="8pt" fo:font-weight="bold" style:font-size-asian="8pt" style:font-weight-asian="bold" style:font-size-complex="8pt" style:font-weight-complex="bold"/>
    </style:style>
    <style:style style:name="P22" style:family="paragraph" style:parent-style-name="Text_20_body">
      <style:paragraph-properties fo:margin-left="0in" fo:margin-right="0in" fo:margin-top="0in" fo:margin-bottom="0.0972in" style:contextual-spacing="false" fo:line-height="114%" fo:text-indent="0in" style:auto-text-indent="false"/>
      <style:text-properties style:font-name="Liberation Mono" fo:font-size="8pt" fo:font-weight="bold" style:font-size-asian="8pt" style:font-weight-asian="bold" style:font-size-complex="8pt" style:font-weight-complex="bold"/>
    </style:style>
    <style:style style:name="P23"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size="8pt" fo:font-weight="bold" style:font-size-asian="8pt" style:font-weight-asian="bold" style:font-size-complex="8pt" style:font-weight-complex="bold"/>
    </style:style>
    <style:style style:name="P24" style:family="paragraph" style:parent-style-name="Standard">
      <style:paragraph-properties fo:margin-top="0in" fo:margin-bottom="0.1965in" style:contextual-spacing="false"/>
      <style:text-properties style:font-name="Liberation Mono" fo:font-size="8pt" fo:font-weight="bold" style:font-size-asian="8pt" style:font-weight-asian="bold" style:font-size-complex="8pt" style:font-weight-complex="bold"/>
    </style:style>
    <style:style style:name="P25" style:family="paragraph" style:parent-style-name="Preformatted_20_Text">
      <style:paragraph-properties fo:margin-top="0in" fo:margin-bottom="0.1965in" style:contextual-spacing="false"/>
      <style:text-properties style:font-name="Liberation Mono" fo:font-size="8pt" fo:font-weight="bold" style:font-size-asian="8pt" style:font-weight-asian="bold" style:font-size-complex="8pt" style:font-weight-complex="bold"/>
    </style:style>
    <style:style style:name="P26"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style:font-name="Google Sans Text" fo:font-size="8pt" fo:font-weight="bold" style:font-size-asian="8pt" style:font-weight-asian="bold" style:font-size-complex="8pt" style:font-weight-complex="bold"/>
    </style:style>
    <style:style style:name="P27"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style:font-name="Liberation Mono" fo:font-size="8pt" fo:font-weight="bold" style:font-size-asian="8pt" style:font-weight-asian="bold" style:font-size-complex="8pt" style:font-weight-complex="bold"/>
    </style:style>
    <style:style style:name="P28" style:family="paragraph" style:parent-style-name="Heading_20_3">
      <style:paragraph-properties fo:margin-left="0in" fo:margin-right="0in" fo:margin-top="0in" fo:margin-bottom="0.0972in" style:contextual-spacing="false" fo:line-height="114%" fo:text-indent="0in" style:auto-text-indent="false"/>
      <style:text-properties style:font-name="Google Sans" fo:font-size="8pt" style:font-size-asian="8pt" style:font-size-complex="8pt"/>
    </style:style>
    <style:style style:name="P29" style:family="paragraph" style:parent-style-name="Text_20_body" style:list-style-name="L5">
      <style:paragraph-properties fo:margin-left="0in" fo:margin-right="0in" fo:margin-top="0in" fo:margin-bottom="0.0972in" style:contextual-spacing="false" fo:line-height="114%" fo:text-indent="0in" style:auto-text-indent="false" fo:padding="0in" fo:border="none"/>
      <style:text-properties style:font-name="Liberation Mono" fo:font-size="8pt" fo:font-weight="bold" style:font-size-asian="8pt" style:font-weight-asian="bold" style:font-size-complex="8pt" style:font-weight-complex="bold"/>
    </style:style>
    <style:style style:name="P30" style:family="paragraph" style:parent-style-name="Standard">
      <style:text-properties fo:color="#999999" loext:opacity="100%" style:font-name="Liberation Mono" fo:font-size="8pt" fo:font-weight="bold" officeooo:paragraph-rsid="0014ff79" style:font-size-asian="8pt" style:font-weight-asian="bold" style:font-size-complex="8pt" style:font-weight-complex="bold"/>
    </style:style>
    <style:style style:name="P31" style:family="paragraph" style:parent-style-name="Heading_20_3">
      <style:text-properties fo:color="#000000" loext:opacity="100%" style:font-name="Google Sans" fo:font-size="8pt" fo:font-weight="bold" officeooo:paragraph-rsid="0014ff79" style:font-size-asian="8pt" style:font-weight-asian="bold" style:font-size-complex="8pt" style:font-weight-complex="bold"/>
    </style:style>
    <style:style style:name="P32" style:family="paragraph" style:parent-style-name="Text_20_body">
      <style:paragraph-properties fo:margin-left="0in" fo:margin-right="0in" fo:margin-top="0in" fo:margin-bottom="0.0972in" style:contextual-spacing="false" fo:line-height="114%" fo:text-indent="0in" style:auto-text-indent="false"/>
      <style:text-properties fo:color="#999999" loext:opacity="100%" style:font-name="Liberation Mono" fo:font-size="8pt" fo:font-weight="bold" style:font-size-asian="8pt" style:font-weight-asian="bold" style:font-size-complex="8pt" style:font-weight-complex="bold"/>
    </style:style>
    <style:style style:name="P33" style:family="paragraph" style:parent-style-name="Text_20_body" style:list-style-name="L6">
      <style:paragraph-properties fo:margin-left="0in" fo:margin-right="0in" fo:margin-top="0in" fo:margin-bottom="0.0972in" style:contextual-spacing="false" fo:line-height="114%" fo:text-indent="0in" style:auto-text-indent="false" fo:padding="0in" fo:border="none"/>
      <style:text-properties fo:color="#999999" loext:opacity="100%" style:font-name="Liberation Mono" fo:font-size="8pt" fo:font-weight="bold" style:font-size-asian="8pt" style:font-weight-asian="bold" style:font-size-complex="8pt" style:font-weight-complex="bold"/>
    </style:style>
    <style:style style:name="P34" style:family="paragraph" style:parent-style-name="Text_20_body">
      <style:paragraph-properties fo:margin-left="0in" fo:margin-right="0in" fo:margin-top="0in" fo:margin-bottom="0.0972in" style:contextual-spacing="false" fo:line-height="114%" fo:text-indent="0in" style:auto-text-indent="false"/>
      <style:text-properties fo:color="#000000" loext:opacity="100%" style:font-name="Google Sans Text" fo:font-size="8pt" fo:font-weight="bold" style:font-size-asian="8pt" style:font-weight-asian="bold" style:font-size-complex="8pt" style:font-weight-complex="bold"/>
    </style:style>
    <style:style style:name="P35" style:family="paragraph" style:parent-style-name="Standard">
      <style:text-properties fo:color="#999999" loext:opacity="100%" style:font-name="Liberation Mono" fo:font-size="8pt" fo:font-weight="bold" officeooo:rsid="0014ff79" officeooo:paragraph-rsid="0014ff79" style:font-size-asian="8pt" style:font-weight-asian="bold" style:font-size-complex="8pt" style:font-weight-complex="bold"/>
    </style:style>
    <style:style style:name="P36" style:family="paragraph" style:parent-style-name="Heading_20_3">
      <style:text-properties fo:color="#999999" loext:opacity="100%" style:font-name="Liberation Mono" fo:font-size="8pt" fo:font-weight="bold" officeooo:rsid="0014ff79" officeooo:paragraph-rsid="0014ff79" style:font-size-asian="8pt" style:font-weight-asian="bold" style:font-size-complex="8pt" style:font-weight-complex="bold"/>
    </style:style>
    <style:style style:name="P37" style:family="paragraph" style:parent-style-name="Text_20_body">
      <style:paragraph-properties fo:margin-left="0in" fo:margin-right="0in" fo:margin-top="0in" fo:margin-bottom="0.0972in" style:contextual-spacing="false" fo:line-height="114%" fo:text-indent="0in" style:auto-text-indent="false"/>
      <style:text-properties fo:color="#999999" loext:opacity="100%" style:font-name="Liberation Mono" fo:font-size="8pt" fo:font-weight="bold" officeooo:rsid="0014ff79" style:font-size-asian="8pt" style:font-weight-asian="bold" style:font-size-complex="8pt" style:font-weight-complex="bold"/>
    </style:style>
    <style:style style:name="P38" style:family="paragraph" style:parent-style-name="Text_20_body">
      <style:paragraph-properties fo:margin-left="0in" fo:margin-right="0in" fo:margin-top="0in" fo:margin-bottom="0.0972in" style:contextual-spacing="false" fo:line-height="114%" fo:text-indent="0in" style:auto-text-indent="false"/>
      <style:text-properties fo:color="#000000" loext:opacity="100%" style:font-name="Google Sans Text" fo:font-size="8pt" fo:font-weight="bold" officeooo:rsid="0014ff79" style:font-size-asian="8pt" style:font-weight-asian="bold" style:font-size-complex="8pt" style:font-weight-complex="bold"/>
    </style:style>
    <style:style style:name="P39" style:family="paragraph" style:parent-style-name="Standard">
      <style:text-properties fo:color="#999999" loext:opacity="100%" style:font-name="Liberation Mono" fo:font-size="8pt" fo:font-weight="bold" officeooo:rsid="0014ff79" officeooo:paragraph-rsid="001583c9" style:font-size-asian="8pt" style:font-weight-asian="bold" style:font-size-complex="8pt" style:font-weight-complex="bold"/>
    </style:style>
    <style:style style:name="P40" style:family="paragraph" style:parent-style-name="Heading_20_3">
      <style:text-properties fo:color="#000000" loext:opacity="100%" style:font-name="Liberation Mono" fo:font-size="8pt" fo:font-weight="bold" officeooo:rsid="0014ff79" officeooo:paragraph-rsid="001583c9" style:font-size-asian="8pt" style:font-weight-asian="bold" style:font-size-complex="8pt" style:font-weight-complex="bold"/>
    </style:style>
    <style:style style:name="P41" style:family="paragraph" style:parent-style-name="Standard">
      <style:text-properties fo:color="#808080" loext:opacity="100%" style:font-name="Liberation Mono" fo:font-size="8pt" fo:font-weight="bold" officeooo:rsid="0015a29f" officeooo:paragraph-rsid="0015a29f" style:font-size-asian="8pt" style:font-weight-asian="bold" style:font-size-complex="8pt" style:font-weight-complex="bold"/>
    </style:style>
    <style:style style:name="P42" style:family="paragraph" style:parent-style-name="Standard">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43" style:family="paragraph" style:parent-style-name="Text_20_body">
      <style:text-properties fo:color="#000000" loext:opacity="100%" style:font-name="Google Sans Text" fo:font-size="8pt" fo:font-weight="bold" officeooo:rsid="0015a29f" officeooo:paragraph-rsid="0015a29f" style:font-size-asian="8pt" style:font-weight-asian="bold" style:font-size-complex="8pt" style:font-weight-complex="bold"/>
    </style:style>
    <style:style style:name="P44" style:family="paragraph" style:parent-style-name="Text_20_body">
      <style:paragraph-properties fo:margin-left="0in" fo:margin-right="0in" fo:margin-top="0in" fo:margin-bottom="0.0972in" style:contextual-spacing="false" fo:line-height="114%" fo:text-indent="0in" style:auto-text-indent="false"/>
      <style:text-properties fo:color="#000000" loext:opacity="100%" style:font-name="Google Sans Text" fo:font-size="8pt" fo:font-weight="bold" officeooo:rsid="0015a29f" style:font-size-asian="8pt" style:font-weight-asian="bold" style:font-size-complex="8pt" style:font-weight-complex="bold"/>
    </style:style>
    <style:style style:name="P45" style:family="paragraph" style:parent-style-name="Heading_20_3">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46" style:family="paragraph" style:parent-style-name="Text_20_body">
      <style:text-properties fo:color="#000000" loext:opacity="100%" style:font-name="Liberation Mono" fo:font-size="8pt" fo:font-weight="bold" officeooo:rsid="0015a29f" style:font-size-asian="8pt" style:font-weight-asian="bold" style:font-size-complex="8pt" style:font-weight-complex="bold"/>
    </style:style>
    <style:style style:name="P47" style:family="paragraph" style:parent-style-name="Text_20_body">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48" style:family="paragraph" style:parent-style-name="Text_20_body" style:list-style-name="L7">
      <style:paragraph-properties fo:margin-left="0in" fo:margin-right="0in" fo:margin-top="0in" fo:margin-bottom="0.0972in" style:contextual-spacing="false" fo:line-height="114%" fo:text-indent="0in" style:auto-text-indent="false" fo:padding="0in" fo:border="none"/>
      <style:text-properties fo:color="#000000" loext:opacity="100%" style:font-name="Liberation Mono" fo:font-size="8pt" fo:font-weight="bold" officeooo:rsid="0015a29f" style:font-size-asian="8pt" style:font-weight-asian="bold" style:font-size-complex="8pt" style:font-weight-complex="bold"/>
    </style:style>
    <style:style style:name="P49" style:family="paragraph" style:parent-style-name="Text_20_body" style:list-style-name="L7">
      <style:paragraph-properties fo:margin-left="0in" fo:margin-right="0in" fo:margin-top="0in" fo:margin-bottom="0.0972in" style:contextual-spacing="false" fo:line-height="114%" fo:text-indent="0in" style:auto-text-indent="false" fo:padding="0in" fo:border="none"/>
      <style:text-properties fo:color="#000000" loext:opacity="100%" style:font-name="Google Sans Text" fo:font-size="8pt" fo:font-weight="bold" officeooo:rsid="0015a29f" style:font-size-asian="8pt" style:font-weight-asian="bold" style:font-size-complex="8pt" style:font-weight-complex="bold"/>
    </style:style>
    <style:style style:name="P50" style:family="paragraph" style:parent-style-name="Heading_20_2">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51" style:family="paragraph" style:parent-style-name="Preformatted_20_Text">
      <style:paragraph-properties fo:margin-left="0in" fo:margin-right="0in" fo:margin-top="0in" fo:margin-bottom="0in" style:contextual-spacing="false" fo:line-height="114%" fo:text-indent="0in" style:auto-text-indent="false"/>
      <style:text-properties fo:color="#000000" loext:opacity="100%" style:font-name="Liberation Mono" fo:font-size="8pt" fo:font-weight="bold" officeooo:rsid="0015a29f" style:font-size-asian="8pt" style:font-weight-asian="bold" style:font-size-complex="8pt" style:font-weight-complex="bold"/>
    </style:style>
    <style:style style:name="P52" style:family="paragraph" style:parent-style-name="Text_20_body" style:list-style-name="L8">
      <style:paragraph-properties fo:margin-left="0in" fo:margin-right="0in" fo:margin-top="0in" fo:margin-bottom="0.0972in" style:contextual-spacing="false" fo:line-height="114%" fo:text-indent="0in" style:auto-text-indent="false" fo:padding="0in" fo:border="none"/>
      <style:text-properties fo:color="#000000" loext:opacity="100%" style:font-name="Google Sans Text" fo:font-size="8pt" fo:font-weight="bold" officeooo:rsid="0015a29f" style:font-size-asian="8pt" style:font-weight-asian="bold" style:font-size-complex="8pt" style:font-weight-complex="bold"/>
    </style:style>
    <style:style style:name="P53" style:family="paragraph" style:parent-style-name="Standard">
      <style:paragraph-properties fo:margin-top="0in" fo:margin-bottom="0.1965in" style:contextual-spacing="false"/>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54" style:family="paragraph" style:parent-style-name="Text_20_body" style:list-style-name="L9">
      <style:text-properties fo:color="#000000" loext:opacity="100%" style:font-name="Liberation Mono" fo:font-size="8pt" fo:font-weight="bold" officeooo:rsid="0015a29f" style:font-size-asian="8pt" style:font-weight-asian="bold" style:font-size-complex="8pt" style:font-weight-complex="bold"/>
    </style:style>
    <style:style style:name="P55" style:family="paragraph" style:parent-style-name="Text_20_body" style:list-style-name="L10">
      <style:paragraph-properties fo:margin-left="0in" fo:margin-right="0in" fo:margin-top="0in" fo:margin-bottom="0.0972in" style:contextual-spacing="false" fo:line-height="114%" fo:text-indent="0in" style:auto-text-indent="false" fo:padding="0in" fo:border="none"/>
      <style:text-properties fo:color="#000000" loext:opacity="100%" style:font-name="Liberation Mono" fo:font-size="8pt" fo:font-weight="bold" officeooo:rsid="0015a29f" style:font-size-asian="8pt" style:font-weight-asian="bold" style:font-size-complex="8pt" style:font-weight-complex="bold"/>
    </style:style>
    <style:style style:name="P56" style:family="paragraph" style:parent-style-name="Text_20_body">
      <style:paragraph-properties fo:margin-left="0in" fo:margin-right="0in" fo:text-indent="0in" style:auto-text-indent="false"/>
      <style:text-properties fo:color="#000000" loext:opacity="100%" style:font-name="Liberation Mono" fo:font-size="8pt" fo:font-weight="bold" officeooo:rsid="0015a29f" style:font-size-asian="8pt" style:font-weight-asian="bold" style:font-size-complex="8pt" style:font-weight-complex="bold"/>
    </style:style>
    <style:style style:name="P57" style:family="paragraph" style:parent-style-name="Heading_20_3">
      <style:text-properties fo:color="#000000" loext:opacity="100%" style:font-name="Liberation Mono" fo:font-size="8pt" officeooo:rsid="0015a29f" style:font-size-asian="8pt" style:font-size-complex="8pt"/>
    </style:style>
    <style:style style:name="P58" style:family="paragraph" style:parent-style-name="Heading_20_3">
      <style:text-properties fo:color="#000000" loext:opacity="100%" style:font-name="Liberation Mono" fo:font-size="8pt" fo:font-weight="bold" officeooo:rsid="0015a29f" officeooo:paragraph-rsid="001ec2c0" style:font-size-asian="8pt" style:font-weight-asian="bold" style:font-size-complex="8pt" style:font-weight-complex="bold"/>
    </style:style>
    <style:style style:name="P59" style:family="paragraph" style:parent-style-name="Standard">
      <style:text-properties fo:color="#000000" loext:opacity="100%" style:font-name="Liberation Mono" fo:font-size="8pt" fo:font-weight="bold" officeooo:rsid="0015a29f" officeooo:paragraph-rsid="001ec2c0" style:font-size-asian="8pt" style:font-weight-asian="bold" style:font-size-complex="8pt" style:font-weight-complex="bold"/>
    </style:style>
    <style:style style:name="P60" style:family="paragraph" style:parent-style-name="Text_20_body">
      <style:text-properties fo:color="#000000" loext:opacity="100%" style:font-name="Liberation Mono" fo:font-size="8pt" fo:font-weight="bold" officeooo:rsid="0015a29f" officeooo:paragraph-rsid="001ec2c0" style:font-size-asian="8pt" style:font-weight-asian="bold" style:font-size-complex="8pt" style:font-weight-complex="bold"/>
    </style:style>
    <style:style style:name="P61" style:family="paragraph" style:parent-style-name="Text_20_body" style:list-style-name="L11">
      <style:paragraph-properties fo:margin-left="0in" fo:margin-right="0in" fo:margin-top="0in" fo:margin-bottom="0.0972in" style:contextual-spacing="false" fo:line-height="114%" fo:text-indent="0in" style:auto-text-indent="false" fo:padding="0in" fo:border="none"/>
      <style:text-properties fo:color="#000000" loext:opacity="100%" style:font-name="Google Sans Text" fo:font-size="8pt" fo:font-weight="bold" officeooo:rsid="0015a29f" style:font-size-asian="8pt" style:font-weight-asian="bold" style:font-size-complex="8pt" style:font-weight-complex="bold"/>
    </style:style>
    <style:style style:name="P62" style:family="paragraph" style:parent-style-name="Heading_20_3">
      <style:paragraph-properties fo:margin-left="0in" fo:margin-right="0in" fo:margin-top="0in" fo:margin-bottom="0.0972in" style:contextual-spacing="false" fo:line-height="114%" fo:text-indent="0in" style:auto-text-indent="false"/>
      <style:text-properties fo:color="#000000" loext:opacity="100%" style:font-name="Liberation Mono" fo:font-size="8pt" officeooo:rsid="0015a29f" style:font-size-asian="8pt" style:font-size-complex="8pt"/>
    </style:style>
    <style:style style:name="P63" style:family="paragraph" style:parent-style-name="Text_20_body">
      <style:paragraph-properties fo:margin-left="0in" fo:margin-right="0in" fo:margin-top="0in" fo:margin-bottom="0in" style:contextual-spacing="false" fo:text-indent="0in" style:auto-text-indent="false"/>
      <style:text-properties fo:color="#000000" loext:opacity="100%" style:font-name="Liberation Mono" fo:font-size="8pt" fo:font-weight="bold" officeooo:rsid="0015a29f" style:font-size-asian="8pt" style:font-weight-asian="bold" style:font-size-complex="8pt" style:font-weight-complex="bold"/>
    </style:style>
    <style:style style:name="P64" style:family="paragraph" style:parent-style-name="Text_20_body">
      <style:paragraph-properties fo:margin-left="0in" fo:margin-right="0in" fo:orphans="20" fo:text-indent="0in" style:auto-text-indent="false"/>
      <style:text-properties fo:color="#000000" loext:opacity="100%" style:font-name="Liberation Mono" fo:font-size="8pt" fo:font-weight="bold" officeooo:rsid="0015a29f" style:font-size-asian="8pt" style:font-weight-asian="bold" style:font-size-complex="8pt" style:font-weight-complex="bold"/>
    </style:style>
    <style:style style:name="P65" style:family="paragraph" style:parent-style-name="Standard">
      <style:text-properties fo:color="#000000" loext:opacity="100%" style:font-name="Liberation Mono" fo:font-size="8pt" fo:font-weight="bold" officeooo:rsid="0015a29f" officeooo:paragraph-rsid="00234d93" style:font-size-asian="8pt" style:font-weight-asian="bold" style:font-size-complex="8pt" style:font-weight-complex="bold"/>
    </style:style>
    <style:style style:name="P66" style:family="paragraph" style:parent-style-name="Text_20_body">
      <style:text-properties fo:color="#000000" loext:opacity="100%" style:font-name="Liberation Mono" fo:font-size="8pt" fo:font-weight="bold" officeooo:rsid="0015a29f" officeooo:paragraph-rsid="00234d93" style:font-size-asian="8pt" style:font-weight-asian="bold" style:font-size-complex="8pt" style:font-weight-complex="bold"/>
    </style:style>
    <style:style style:name="P67" style:family="paragraph" style:parent-style-name="Heading_20_3">
      <style:text-properties fo:color="#000000" loext:opacity="100%" style:font-name="Liberation Mono" fo:font-size="8pt" fo:font-weight="bold" officeooo:rsid="0015a29f" officeooo:paragraph-rsid="00234d93" style:font-size-asian="8pt" style:font-weight-asian="bold" style:font-size-complex="8pt" style:font-weight-complex="bold"/>
    </style:style>
    <style:style style:name="P68" style:family="paragraph" style:parent-style-name="Standard">
      <style:paragraph-properties fo:margin-top="0in" fo:margin-bottom="0.1965in" style:contextual-spacing="false"/>
      <style:text-properties fo:color="#000000" loext:opacity="100%" style:font-name="Liberation Mono" fo:font-size="8pt" fo:font-weight="bold" officeooo:rsid="0015a29f" officeooo:paragraph-rsid="00234d93" style:font-size-asian="8pt" style:font-weight-asian="bold" style:font-size-complex="8pt" style:font-weight-complex="bold"/>
    </style:style>
    <style:style style:name="P69" style:family="paragraph" style:parent-style-name="Text_20_body">
      <style:paragraph-properties fo:text-align="center" style:justify-single-word="false"/>
      <style:text-properties officeooo:paragraph-rsid="00234d93"/>
    </style:style>
    <style:style style:name="P70" style:family="paragraph" style:parent-style-name="Text_20_body">
      <style:text-properties fo:color="#999999" loext:opacity="100%" style:font-name="Liberation Mono" fo:font-size="8pt" fo:font-weight="bold" style:font-size-asian="8pt" style:font-weight-asian="bold" style:font-size-complex="8pt" style:font-weight-complex="bold"/>
    </style:style>
    <style:style style:name="P71" style:family="paragraph" style:parent-style-name="Heading_20_2">
      <style:text-properties fo:color="#000000" loext:opacity="100%" style:font-name="Liberation Mono" fo:font-size="8pt" fo:font-weight="bold" style:font-size-asian="8pt" style:font-weight-asian="bold" style:font-size-complex="8pt" style:font-weight-complex="bold"/>
    </style:style>
    <style:style style:name="P72" style:family="paragraph" style:parent-style-name="Text_20_body">
      <style:text-properties fo:color="#000000" loext:opacity="100%" style:font-name="Liberation Mono" fo:font-size="8pt" fo:font-weight="bold" style:font-size-asian="8pt" style:font-weight-asian="bold" style:font-size-complex="8pt" style:font-weight-complex="bold"/>
    </style:style>
    <style:style style:name="P73" style:family="paragraph" style:parent-style-name="Text_20_body" style:list-style-name="L12">
      <style:text-properties fo:color="#000000" loext:opacity="100%" style:font-name="Liberation Mono" fo:font-size="8pt" fo:font-weight="bold" style:font-size-asian="8pt" style:font-weight-asian="bold" style:font-size-complex="8pt" style:font-weight-complex="bold"/>
    </style:style>
    <style:style style:name="P74" style:family="paragraph" style:parent-style-name="Text_20_body" style:list-style-name="L13">
      <style:text-properties fo:color="#000000" loext:opacity="100%" style:font-name="Liberation Mono" fo:font-size="8pt" fo:font-weight="bold" style:font-size-asian="8pt" style:font-weight-asian="bold" style:font-size-complex="8pt" style:font-weight-complex="bold"/>
    </style:style>
    <style:style style:name="P75" style:family="paragraph" style:parent-style-name="Heading_20_3">
      <style:text-properties fo:color="#000000" loext:opacity="100%" style:font-name="Liberation Mono" fo:font-size="8pt" fo:font-weight="bold" style:font-size-asian="8pt" style:font-weight-asian="bold" style:font-size-complex="8pt" style:font-weight-complex="bold"/>
    </style:style>
    <style:style style:name="P76" style:family="paragraph" style:parent-style-name="Text_20_body">
      <style:text-properties fo:color="#000000" loext:opacity="100%" style:font-name="Google Sans Text" fo:font-size="8pt" fo:font-weight="bold" style:font-size-asian="8pt" style:font-weight-asian="bold" style:font-size-complex="8pt" style:font-weight-complex="bold"/>
    </style:style>
    <style:style style:name="P77" style:family="paragraph" style:parent-style-name="Text_20_body">
      <style:paragraph-properties fo:margin-left="0in" fo:margin-right="0in" fo:margin-top="0in" fo:margin-bottom="0.0972in" style:contextual-spacing="false" fo:line-height="114%" fo:text-indent="0in" style:auto-text-indent="false"/>
      <style:text-properties fo:color="#000000" loext:opacity="100%" style:font-name="Liberation Mono" fo:font-size="8pt" fo:font-weight="bold" style:font-size-asian="8pt" style:font-weight-asian="bold" style:font-size-complex="8pt" style:font-weight-complex="bold"/>
    </style:style>
    <style:style style:name="P78" style:family="paragraph" style:parent-style-name="Text_20_body">
      <style:text-properties fo:color="#000000" loext:opacity="100%" style:font-name="Liberation Mono" fo:font-size="8pt" fo:font-weight="bold" officeooo:rsid="003457cd" officeooo:paragraph-rsid="003457cd" style:font-size-asian="8pt" style:font-weight-asian="bold" style:font-size-complex="8pt" style:font-weight-complex="bold"/>
    </style:style>
    <style:style style:name="P79" style:family="paragraph" style:parent-style-name="Text_20_body" style:list-style-name="L14">
      <style:text-properties fo:color="#000000" loext:opacity="100%" style:font-name="Liberation Mono" fo:font-size="8pt" fo:font-weight="bold" style:font-size-asian="8pt" style:font-weight-asian="bold" style:font-size-complex="8pt" style:font-weight-complex="bold"/>
    </style:style>
    <style:style style:name="P80" style:family="paragraph" style:parent-style-name="Text_20_body">
      <style:text-properties style:font-name="Liberation Mono" fo:font-size="8pt" style:font-size-asian="8pt" style:font-size-complex="8pt"/>
    </style:style>
    <style:style style:name="P81" style:family="paragraph" style:parent-style-name="Text_20_body">
      <style:text-properties style:font-name="Liberation Mono" fo:font-size="16pt" officeooo:rsid="00386e1f" officeooo:paragraph-rsid="00386e1f" style:font-size-asian="16pt" style:font-size-complex="16pt"/>
    </style:style>
    <style:style style:name="P82" style:family="paragraph" style:parent-style-name="Text_20_body">
      <style:text-properties style:font-name="Liberation Mono" fo:font-size="8pt" officeooo:rsid="00386e1f" officeooo:paragraph-rsid="00386e1f" style:font-size-asian="7pt" style:font-size-complex="8pt"/>
    </style:style>
    <style:style style:name="P83" style:family="paragraph" style:parent-style-name="Text_20_body">
      <style:text-properties style:font-name="Liberation Mono" fo:font-size="8pt" officeooo:rsid="00386e1f" officeooo:paragraph-rsid="00386e1f" style:font-size-asian="8pt" style:font-size-complex="8pt"/>
    </style:style>
    <style:style style:name="P84" style:family="paragraph" style:parent-style-name="Text_20_body">
      <style:paragraph-properties fo:margin-left="0in" fo:margin-right="0in" fo:margin-top="0in" fo:margin-bottom="0.0972in" style:contextual-spacing="false" fo:line-height="114%" fo:text-indent="0in" style:auto-text-indent="false"/>
      <style:text-properties style:font-name="Liberation Mono" fo:font-size="8pt" officeooo:rsid="00386e1f" style:font-size-asian="8pt" style:font-size-complex="8pt"/>
    </style:style>
    <style:style style:name="P85" style:family="paragraph" style:parent-style-name="Heading_20_2">
      <style:text-properties style:font-name="Liberation Mono" fo:font-size="8pt" officeooo:rsid="00386e1f" officeooo:paragraph-rsid="00386e1f" style:font-size-asian="8pt" style:font-size-complex="8pt"/>
    </style:style>
    <style:style style:name="P86"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size="8pt" officeooo:rsid="00386e1f" style:font-size-asian="8pt" style:font-size-complex="8pt"/>
    </style:style>
    <style:style style:name="P87" style:family="paragraph" style:parent-style-name="Text_20_body" style:list-style-name="L15">
      <style:paragraph-properties fo:margin-left="0in" fo:margin-right="0in" fo:margin-top="0in" fo:margin-bottom="0.0972in" style:contextual-spacing="false" fo:line-height="114%" fo:text-indent="0in" style:auto-text-indent="false" fo:padding="0in" fo:border="none"/>
      <style:text-properties style:font-name="Liberation Mono" fo:font-size="8pt" officeooo:rsid="00386e1f" style:font-size-asian="8pt" style:font-size-complex="8pt"/>
    </style:style>
    <style:style style:name="P88" style:family="paragraph" style:parent-style-name="Text_20_body" style:list-style-name="L15">
      <style:paragraph-properties fo:margin-left="0in" fo:margin-right="0in" fo:margin-top="0in" fo:margin-bottom="0.0972in" style:contextual-spacing="false" fo:line-height="114%" fo:text-indent="0in" style:auto-text-indent="false" fo:padding="0in" fo:border="none"/>
      <style:text-properties style:font-name="Google Sans Text" fo:font-size="8pt" officeooo:rsid="00386e1f" style:font-size-asian="8pt" style:font-size-complex="8pt"/>
    </style:style>
    <style:style style:name="P89" style:family="paragraph" style:parent-style-name="Text_20_body">
      <style:text-properties style:font-name="Liberation Mono" fo:font-size="8pt" officeooo:rsid="00386e1f" style:font-size-asian="8pt" style:font-size-complex="8pt"/>
    </style:style>
    <style:style style:name="P90" style:family="paragraph" style:parent-style-name="Heading_20_3">
      <style:paragraph-properties fo:margin-left="0in" fo:margin-right="0in" fo:margin-top="0in" fo:margin-bottom="0.0972in" style:contextual-spacing="false" fo:line-height="114%" fo:text-indent="0in" style:auto-text-indent="false"/>
      <style:text-properties style:font-name="Liberation Mono" fo:font-size="8pt" officeooo:rsid="00386e1f" style:font-size-asian="8pt" style:font-size-complex="8pt"/>
    </style:style>
    <style:style style:name="P91" style:family="paragraph" style:parent-style-name="Heading_20_3">
      <style:text-properties style:font-name="Liberation Mono" fo:font-size="8pt" officeooo:rsid="00386e1f" officeooo:paragraph-rsid="00386e1f" style:font-size-asian="8pt" style:font-size-complex="8pt"/>
    </style:style>
    <style:style style:name="P92" style:family="paragraph" style:parent-style-name="Text_20_body">
      <style:text-properties style:font-name="Google Sans Text" fo:font-size="8pt" officeooo:rsid="00386e1f" officeooo:paragraph-rsid="00386e1f" style:font-size-asian="8pt" style:font-size-complex="8pt"/>
    </style:style>
    <style:style style:name="P93" style:family="paragraph" style:parent-style-name="Text_20_body">
      <style:text-properties style:font-name="Liberation Mono" fo:font-size="8pt" officeooo:rsid="0041caf7" officeooo:paragraph-rsid="0041caf7" style:font-size-asian="8pt" style:font-size-complex="8pt"/>
    </style:style>
    <style:style style:name="P94" style:family="paragraph" style:parent-style-name="Heading_20_2">
      <style:text-properties style:font-name="Liberation Mono" fo:font-size="8pt" officeooo:rsid="0041caf7" officeooo:paragraph-rsid="0041caf7" style:font-size-asian="8pt" style:font-size-complex="8pt"/>
    </style:style>
    <style:style style:name="P95"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size="8pt" officeooo:rsid="0041caf7" style:font-size-asian="8pt" style:font-size-complex="8pt"/>
    </style:style>
    <style:style style:name="P96" style:family="paragraph" style:parent-style-name="Text_20_body">
      <style:text-properties style:font-name="Google Sans Text" fo:font-size="8pt" officeooo:rsid="0041caf7" officeooo:paragraph-rsid="0041caf7" style:font-size-asian="8pt" style:font-size-complex="8pt"/>
    </style:style>
    <style:style style:name="P97" style:family="paragraph" style:parent-style-name="Heading_20_3">
      <style:paragraph-properties fo:margin-left="0in" fo:margin-right="0in" fo:margin-top="0in" fo:margin-bottom="0.0972in" style:contextual-spacing="false" fo:line-height="114%" fo:text-indent="0in" style:auto-text-indent="false"/>
      <style:text-properties style:font-name="Liberation Mono" fo:font-size="8pt" officeooo:rsid="0041caf7" style:font-size-asian="8pt" style:font-size-complex="8pt"/>
    </style:style>
    <style:style style:name="P98" style:family="paragraph" style:parent-style-name="Heading_20_3">
      <style:text-properties style:font-name="Liberation Mono" fo:font-size="8pt" officeooo:rsid="0041caf7" officeooo:paragraph-rsid="0041caf7" style:font-size-asian="8pt" style:font-size-complex="8pt"/>
    </style:style>
    <style:style style:name="P99" style:family="paragraph" style:parent-style-name="Text_20_body">
      <style:text-properties style:font-name="Liberation Mono" fo:font-size="8pt" officeooo:rsid="0041caf7" style:font-size-asian="8pt" style:font-size-complex="8pt"/>
    </style:style>
    <style:style style:name="P100" style:family="paragraph" style:parent-style-name="Text_20_body">
      <style:text-properties style:font-name="Liberation Mono" officeooo:rsid="0041caf7" style:font-size-asian="12pt"/>
    </style:style>
    <style:style style:name="P101" style:family="paragraph" style:parent-style-name="Quotations">
      <style:paragraph-properties fo:margin-top="0in" fo:margin-bottom="0.0972in" style:contextual-spacing="false" fo:line-height="115%"/>
      <style:text-properties style:font-name="Liberation Mono" officeooo:rsid="0041caf7" style:font-size-asian="12pt"/>
    </style:style>
    <style:style style:name="P102" style:family="paragraph" style:parent-style-name="Text_20_body">
      <style:text-properties style:font-name="Liberation Mono" fo:font-size="12pt" officeooo:rsid="0041caf7" officeooo:paragraph-rsid="0041caf7" style:font-size-asian="12pt" style:font-size-complex="12pt"/>
    </style:style>
    <style:style style:name="P103" style:family="paragraph" style:parent-style-name="Text_20_body">
      <style:text-properties style:font-name="Liberation Mono" fo:font-size="8pt" officeooo:rsid="004cd44d" officeooo:paragraph-rsid="004cd44d" style:font-size-asian="8pt" style:font-size-complex="8pt"/>
    </style:style>
    <style:style style:name="P104" style:family="paragraph" style:parent-style-name="Text_20_body">
      <style:text-properties style:font-name="Liberation Mono" fo:font-size="8pt" officeooo:rsid="004cd44d" style:font-size-asian="8pt" style:font-size-complex="8pt"/>
    </style:style>
    <style:style style:name="P105" style:family="paragraph" style:parent-style-name="Heading_20_3">
      <style:paragraph-properties fo:margin-top="0in" fo:margin-bottom="0.0972in" style:contextual-spacing="false" fo:line-height="115%"/>
      <style:text-properties style:font-name="Liberation Mono" fo:font-size="8pt" officeooo:rsid="0041caf7" style:font-size-asian="8pt" style:font-size-complex="8pt"/>
    </style:style>
    <style:style style:name="P106" style:family="paragraph" style:parent-style-name="Text_20_body" style:list-style-name="L16">
      <style:text-properties style:font-name="Liberation Mono" fo:font-size="8pt" officeooo:rsid="0041caf7" style:font-size-asian="8pt" style:font-size-complex="8pt"/>
    </style:style>
    <style:style style:name="P107" style:family="paragraph" style:parent-style-name="Text_20_body">
      <style:text-properties style:font-name="Liberation Mono" fo:font-size="8pt" officeooo:rsid="005b9c75" officeooo:paragraph-rsid="005b9c75" style:font-size-asian="8pt" style:font-size-complex="8pt"/>
    </style:style>
    <style:style style:name="P108" style:family="paragraph" style:parent-style-name="Heading_20_4">
      <style:paragraph-properties fo:margin-top="0in" fo:margin-bottom="0.0972in" style:contextual-spacing="false" fo:line-height="115%"/>
      <style:text-properties style:font-name="Liberation Mono" fo:font-size="8pt" officeooo:rsid="0041caf7" style:font-size-asian="8pt" style:font-size-complex="8pt"/>
    </style:style>
    <style:style style:name="P109" style:family="paragraph" style:parent-style-name="Text_20_body" style:list-style-name="L17">
      <style:text-properties style:font-name="Liberation Mono" fo:font-size="8pt" officeooo:rsid="0041caf7" style:font-size-asian="8pt" style:font-size-complex="8pt"/>
    </style:style>
    <style:style style:name="P110" style:family="paragraph" style:parent-style-name="Quotations">
      <style:paragraph-properties fo:margin-top="0in" fo:margin-bottom="0.0972in" style:contextual-spacing="false" fo:line-height="115%"/>
      <style:text-properties style:font-name="Liberation Mono" fo:font-size="8pt" officeooo:rsid="0041caf7" style:font-size-asian="8pt" style:font-size-complex="8pt"/>
    </style:style>
    <style:style style:name="P111" style:family="paragraph" style:parent-style-name="Text_20_body" style:list-style-name="L18">
      <style:text-properties style:font-name="Liberation Mono" fo:font-size="8pt" officeooo:rsid="0041caf7" style:font-size-asian="8pt" style:font-size-complex="8pt"/>
    </style:style>
    <style:style style:name="P112" style:family="paragraph" style:parent-style-name="Text_20_body">
      <style:text-properties style:font-name="Liberation Mono" fo:font-size="8pt" officeooo:rsid="0069969f" officeooo:paragraph-rsid="0041caf7" style:font-size-asian="8pt" style:font-size-complex="8pt"/>
    </style:style>
    <style:style style:name="P113" style:family="paragraph" style:parent-style-name="Text_20_body">
      <style:text-properties style:font-name="Liberation Mono" fo:font-size="8pt" fo:font-weight="bold" officeooo:rsid="0069969f" officeooo:paragraph-rsid="0041caf7" style:font-size-asian="8pt" style:font-size-complex="8pt"/>
    </style:style>
    <style:style style:name="P114" style:family="paragraph" style:parent-style-name="Heading_20_3">
      <style:text-properties style:font-name="Liberation Mono" fo:font-size="8pt" fo:font-weight="bold" officeooo:rsid="0069969f" officeooo:paragraph-rsid="0041caf7" style:font-size-asian="8pt" style:font-size-complex="8pt"/>
    </style:style>
    <style:style style:name="P115" style:family="paragraph" style:parent-style-name="Text_20_body">
      <style:text-properties style:font-name="Liberation Mono" fo:font-size="8pt" fo:font-weight="bold" officeooo:rsid="0069969f" style:font-size-asian="8pt" style:font-size-complex="8pt"/>
    </style:style>
    <style:style style:name="P116" style:family="paragraph" style:parent-style-name="Text_20_body">
      <style:text-properties style:font-name="Liberation Mono" fo:font-size="8pt" fo:font-style="italic" fo:font-weight="bold" officeooo:rsid="0069969f" officeooo:paragraph-rsid="0041caf7" style:font-size-asian="8pt" style:font-size-complex="8pt"/>
    </style:style>
    <style:style style:name="P117" style:family="paragraph" style:parent-style-name="Text_20_body" style:list-style-name="L19">
      <style:text-properties style:font-name="Liberation Mono" fo:font-size="8pt" fo:font-weight="bold" officeooo:rsid="0069969f" style:font-size-asian="8pt" style:font-size-complex="8pt"/>
    </style:style>
    <style:style style:name="P118" style:family="paragraph" style:parent-style-name="Heading_20_2">
      <style:text-properties style:font-name="Liberation Mono" fo:font-size="8pt" fo:font-weight="bold" officeooo:rsid="0069969f" officeooo:paragraph-rsid="0041caf7" style:font-size-asian="8pt" style:font-size-complex="8pt"/>
    </style:style>
    <style:style style:name="T1" style:family="text">
      <style:text-properties style:font-name="Liberation Mono" fo:font-weight="bold"/>
    </style:style>
    <style:style style:name="T2" style:family="text">
      <style:text-properties style:font-name="Liberation Mono"/>
    </style:style>
    <style:style style:name="T3" style:family="text">
      <style:text-properties fo:font-weight="bold"/>
    </style:style>
    <style:style style:name="T4" style:family="text">
      <style:text-properties style:font-name="Google Sans Text"/>
    </style:style>
    <style:style style:name="T5" style:family="text">
      <style:text-properties fo:font-style="italic"/>
    </style:style>
    <style:style style:name="T6" style:family="text">
      <style:text-properties fo:color="#999999" loext:opacity="100%"/>
    </style:style>
    <style:style style:name="T7" style:family="text">
      <style:text-properties fo:color="#000000" loext:opacity="100%" style:font-name="Google Sans Text"/>
    </style:style>
    <style:style style:name="T8" style:family="text">
      <style:text-properties fo:color="#000000" loext:opacity="100%" style:font-name="Google Sans"/>
    </style:style>
    <style:style style:name="T9" style:family="text">
      <style:text-properties style:font-name="Google Sans"/>
    </style:style>
    <style:style style:name="T10" style:family="text">
      <style:text-properties fo:color="#111111" loext:opacity="100%"/>
    </style:style>
    <style:style style:name="T11" style:family="text">
      <style:text-properties style:font-name="Google Sans Text" fo:font-style="italic"/>
    </style:style>
    <style:style style:name="T12" style:family="text">
      <style:text-properties fo:color="#000000" loext:opacity="100%"/>
    </style:style>
    <style:style style:name="T13" style:family="text">
      <style:text-properties fo:color="#000000" loext:opacity="100%" fo:font-size="9pt" style:font-size-asian="9pt" style:font-size-complex="9pt"/>
    </style:style>
    <style:style style:name="T14" style:family="text">
      <style:text-properties style:font-name="Liberation Mono" fo:font-size="8pt" fo:font-weight="bold" style:font-size-asian="8pt" style:font-weight-asian="bold" style:font-size-complex="8pt" style:font-weight-complex="bold"/>
    </style:style>
    <style:style style:name="T15" style:family="text">
      <style:text-properties style:font-name="Liberation Mono" fo:font-size="8pt" fo:font-style="italic" fo:font-weight="bold" style:font-size-asian="8pt" style:font-weight-asian="bold" style:font-size-complex="8pt" style:font-weight-complex="bold"/>
    </style:style>
    <style:style style:name="T16" style:family="text">
      <style:text-properties officeooo:rsid="003284b5"/>
    </style:style>
    <style:style style:name="T17" style:family="text">
      <style:text-properties style:font-name="Google Sans Text" fo:font-weight="bold"/>
    </style:style>
    <style:style style:name="T18" style:family="text">
      <style:text-properties fo:font-size="8pt" style:font-size-asian="8pt" style:font-size-complex="8pt"/>
    </style:style>
    <style:style style:name="T19" style:family="text">
      <style:text-properties fo:font-size="8pt" fo:font-weight="bold"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As Tecnologias do Nosso Projeto</text:h>
      <text:p text:style-name="P2"/>
      <text:list text:style-name="L1">
        <text:list-item>
          <text:p text:style-name="P3">Backend: Go (Golang) com o framework Gin</text:p>
          <text:list>
            <text:list-item>
              <text:p text:style-name="P4"><text:span text:style-name="T1">O que é:</text:span><text:span text:style-name="T2"> Go é uma linguagem criada pelo Google. Ela é extremamente rápida e consome pouquíssima memória. O Gin é uma biblioteca (framework) que nos ajuda a criar as "portas de entrada" (rotas) do sistema (ex: </text:span><text:span text:style-name="Source_20_Text"><text:span text:style-name="T2">/patients</text:span></text:span><text:span text:style-name="T2">, </text:span><text:span text:style-name="Source_20_Text"><text:span text:style-name="T2">/login</text:span></text:span><text:span text:style-name="T2">).</text:span></text:p>
            </text:list-item>
          </text:list>
        </text:list-item>
        <text:list-item>
          <text:p text:style-name="P3">Banco de Dados: PostgreSQL</text:p>
          <text:list>
            <text:list-item>
              <text:p text:style-name="P5"><text:bookmark text:name="p-rc_d646d65258261c9b-134"/><text:span text:style-name="T3">O que é:</text:span> É um banco de dados relacional. Pense nele como uma coleção de planilhas altamente inteligentes e seguras que se conectam entre si. Como seu sistema lida com saúde, receitas e financeiro, precisamos da segurança absoluta do Postgres para que nenhum dado se perca ou fique desorganizado. </text:p>
            </text:list-item>
          </text:list>
        </text:list-item>
        <text:list-item>
          <text:p text:style-name="P3">Frontend: Next.js (React) + TailwindCSS</text:p>
          <text:list>
            <text:list-item>
              <text:p text:style-name="P5"><text:bookmark text:name="p-rc_d646d65258261c9b-135"/><text:span text:style-name="T3">O que é:</text:span> O Next.js será a tecnologia para construir as telas que a secretaria, os médicos e a farmácia vão usar no navegador. O TailwindCSS é uma ferramenta que nos ajuda a deixar o design bonito e moderno de forma rápida. </text:p>
            </text:list-item>
          </text:list>
        </text:list-item>
      </text:list>
      <text:p text:style-name="P6"/>
      <text:p text:style-name="P7">📂 Organizando a Árvore de Pastas (O Esqueleto)</text:p>
      <text:p text:style-name="P8"/>
      <text:p text:style-name="P8">Clean Architecture:</text:p>
      <text:p text:style-name="P8"/>
      <text:p text:style-name="P9"/>
      <text:p text:style-name="P10">cannacare/</text:p>
      <text:p text:style-name="P10">├── cmd/</text:p>
      <text:p text:style-name="P10">│ <text:s text:c="2"/>└── api/</text:p>
      <text:p text:style-name="P10">│ <text:s text:c="6"/>└── main.go <text:s text:c="8"/># O "interruptor" do sistema. É aqui que o software liga.</text:p>
      <text:p text:style-name="P10">├── internal/ <text:s text:c="14"/># Onde fica toda a lógica protegida do sistema.</text:p>
      <text:p text:style-name="P10">│ <text:s text:c="2"/>├── config/ <text:s text:c="12"/># Código que lê as senhas e configurações (arquivo .env).</text:p>
      <text:p text:style-name="P11">│ <text:s text:c="2"/>├── domain/ <text:s text:c="12"/># CAMADA 1: O Coração. Aqui definimos o que é um Paciente, uma Receita, <text:s text:c="3"/>│ <text:s text:c="2"/>│ <text:s/><text:tab/><text:tab/><text:tab/><text:tab/>etc.</text:p>
      <text:p text:style-name="P11">│ <text:s text:c="2"/>├── application/ <text:s text:c="7"/># CAMADA 2: Os Casos de Uso. As regras (ex: "Aprovar Paciente", "Baixa</text:p>
      <text:p text:style-name="P11">│ <text:s text:c="2"/>│<text:tab/><text:tab/><text:tab/><text:tab/>Estoque").</text:p>
      <text:p text:style-name="P11">│ <text:s text:c="2"/>├── infrastructure/ <text:s text:c="4"/># CAMADA 3: Ferramentas externas. Conexão com o Banco de Dados e upload de │ <text:s text:c="2"/>│<text:tab/><text:tab/><text:tab/><text:tab/>PDFs.</text:p>
      <text:p text:style-name="P11">│ <text:s text:c="2"/>└── interfaces/ <text:s text:c="8"/># CAMADA 4: Comunicação. Onde o Go recebe os dados vindos das telas do <text:s text:c="4"/>│<text:tab/><text:tab/><text:tab/><text:tab/>Frontend.</text:p>
      <text:p text:style-name="P11">├── migrations/ <text:s text:c="12"/># Arquivos contendo os comandos SQL para criar as tabelas no banco de <text:s text:c="5"/>│<text:tab/><text:tab/><text:tab/><text:tab/>dados.</text:p>
      <text:p text:style-name="P11">├── docker-compose.yml <text:s text:c="5"/># Arquivo que instala e roda o PostgreSQL no seu computador de forma <text:s text:c="6"/>│<text:tab/><text:tab/><text:tab/><text:tab/>isolada.</text:p>
      <text:p text:style-name="P10">└── .env <text:s text:c="19"/># Arquivo secreto onde ficam as senhas e portas do sistema.</text:p>
      <text:p text:style-name="P10"/>
      <text:p text:style-name="P10"/>
      <text:p text:style-name="P10"/>
      <text:p text:style-name="P10"/>
      <text:p text:style-name="P10"/>
      <text:p text:style-name="P10"/>
      <text:p text:style-name="P10"/>
      <text:p text:style-name="P10"><text:soft-page-break/></text:p>
      <text:p text:style-name="P10"/>
      <text:h text:style-name="P12" text:outline-level="2">📝 O Nosso Primeiro Passo Prático</text:h>
      <text:p text:style-name="P13">Para começarmos a construir sem pressa, vamos focar no Passo 1: Ligar o motor.</text:p>
      <text:p text:style-name="P13">Antes de programar as telas ou o cadastro de pacientes, precisamos fazer com que:</text:p>
      <text:list text:style-name="L2">
        <text:list-item>
          <text:p text:style-name="P14">O PostgreSQL rode no seu computador via Docker.</text:p>
        </text:list-item>
        <text:list-item>
          <text:p text:style-name="P14">O Go consiga ler as configurações de senha.</text:p>
        </text:list-item>
        <text:list-item>
          <text:p text:style-name="P14">O Go se conecte com esse banco com sucesso.</text:p>
        </text:list-item>
      </text:list>
      <text:p text:style-name="P15">Iniciando a primeira etapa:</text:p>
      <text:p text:style-name="P16">Nesta etapa, vamos fazer três coisas:</text:p>
      <text:list text:style-name="L3">
        <text:list-item>
          <text:p text:style-name="P17"><text:span text:style-name="T4">Criar o arquivo que guarda as senhas e configurações do sistema (</text:span><text:span text:style-name="Source_20_Text"><text:span text:style-name="T4">.env</text:span></text:span><text:span text:style-name="T4">).</text:span></text:p>
        </text:list-item>
        <text:list-item>
          <text:p text:style-name="P18"><text:bookmark text:name="p-rc_711feb613a723c84-145"/>Criar e ligar o banco de dados PostgreSQL usando o Docker. </text:p>
        </text:list-item>
        <text:list-item>
          <text:p text:style-name="P18">Inicializar o projeto no Go.</text:p>
        </text:list-item>
      </text:list>
      <text:p text:style-name="P19"/>
      <text:h text:style-name="P20" text:outline-level="3">Passo 1: Criando o arquivo de configurações (<text:span text:style-name="Source_20_Text">.env</text:span>)</text:h>
      <text:p text:style-name="P13">No desenvolvimento de software, nunca colocamos senhas ou portas diretamente no código. Nós usamos um arquivo oculto chamado <text:span text:style-name="Source_20_Text">.env</text:span> (de <text:span text:style-name="T5">environment</text:span>, ou ambiente).</text:p>
      <text:p text:style-name="P13">Execute o comando abaixo para criar esse arquivo:</text:p>
      <text:p text:style-name="Text_20_body">cat &gt; .env &lt;&lt; 'EOF' PORT=8080 DB_HOST=localhost DB_PORT=5432 DB_USER=postgres DB_PASSWORD=senha_cannacare_2026 DB_NAME=cannacare_db DB_SSLMODE=disable EOF</text:p>
      <text:p text:style-name="Text_20_body"/>
      <text:p text:style-name="Text_20_body"><text:span text:style-name="T3">O que isso fez?</text:span> Criou um arquivo de texto simples que diz ao sistema que nossa API vai rodar na porta <text:span text:style-name="Source_20_Text">8080</text:span> e que o banco de dados se chamará</text:p>
      <text:p text:style-name="Text_20_body"/>
      <text:p text:style-name="P10"/>
      <text:h text:style-name="P21" text:outline-level="3">Passo 2: Criando e ligando o Banco de Dados com Docker</text:h>
      <text:p text:style-name="P22"><text:bookmark text:name="p-rc_711feb613a723c84-147"/><text:span text:style-name="T4">Em vez de você ter que baixar e instalar o PostgreSQL no seu sistema operacional, vamos usar o Docker. Ele cria uma "caixa isolada" (um container) contendo o banco de dados prontinho para uso, com as mesmas senhas que definimos no </text:span><text:span text:style-name="Source_20_Text"><text:span text:style-name="T4">.env</text:span></text:span><text:span text:style-name="T4">. </text:span></text:p>
      <text:p text:style-name="P23">Execute o comando abaixo para criar o arquivo de configuração do Docker:</text:p>
      <text:p text:style-name="P24"/>
      <text:p text:style-name="Text_20_body">cat &gt; docker-compose.yml &lt;&lt; 'EOF' version: '3.8'</text:p>
      <text:p text:style-name="Text_20_body">services: postgres: image: postgres:15-alpine container_name: cannacare_postgres environment: POSTGRES_USER: postgres POSTGRES_PASSWORD: senha_cannacare_2026 POSTGRES_DB: cannacare_db ports: - "5432:5432" volumes: - postgres_data:/var/lib/postgresql/data restart: always</text:p>
      <text:p text:style-name="Text_20_body">volumes: postgres_data: EOF</text:p>
      <text:p text:style-name="Text_20_body"/>
      <text:p text:style-name="Text_20_body"><text:soft-page-break/></text:p>
      <text:p text:style-name="Text_20_body">Agora, para <text:span text:style-name="T3">ligar</text:span> o banco de dados de verdade, execute o seguinte comando:</text:p>
      <text:p text:style-name="Text_20_body">docker compose up -d</text:p>
      <text:p text:style-name="Text_20_body"><text:span text:style-name="T3">Nota:</text:span> O símbolo <text:span text:style-name="Source_20_Text">-d</text:span> significa <text:span text:style-name="T5">detached</text:span> (em segundo plano). O terminal vai baixar o Postgres (se você não tiver) e deixá-lo rodando quietinho no computador.</text:p>
      <text:p text:style-name="P10"/>
      <text:p text:style-name="P10">Agora vamos dizer para o Go que esta pasta é um projeto oficial que vai usar o seu novo repositório do GitHub. Execute o comando abaixo:</text:p>
      <text:p text:style-name="P10"/>
      <text:p text:style-name="P10"/>
      <text:p text:style-name="P10">go mod init GitHubAlves150/cannacare-app-V2/cannacare</text:p>
      <text:p text:style-name="P10"/>
      <text:p text:style-name="P10">O que isso fez? Ele criou um arquivo chamado <text:span text:style-name="Source_20_Text">go.mod</text:span>. Pense nele como o diário de bordo do Go. É ali que o Go vai anotar todas as bibliotecas e versões que instalarmos daqui para frente (como o framework Gin).</text:p>
      <text:p text:style-name="P10"/>
      <text:h text:style-name="P20" text:outline-level="3">🚦 Momento de Verificação</text:h>
      <text:p text:style-name="P13">Antes de avançarmos para escrever o código em Go que conecta nesse banco, precisamos ter certeza de que o Docker funcionou.</text:p>
      <text:p text:style-name="P13">Execute este comando no seu terminal:</text:p>
      <text:p text:style-name="P25"><text:span text:style-name="Source_20_Text"><text:span text:style-name="T6">docker ps</text:span></text:span></text:p>
      <text:p text:style-name="P13">Você deverá ver uma linha na tabela mostrando o container <text:span text:style-name="Source_20_Text">cannacare_postgres</text:span> com o status <text:span text:style-name="Source_20_Text">Up</text:span> (Ativo/Rodando).</text:p>
      <text:p text:style-name="P13">Deu tudo certo até aqui? O container apareceu como ativo? Assim que me confirmar, passaremos para a criação das primeiras pastas e o código em Go para testar a conexão com o banco!</text:p>
      <text:p text:style-name="P10"/>
      <text:p text:style-name="P13"><text:bookmark text:name="p-rc_70cf0107718608c0-167"/><text:span text:style-name="T4">Agora vamos dar o nosso segundo passo prático: criar o código em Go que lê o arquivo </text:span><text:span text:style-name="Source_20_Text"><text:span text:style-name="T4">.env</text:span></text:span><text:span text:style-name="T4"> e abre as portas de comunicação com o PostgreSQL. </text:span></text:p>
      <text:p text:style-name="P23">Como estamos indo com calma, vamos dividir essa etapa em 3 partes:</text:p>
      <text:list text:style-name="L4">
        <text:list-item>
          <text:p text:style-name="P26"><text:bookmark text:name="p-rc_70cf0107718608c0-168"/>Baixar as bibliotecas que o Go vai precisar. </text:p>
        </text:list-item>
        <text:list-item>
          <text:p text:style-name="P26"><text:bookmark text:name="p-rc_70cf0107718608c0-169"/>Criar as pastas e os arquivos de configuração. </text:p>
        </text:list-item>
        <text:list-item>
          <text:p text:style-name="P27"><text:bookmark text:name="p-rc_70cf0107718608c0-170"/><text:span text:style-name="T4">Criar o arquivo principal (</text:span><text:span text:style-name="Source_20_Text"><text:span text:style-name="T4">main.go</text:span></text:span><text:span text:style-name="T4">) para testar se tudo liga perfeitamente. </text:span></text:p>
        </text:list-item>
      </text:list>
      <text:h text:style-name="P28" text:outline-level="3">Passo 1: Baixando as dependências</text:h>
      <text:p text:style-name="P22"><text:bookmark text:name="p-rc_70cf0107718608c0-171"/><text:span text:style-name="T4">O Go vem com muitas ferramentas nativas, mas para ler arquivos </text:span><text:span text:style-name="Source_20_Text"><text:span text:style-name="T4">.env</text:span></text:span><text:span text:style-name="T4"> e conectar ao Postgres de forma mais prática, usamos duas bibliotecas muito famosas no mercado: </text:span></text:p>
      <text:list text:style-name="L5">
        <text:list-item>
          <text:p text:style-name="P29"><text:bookmark text:name="p-rc_70cf0107718608c0-172"/><text:span text:style-name="Source_20_Text"><text:span text:style-name="T4">godotenv</text:span></text:span><text:span text:style-name="T4">: Serve para ler nosso arquivo </text:span><text:span text:style-name="Source_20_Text"><text:span text:style-name="T4">.env</text:span></text:span><text:span text:style-name="T4">. </text:span></text:p>
        </text:list-item>
        <text:list-item>
          <text:p text:style-name="P29"><text:bookmark text:name="p-rc_70cf0107718608c0-173"/><text:span text:style-name="Source_20_Text"><text:span text:style-name="T4">lib/pq</text:span></text:span><text:span text:style-name="T4">: É o "driver" que ensina o Go a falar o idioma do PostgreSQL. </text:span></text:p>
        </text:list-item>
      </text:list>
      <text:p text:style-name="P23">Copie e cole este comando no seu terminal para baixá-las:</text:p>
      <text:p text:style-name="P30">go get github.com/joho/godotenv</text:p>
      <text:p text:style-name="P30">go get github.com/lib/pq</text:p>
      <text:p text:style-name="P30"/>
      <text:h text:style-name="P31" text:outline-level="3">Passo 2: Criando a estrutura de pastas e arquivos de conexão</text:h>
      <text:p text:style-name="P32"><text:bookmark text:name="p-rc_70cf0107718608c0-174"/><text:span text:style-name="T7">Agora vamos usar o comando </text:span><text:span text:style-name="Source_20_Text"><text:span text:style-name="T7">mkdir -p</text:span></text:span><text:span text:style-name="T7"> para criar as pastas da nossa arquitetura e, em seguida, criaremos dois arquivos cruciais: </text:span></text:p>
      <text:list text:style-name="L6">
        <text:list-item>
          <text:p text:style-name="P33"><text:bookmark text:name="p-rc_70cf0107718608c0-175"/><text:span text:style-name="Source_20_Text"><text:span text:style-name="T7">config.go</text:span></text:span><text:span text:style-name="T7">: Vai ler o </text:span><text:span text:style-name="Source_20_Text"><text:span text:style-name="T7">.env</text:span></text:span><text:span text:style-name="T7"> e preparar os dados. </text:span></text:p>
        </text:list-item>
        <text:list-item>
          <text:p text:style-name="P33"><text:soft-page-break/><text:span text:style-name="Source_20_Text"><text:span text:style-name="T7">postgres.go</text:span></text:span><text:span text:style-name="T7">: Vai pegar esses dados e tentar se conectar com o banco do Docker. </text:span></text:p>
        </text:list-item>
      </text:list>
      <text:p text:style-name="P34">Execute o bloco abaixo no seu terminal:</text:p>
      <text:p text:style-name="P35">Ver o código na pasta “cpodigos baixados do Gemini” gemini-code-1782824583498.sh</text:p>
      <text:p text:style-name="P35"/>
      <text:p text:style-name="P35"/>
      <text:h text:style-name="P36" text:outline-level="3"><text:span text:style-name="T8">Passo 3: Criando o ponto de partida do sistema (</text:span><text:span text:style-name="Source_20_Text"><text:span text:style-name="T7">main.go</text:span></text:span><text:span text:style-name="T8">)</text:span></text:h>
      <text:p text:style-name="P37"><text:bookmark text:name="p-rc_70cf0107718608c0-177"/><text:span text:style-name="T7">Por fim, vamos criar a pasta </text:span><text:span text:style-name="Source_20_Text"><text:span text:style-name="T7">cmd/api</text:span></text:span><text:span text:style-name="T7"> e o arquivo </text:span><text:span text:style-name="Source_20_Text"><text:span text:style-name="T7">main.go</text:span></text:span><text:span text:style-name="T7">. Ele será o responsável por juntar todas essas peças quando dermos o comando para rodar o software. </text:span></text:p>
      <text:p text:style-name="P38">Execute este último bloco:</text:p>
      <text:p text:style-name="P39">Ver o código na pasta “cpodigos baixados do Gemini” gemini-code-1782824739574.sh</text:p>
      <text:p text:style-name="P39"/>
      <text:h text:style-name="P40" text:outline-level="3">🚦 <text:span text:style-name="T9">Hora do Teste!</text:span></text:h>
      <text:p text:style-name="P38"><text:bookmark text:name="p-rc_70cf0107718608c0-178"/>Agora vamos testar se o Go consegue ler as configurações e dar o "aperto de mão" com o banco de dados que está no Docker. Execute o comando abaixo no seu terminal: </text:p>
      <text:p text:style-name="P41">go run ./cmd/api</text:p>
      <text:p text:style-name="P41"/>
      <text:p text:style-name="P42">🧭 O Próximo Passo: Criando o "Coração" do SaaS (<text:span text:style-name="Source_20_Text">Associations</text:span>)</text:p>
      <text:p text:style-name="P42"/>
      <text:p text:style-name="P43"><text:bookmark text:name="p-rc_f600e6e2e7434daa-208"/>Como o Cannacare V2 é um software para ser alugado para várias associações (modelo SaaS Multi-Tenant) , o primeiro conceito de negócio que precisamos ensinar ao nosso banco de dados e ao Go é o que é uma Associação (o nosso <text:span text:style-name="T5">Tenant</text:span>). </text:p>
      <text:p text:style-name="P44"><text:bookmark text:name="p-rc_f600e6e2e7434daa-209"/>Afinal, para cadastrar usuários, secretárias, médicos ou pacientes, todos eles precisam pertencer a uma Associação contratante. </text:p>
      <text:p text:style-name="P44"><text:bookmark text:name="p-rc_f600e6e2e7434daa-210"/>Seguindo o nosso plano de ir com paciência e explicação detalhada, vamos focar em criar a nossa primeira Migration SQL. </text:p>
      <text:h text:style-name="P45" text:outline-level="3">🛠️ O que é uma Migration?</text:h>
      <text:p text:style-name="P46">Em vez de abrirmos uma ferramenta visual e criarmos tabelas clicando com o mouse, na programação profissional nós usamos arquivos de texto com comandos SQL, chamados Migrations. Elas servem como um "histórico de evolução" do banco de dados. Se amanhã você levar seu código para outro computador, o sistema lê as migrations e cria o banco idêntico em segundos.</text:p>
      <text:p text:style-name="P46"/>
      <text:p text:style-name="P42">📝 Vamos planejar a tabela <text:span text:style-name="Source_20_Text">associations</text:span></text:p>
      <text:p text:style-name="P42"><text:span text:style-name="Source_20_Text"/></text:p>
      <text:p text:style-name="P47"><text:span text:style-name="Source_20_Text"><text:span text:style-name="T4">Baseado nas regras de negócio que mapeamos, cada associação cliente do seu software precisará de:</text:span></text:span></text:p>
      <text:list text:style-name="L7">
        <text:list-item>
          <text:p text:style-name="P48"><text:span text:style-name="T4">ID: Um identificador único (usaremos </text:span><text:span text:style-name="Source_20_Text"><text:span text:style-name="T4">UUID</text:span></text:span><text:span text:style-name="T4">, que gera uma chave única universal, impossível de duplicar, muito mais seguro que números sequenciais </text:span><text:span text:style-name="Source_20_Text"><text:span text:style-name="T4">1, 2, 3...</text:span></text:span><text:span text:style-name="T4"> para SaaS).</text:span></text:p>
        </text:list-item>
        <text:list-item>
          <text:p text:style-name="P49">Name: Nome da associação.</text:p>
        </text:list-item>
        <text:list-item>
          <text:p text:style-name="P49">CNPJ: O documento oficial da instituição.</text:p>
        </text:list-item>
        <text:list-item>
          <text:p text:style-name="P48"><text:bookmark text:name="p-rc_f600e6e2e7434daa-211"/><text:span text:style-name="T4">Status: Para sabermos se o plano anual dela está </text:span><text:span text:style-name="Source_20_Text"><text:span text:style-name="T4">active</text:span></text:span><text:span text:style-name="T4"> (ativo), </text:span><text:span text:style-name="Source_20_Text"><text:span text:style-name="T4">pending</text:span></text:span><text:span text:style-name="T4"> (pendente) ou </text:span><text:span text:style-name="Source_20_Text"><text:span text:style-name="T4">suspended</text:span></text:span><text:span text:style-name="T4"> (suspenso). </text:span></text:p>
        </text:list-item>
        <text:list-item>
          <text:p text:style-name="P48"><text:span text:style-name="T4">Timestamps: Campos para registrar quando ela foi criada ou atualizada (</text:span><text:span text:style-name="Source_20_Text"><text:span text:style-name="T4">created_at</text:span></text:span><text:span text:style-name="T4">, </text:span><text:span text:style-name="Source_20_Text"><text:span text:style-name="T4">updated_at</text:span></text:span><text:span text:style-name="T4">).</text:span></text:p>
        </text:list-item>
      </text:list>
      <text:p text:style-name="P42"><text:span text:style-name="Source_20_Text"/></text:p>
      <text:p text:style-name="P42"><text:span text:style-name="Source_20_Text"/></text:p>
      <text:h text:style-name="P50" text:outline-level="2"><text:span text:style-name="Source_20_Text"><text:span text:style-name="T2">📅 </text:span></text:span><text:span text:style-name="Source_20_Text"><text:span text:style-name="T9">Linha do Tempo Estimada para o Teste Piloto</text:span></text:span></text:h>
      <text:p text:style-name="P44"><text:bookmark text:name="p-rc_c9417c7ea7fda112-218"/>Aqui está uma divisão realista de como o software vai ganhando corpo semana a semana: </text:p>
      <text:p text:style-name="P51"><text:span text:style-name="Source_20_Text"><text:span text:style-name="T4">[Semana 1: Fundação &amp; Usuários] ──&gt; [Semana 2: Módulo Paciente] ──&gt; [Semana 3: Receitas &amp; Estoque] ──&gt; [Semana 4-5: Frontend Next.js] ──&gt; [Semana 6: Teste Real]</text:span></text:span></text:p>
      <text:list text:style-name="L8">
        <text:list-item>
          <text:p text:style-name="P52"><text:bookmark text:name="p-rc_c9417c7ea7fda112-219"/><text:soft-page-break/>Semanas 1 e 2 (Fundação, Usuários e Pacientes): Criamos a estrutura que você acabou de validar, o fluxo de login seguro e a tela de cadastro do paciente com o upload de documentos. </text:p>
        </text:list-item>
        <text:list-item>
          <text:p text:style-name="P52"><text:bookmark text:name="p-rc_c9417c7ea7fda112-220"/>Semana 3 (Receitas, Pedidos e Estoque): Implementamos as regras do seu PDF: alertas de vencimento de receita e a baixa automática dos óleos de CBD no estoque quando um pedido for aprovado. </text:p>
        </text:list-item>
        <text:list-item>
          <text:p text:style-name="P52"><text:bookmark text:name="p-rc_c9417c7ea7fda112-221"/>Semanas 4 e 5 (Interface Web em Next.js): Construímos as telas visuais (formulários, tabelas e painéis) interligadas com esse backend em Go que estamos fazendo. </text:p>
        </text:list-item>
        <text:list-item>
          <text:p text:style-name="P52"><text:bookmark text:name="p-rc_c9417c7ea7fda112-222"/>Semana 6 (Homologação e Teste Piloto): Colocamos o sistema para rodar em um servidor de testes na nuvem para você ou um parceiro de uma associação simular o uso real de ponta a ponta. </text:p>
        </text:list-item>
      </text:list>
      <text:p text:style-name="P44"><text:bookmark text:name="p-rc_c9417c7ea7fda112-223"/>O segredo para cumprir esse prazo é não tentar fazer tudo de uma vez. Focaremos no fluxo principal do seu documento: o paciente entra, anexa os documentos, a receita é validada, o pedido é feito e o estoque sofre a baixa. Os relatórios avançados e gráficos complexos nós deixamos para logo após o primeiro teste piloto.</text:p>
      <text:p text:style-name="P42"><text:span text:style-name="Source_20_Text"/></text:p>
      <text:p text:style-name="P42"><text:span text:style-name="Source_20_Text"/></text:p>
      <text:p text:style-name="P42"><text:span text:style-name="Source_20_Text"/></text:p>
      <text:h text:style-name="P50" text:outline-level="2"><text:span text:style-name="Source_20_Text"><text:span text:style-name="T2">🛠️ Passo Prático: Criando a Tabela de Associações (</text:span></text:span><text:span text:style-name="Source_20_Text">0001_create_associations.sql</text:span><text:span text:style-name="Source_20_Text"><text:span text:style-name="T2">)</text:span></text:span></text:h>
      <text:p text:style-name="P46">Agora que alinhamos as expectativas de tempo, vamos voltar para o código. Vamos criar a pasta onde ficarão guardadas as nossas tabelas e estruturar o arquivo SQL da tabela <text:span text:style-name="Source_20_Text">associations</text:span> (os nossos inquilinos ou <text:span text:style-name="T5">tenants</text:span>).</text:p>
      <text:p text:style-name="P46">Execute os seguintes comandos no seu terminal:</text:p>
      <text:p text:style-name="P42"><text:span text:style-name="Source_20_Text"/></text:p>
      <text:p text:style-name="P42"><text:span text:style-name="Source_20_Text"/></text:p>
      <text:p text:style-name="P42"><text:span text:style-name="Source_20_Text"><text:span text:style-name="T6">gemini-code-1782826004359.sh</text:span></text:span></text:p>
      <text:p text:style-name="P42"><text:span text:style-name="Source_20_Text"/></text:p>
      <text:p text:style-name="P42"><text:span text:style-name="Source_20_Text"/></text:p>
      <text:p text:style-name="P42"><text:span text:style-name="Source_20_Text"><text:span text:style-name="T10"/></text:span></text:p>
      <text:p text:style-name="P42"><text:span text:style-name="Source_20_Text"/></text:p>
      <text:p text:style-name="P53"><text:span text:style-name="Source_20_Text"/></text:p>
      <text:h text:style-name="P45" text:outline-level="3">🧠 Entendendo o código SQL que você acabou de criar:</text:h>
      <text:list text:style-name="L9">
        <text:list-item>
          <text:p text:style-name="P54"><text:span text:style-name="Source_20_Text">UUID PRIMARY KEY DEFAULT gen_random_uuid()</text:span>: Em vez de usar IDs como <text:span text:style-name="Source_20_Text">1, 2, 3</text:span>, o banco vai gerar automaticamente um identificador único universal com letras e números (ex: <text:span text:style-name="Source_20_Text">f47ac10b-58cc-4372-a567-0e02b2c3d479</text:span>). Isso impede que uma associação tente adivinhar o ID de outra mudando o número na URL do navegador.</text:p>
        </text:list-item>
        <text:list-item>
          <text:p text:style-name="P54"><text:span text:style-name="Source_20_Text">TIMESTAMP WITH TIME ZONE</text:span>: Garante que as datas de criação guardem também o fuso horário correto, evitando confusão com horários de auditoria.</text:p>
        </text:list-item>
      </text:list>
      <text:p text:style-name="P46">O arquivo está criado na sua máquina! No próximo passo, vamos criar a camada de Domínio no Go (<text:span text:style-name="Source_20_Text">internal/domain/association</text:span>), onde explicaremos ao Go como ler e manipular esses dados da Associação.</text:p>
      <text:p text:style-name="P42"/>
      <text:p text:style-name="P42"><text:span text:style-name="Source_20_Text"/></text:p>
      <text:p text:style-name="P42"><text:span text:style-name="Source_20_Text"/></text:p>
      <text:h text:style-name="P45" text:outline-level="3"><text:span text:style-name="Source_20_Text"><text:span text:style-name="T2">🧠 </text:span></text:span><text:span text:style-name="Source_20_Text"><text:span text:style-name="T9">O que é a Camada de Domínio?</text:span></text:span></text:h>
      <text:p text:style-name="P44"><text:bookmark text:name="p-rc_35ced1a10b36f1d3-91"/>Na arquitetura limpa, o Domínio é o "coração" do sistema. É aqui que definimos as regras puras de negócio em Go. Essa camada não sabe o que é um banco de dados, não sabe o que é uma rota HTTP e não depende de nenhuma biblioteca externa. Ela apenas descreve os dados do nosso negócio e as validações mais importantes. </text:p>
      <text:p text:style-name="P44">Para o módulo de Associações, precisamos de dois arquivos dentro desta camada:</text:p>
      <text:list text:style-name="L10">
        <text:list-item>
          <text:p text:style-name="P55"><text:span text:style-name="Source_20_Text"><text:span text:style-name="T4">entity.go</text:span></text:span><text:span text:style-name="T4"> (Entidade): Define a estrutura de dados da Associação (os campos) e como criar uma nova associação validando as regras (como não permitir nome vazio).</text:span></text:p>
        </text:list-item>
        <text:list-item>
          <text:p text:style-name="P55"><text:bookmark text:name="p-rc_35ced1a10b36f1d3-92"/><text:span text:style-name="Source_20_Text"><text:span text:style-name="T4">repository.go</text:span></text:span><text:span text:style-name="T4"> (Repositório): É uma Interface. Em Go, uma interface não escreve o código de salvar no banco; ela apenas dita o "contrato", ou seja, avisa quais funções o banco de dados </text:span><text:span text:style-name="T11">precisa</text:span><text:span text:style-name="T4"> ter (ex: Criar, Buscar por ID). </text:span></text:p>
        </text:list-item>
      </text:list>
      <text:h text:style-name="P45" text:outline-level="3"><text:soft-page-break/><text:span text:style-name="Source_20_Text"><text:span text:style-name="T2">🛠️ Passo Prático: Criando o Domínio de Associações</text:span></text:span></text:h>
      <text:p text:style-name="P46">Execute o comando abaixo no seu terminal para criar a pasta correspondente e gerar os arquivos do domínio:</text:p>
      <text:p text:style-name="P42"><text:span text:style-name="Source_20_Text"/></text:p>
      <text:p text:style-name="P42"><text:span text:style-name="Source_20_Text"/></text:p>
      <text:p text:style-name="P42"><text:span text:style-name="Source_20_Text"><text:span text:style-name="T6">gemini-code-1782830948323.sh</text:span></text:span></text:p>
      <text:p text:style-name="P42"><text:span text:style-name="Source_20_Text"/></text:p>
      <text:p text:style-name="P42"><text:span text:style-name="Source_20_Text"/></text:p>
      <text:h text:style-name="P45" text:outline-level="3"><text:span text:style-name="Source_20_Text"><text:span text:style-name="T2">🔍 Analisando o Código Go</text:span></text:span></text:h>
      <text:p text:style-name="P46">Note como a função <text:span text:style-name="Source_20_Text">NewAssociation</text:span> protege o seu sistema: se a tela do frontend tentar enviar um cadastro sem nome ou sem CNPJ, o Go barra a operação ali mesmo e devolve um erro, antes mesmo de gastar processamento ou tocar no banco de dados.</text:p>
      <text:p text:style-name="P56"><text:bookmark text:name="p-rc_35ced1a10b36f1d3-93"/>O coração do módulo de associações está desenhado. O nosso próximo passo lógico será criar a camada de Infraestrutura, implementando o código SQL que vai fazer o Go salvar essa estrutura dentro da tabela do PostgreSQL que planejamos na migration.</text:p>
      <text:p text:style-name="P42"><text:span text:style-name="Source_20_Text"/></text:p>
      <text:p text:style-name="P47"><text:span text:style-name="Source_20_Text"><text:span text:style-name="T2">Vamos criar agora a camada que conecta o Domínio (regras puras) ao mundo real do banco de dados PostgreSQL. Essa subcamada dentro de </text:span></text:span><text:span text:style-name="Source_20_Text">infrastructure</text:span><text:span text:style-name="Source_20_Text"><text:span text:style-name="T2"> é chamada de Repositório de Infraestrutura.</text:span></text:span></text:p>
      <text:p text:style-name="P46">Em Go, para que uma estrutura de banco cumpra o contrato da <text:span text:style-name="Source_20_Text">interface Repository</text:span> que criamos no arquivo anterior, ela precisa ter os mesmos métodos com as mesmas assinaturas (<text:span text:style-name="Source_20_Text">Create</text:span>, <text:span text:style-name="Source_20_Text">FindByID</text:span>, <text:span text:style-name="Source_20_Text">FindByCNPJ</text:span>).</text:p>
      <text:h text:style-name="P57" text:outline-level="3">🛠️ Passo Prático: Criando o Repositório Postgres</text:h>
      <text:p text:style-name="P46">Execute o comando abaixo no terminal para criar a pasta de repositórios e gerar o arquivo de persistência das associações:</text:p>
      <text:p text:style-name="P42"><text:span text:style-name="Source_20_Text"/></text:p>
      <text:p text:style-name="P42"><text:span text:style-name="Source_20_Text"><text:span text:style-name="T6">gemini-code-1782831450505.sh</text:span></text:span></text:p>
      <text:p text:style-name="P42"><text:span text:style-name="Source_20_Text"><text:span text:style-name="T6"/></text:span></text:p>
      <text:p text:style-name="P42"><text:span text:style-name="Source_20_Text"><text:span text:style-name="T6"/></text:span></text:p>
      <text:h text:style-name="P58" text:outline-level="3"><text:span text:style-name="Source_20_Text"><text:span text:style-name="T2">🧠 Entendendo o código e o uso do SQL</text:span></text:span></text:h>
      <text:p text:style-name="P46">Repare que usamos <text:span text:style-name="Source_20_Text">$1</text:span>, <text:span text:style-name="Source_20_Text">$2</text:span>, <text:span text:style-name="Source_20_Text">$3</text:span> nas strings de consulta em vez de concatenar os textos diretamente. Na linguagem Go (e no PostgreSQL), isso é chamado de Prepared Statements. Fazer isso protege o seu SaaS contra um dos ataques de hackers mais perigosos da internet: o <text:span text:style-name="T5">SQL Injection</text:span> (quando alguém injeta comandos maliciosos em um campo de texto para tentar roubar ou apagar o banco de dados).</text:p>
      <text:p text:style-name="P46">O repositório está pronto. O próximo passo lógico é criar a camada de Aplicação / Casos de Uso (<text:span text:style-name="Source_20_Text">usecase</text:span>), onde escreveremos a regra de negócio que une o Domínio ao Repositório (ex: "Para criar uma associação, primeiro verifique se o CNPJ já existe; se não existir, salve").</text:p>
      <text:p text:style-name="P59"><text:span text:style-name="Source_20_Text"><text:span text:style-name="T12"/></text:span></text:p>
      <text:p text:style-name="P59"><text:span text:style-name="Source_20_Text"><text:span text:style-name="T12"/></text:span></text:p>
      <text:p text:style-name="P60"><text:span text:style-name="Source_20_Text"><text:span text:style-name="T4">Excelente! Agora que temos as regras no Domínio e a persistência na Infraestrutura, vamos criar a camada de Aplicação. É aqui que ficam os chamados Casos de Uso (</text:span></text:span><text:span text:style-name="Source_20_Text"><text:span text:style-name="T11">Use Cases</text:span></text:span><text:span text:style-name="Source_20_Text"><text:span text:style-name="T4">).</text:span></text:span></text:p>
      <text:p text:style-name="P44"><text:bookmark text:name="p-rc_9138302d2c0893ec-107"/>O Caso de Uso representa uma ação específica que o usuário pode fazer no sistema. No nosso caso, a ação é: Cadastrar uma Nova Associação.</text:p>
      <text:p text:style-name="P59"><text:span text:style-name="Source_20_Text"><text:span text:style-name="T12"/></text:span></text:p>
      <text:p text:style-name="P59"><text:span text:style-name="Source_20_Text"><text:span text:style-name="T12"/></text:span></text:p>
      <text:h text:style-name="P58" text:outline-level="3"><text:span text:style-name="Source_20_Text"><text:span text:style-name="T2">🧠 </text:span></text:span><text:span text:style-name="Source_20_Text"><text:span text:style-name="T9">A Lógica do Caso de Uso</text:span></text:span></text:h>
      <text:p text:style-name="P44"><text:bookmark text:name="p-rc_9138302d2c0893ec-108"/>Um Caso de Uso funciona como um gerente de operações. Ele dita o passo a passo que o sistema deve seguir quando alguém clica no botão "Cadastrar" no frontend: </text:p>
      <text:list text:style-name="L11">
        <text:list-item>
          <text:p text:style-name="P61"><text:bookmark text:name="p-rc_9138302d2c0893ec-109"/>Recebe os dados da tela (Nome e CNPJ). </text:p>
        </text:list-item>
        <text:list-item>
          <text:p text:style-name="P61"><text:bookmark text:name="p-rc_9138302d2c0893ec-110"/>Consulta o Repositório para ver se esse CNPJ já existe no banco. </text:p>
        </text:list-item>
        <text:list-item>
          <text:p text:style-name="P61"><text:bookmark text:name="p-rc_9138302d2c0893ec-111"/>Se o CNPJ já existir, ele barra a operação e joga um erro na tela. </text:p>
        </text:list-item>
        <text:list-item>
          <text:p text:style-name="P61"><text:bookmark text:name="p-rc_9138302d2c0893ec-112"/>Se estiver tudo limpo, ele cria a Entidade (ativando as validações que fizemos no Domínio). </text:p>
        </text:list-item>
        <text:list-item>
          <text:p text:style-name="P61"><text:bookmark text:name="p-rc_9138302d2c0893ec-113"/><text:soft-page-break/>Por fim, manda o Repositório salvar no PostgreSQL. </text:p>
        </text:list-item>
      </text:list>
      <text:p text:style-name="P44">Para entender como essa fiação se conecta entre as camadas, veja como o fluxo de dados atravessa a nossa estrutura:</text:p>
      <text:h text:style-name="P62" text:outline-level="3">🛠️ <text:span text:style-name="T9">Passo Prático: Criando o Caso de Uso de Associação</text:span></text:h>
      <text:p text:style-name="P44">Execute o comando abaixo no terminal para criar a estrutura do caso de uso:</text:p>
      <text:p text:style-name="P59"><text:span text:style-name="Source_20_Text"><text:span text:style-name="T6">gemini-code-1782831722182.sh</text:span></text:span></text:p>
      <text:p text:style-name="P59"><text:span text:style-name="Source_20_Text"><text:span text:style-name="T6"/></text:span></text:p>
      <text:p text:style-name="P59"><text:span text:style-name="Source_20_Text"><text:span text:style-name="T12"/></text:span></text:p>
      <text:h text:style-name="P58" text:outline-level="3">🔍 O que aprendemos aqui sobre Go?</text:h>
      <text:section text:style-name="Sect1" text:name="model-response-message-contentr_df59fa93a2c621f5">
        <text:p text:style-name="P63"><text:bookmark text:name="p-rc_9138302d2c0893ec-114"/>Repare na linha: <text:span text:style-name="Source_20_Text">repo association.Repository</text:span>. O nosso caso de uso não pede um <text:span text:style-name="Source_20_Text">AssociationRepositoryPostgres</text:span> (o banco físico). Ele pede a Interface do domínio.</text:p>
        <text:p text:style-name="P64">TXT</text:p>
        <text:p text:style-name="P63"><text:bookmark text:name="p-rc_9138302d2c0893ec-115"/>Isso é o que chamamos de Inversão de Dependência. Significa que se amanhã você quiser trocar o PostgreSQL por outro banco de dados, o código desse arquivo <text:span text:style-name="Source_20_Text">create_association.go</text:span> não precisará mudar nem uma única linha, pois ele só depende do contrato da interface.</text:p>
        <text:p text:style-name="P64">TXT+ 1</text:p>
        <text:p text:style-name="P63"><text:bookmark text:name="p-rc_9138302d2c0893ec-116"/>O esqueleto de negócios das associações está completo! O próximo passo será criar a Camada de Interface HTTP usando o framework Gin para expor uma rota real (ex: <text:span text:style-name="Source_20_Text">POST /associations</text:span>) e testarmos o cadastro enviando um JSON.</text:p>
        <text:p text:style-name="P64">TXT+ 1</text:p>
        <text:p text:style-name="P46">Podemos avançar para criar o Handler e a Rota no Gin? Mande o comando!</text:p>
      </text:section>
      <text:p text:style-name="P59"><text:span text:style-name="Source_20_Text"><text:span text:style-name="T12"/></text:span></text:p>
      <text:p text:style-name="P60"><text:span text:style-name="Source_20_Text"><text:span text:style-name="T2">Agora vamos criar a última camada do módulo de Associações: as Interfaces HTTP. É aqui que o framework Gin entra em ação.</text:span></text:span></text:p>
      <text:p text:style-name="P46">Essa camada funciona como a portaria do nosso prédio: ela recebe o pacote (a requisição HTTP com o JSON enviado pelo Frontend), abre o pacote, passa os dados para o nosso gerente (o Caso de Uso) e devolve a resposta de sucesso ou erro de volta para o cliente.</text:p>
      <text:p text:style-name="P46">Para o Go entender o framework Gin nas importações que faremos, execute primeiro este comando no seu terminal para baixar a biblioteca do Gin:</text:p>
      <text:p text:style-name="P59"><text:span text:style-name="Source_20_Text"><text:span text:style-name="T6">go get github.com/gin-gonic/gin</text:span></text:span></text:p>
      <text:p text:style-name="P59"><text:span text:style-name="Source_20_Text"><text:span text:style-name="T6"/></text:span></text:p>
      <text:p text:style-name="P65"><text:span text:style-name="Source_20_Text"/></text:p>
      <text:p text:style-name="P65"><text:span text:style-name="Source_20_Text"/></text:p>
      <text:p text:style-name="P66"><text:span text:style-name="Source_20_Text"><text:span text:style-name="T2">Agora, vamos criar duas subpastas: uma para o Handler (o controlador da lógica da rota) e outra para a Route (onde desenhamos o caminho da URL).</text:span></text:span></text:p>
      <text:h text:style-name="P57" text:outline-level="3">🛠️ Passo Prático: Criando Handler e Rotas de Associação</text:h>
      <text:p text:style-name="P46">Execute o bloco abaixo no seu terminal:</text:p>
      <text:p text:style-name="P65"><text:span text:style-name="Source_20_Text"><text:span text:style-name="T6">gemini-code-1782832055121.sh</text:span></text:span></text:p>
      <text:p text:style-name="P65"><text:span text:style-name="Source_20_Text"><text:span text:style-name="T6"/></text:span></text:p>
      <text:p text:style-name="P65"><text:span text:style-name="Source_20_Text"><text:span text:style-name="T12"/></text:span></text:p>
      <text:h text:style-name="P67" text:outline-level="3"><text:span text:style-name="Source_20_Text"><text:span text:style-name="T2">🧠 Entendendo o fluxo no Go</text:span></text:span></text:h>
      <text:p text:style-name="P46">Agora toda a lógica de uma Associação está completa. Para que você consiga visualizar o que acabamos de construir, o fluxo de dados no backend funciona assim:</text:p>
      <text:p text:style-name="P68"><text:span text:style-name="Source_20_Text"><text:span text:style-name="T12"/></text:span></text:p>
      <text:p text:style-name="P68"><text:span text:style-name="Source_20_Text"><text:span text:style-name="T12"/></text:span></text:p>
      <text:p text:style-name="P68"><text:span text:style-name="Source_20_Text"><text:span text:style-name="T12"/></text:span></text:p>
      <text:p text:style-name="P68"><text:span text:style-name="Source_20_Text"><text:span text:style-name="T12"/></text:span></text:p>
      <text:p text:style-name="P68"><text:span text:style-name="Source_20_Text"><text:span text:style-name="T12"/></text:span></text:p>
      <text:p text:style-name="P68"><text:soft-page-break/><text:span text:style-name="Source_20_Text"><text:span text:style-name="T12"/></text:span></text:p>
      <text:p text:style-name="P69"><text:span text:style-name="Source_20_Text"><text:span text:style-name="T13">[Requisição HTTP POST]</text:span></text:span></text:p>
      <text:p text:style-name="P69"><text:span text:style-name="Source_20_Text"><text:span text:style-name="T13"><text:s/>──&gt;</text:span></text:span></text:p>
      <text:p text:style-name="P69"><text:span text:style-name="Source_20_Text"><text:span text:style-name="T13">association_routes.go</text:span></text:span></text:p>
      <text:p text:style-name="P69"><text:span text:style-name="Source_20_Text"><text:span text:style-name="T13"><text:s/>──&gt;</text:span></text:span></text:p>
      <text:p text:style-name="P69"><text:span text:style-name="Source_20_Text"><text:span text:style-name="T13">association_handler.go</text:span></text:span></text:p>
      <text:p text:style-name="P69"><text:span text:style-name="Source_20_Text"><text:span text:style-name="T13"><text:s/>──&gt;</text:span></text:span></text:p>
      <text:p text:style-name="P69"><text:span text:style-name="Source_20_Text"><text:span text:style-name="T13">create_association.go (UseCase)</text:span></text:span></text:p>
      <text:p text:style-name="P69"><text:span text:style-name="Source_20_Text"><text:span text:style-name="T13"><text:s/>──&gt;</text:span></text:span></text:p>
      <text:p text:style-name="P69"><text:span text:style-name="Source_20_Text"><text:span text:style-name="T13">association_repository_postgres.go</text:span></text:span></text:p>
      <text:p text:style-name="P69"><text:span text:style-name="Source_20_Text"><text:span text:style-name="T13">──&gt; </text:span></text:span></text:p>
      <text:p text:style-name="P69"><text:span text:style-name="Source_20_Text"><text:span text:style-name="T13">[Banco PostgreSQL]</text:span></text:span></text:p>
      <text:p text:style-name="Text_20_body"/>
      <text:p text:style-name="Text_20_body"><text:span text:style-name="T14">O nosso próximo passo será fazer a fiação (</text:span><text:span text:style-name="T15">dependency injection</text:span><text:span text:style-name="T14">) de tudo isso dentro do arquivo </text:span><text:span text:style-name="Source_20_Text"><text:span text:style-name="T14">cmd/api/main.go</text:span></text:span><text:span text:style-name="T14">. Nós vamos instanciar o repositório, o caso de uso, o handler, ligar o roteador do Gin e colocar o servidor para escutar requisições de verdade na porta </text:span><text:span text:style-name="Source_20_Text"><text:span text:style-name="T14">8080</text:span></text:span><text:span text:style-name="T14">!</text:span></text:p>
      <text:p text:style-name="P13"/>
      <text:h text:style-name="P12" text:outline-level="2">🛠️ Passo Prático: Atualizando o <text:span text:style-name="Source_20_Text">main.go</text:span> com o Novo Roteador</text:h>
      <text:p text:style-name="P13">Vamos abrir o arquivo principal do sistema e conectar o banco de dados ao repositório, o repositório ao caso de uso, o caso de uso ao handler e, finalmente, injetar as rotas no Gin. Isso se chama Injeção de Dependências.</text:p>
      <text:p text:style-name="P13">Execute o comando abaixo no seu terminal para reescrever o seu <text:span text:style-name="Source_20_Text">main.go</text:span> com a estrutura completa:</text:p>
      <text:p text:style-name="P70">gemini-code-1782832409558.sh</text:p>
      <text:p text:style-name="P70"/>
      <text:h text:style-name="P71" text:outline-level="2">🏎️ Hora de Testar a Rota Criada!</text:h>
      <text:p text:style-name="P72">Vamos colocar o servidor para rodar e testar o cadastro da primeira associação cliente no banco de dados.</text:p>
      <text:list text:style-name="L12">
        <text:list-item>
          <text:p text:style-name="P73">Garanta que o Docker continue ligado.</text:p>
        </text:list-item>
        <text:list-item>
          <text:p text:style-name="P73">Inicie o servidor Go executando:</text:p>
        </text:list-item>
      </text:list>
      <text:p text:style-name="P72"/>
      <text:p text:style-name="P72"/>
      <text:p text:style-name="P72">go run cmd/api/main.go</text:p>
      <text:p text:style-name="P72"/>
      <text:p text:style-name="P72">Você verá que o Gin vai listar no terminal a nova rota criada: <text:span text:style-name="Source_20_Text">[GIN-debug] POST /associations --&gt; ...</text:span></text:p>
      <text:list text:style-name="L13">
        <text:list-item>
          <text:p text:style-name="P74">Agora, abra outra aba do seu terminal (deixando o servidor rodando na primeira) e envie este comando <text:span text:style-name="Source_20_Text">curl</text:span> para simular uma tela cadastrando uma associação:</text:p>
        </text:list-item>
      </text:list>
      <text:p text:style-name="P72"/>
      <text:p text:style-name="P72"/>
      <text:p text:style-name="P72"/>
      <text:p text:style-name="P72"><text:soft-page-break/>curl -X POST http://localhost:8080/associations \</text:p>
      <text:p text:style-name="P72"><text:s text:c="2"/>-H "Content-Type: application/json" \</text:p>
      <text:p text:style-name="P72">-d '{"name": "Associação Canábica Esperança", "cnpj": "12.345.678/0001-99"}'</text:p>
      <text:p text:style-name="P72"/>
      <text:h text:style-name="P75" text:outline-level="3">🎯 O que deve acontecer:</text:h>
      <text:p text:style-name="P72">O terminal deve te devolver um JSON contendo os dados da associação criados e o ID (UUID) gerado automaticamente pelo PostgreSQL!</text:p>
      <text:p text:style-name="P72"/>
      <text:p text:style-name="P76">O motor e o primeiro módulo de negócios estão oficialmente conectados e salvando informações no PostgreSQL.</text:p>
      <text:p text:style-name="P77"><text:bookmark text:name="p-rc_873c18513bab6d86-128"/><text:span text:style-name="T4">Para encerrar a nossa Semana 1, precisamos construir o sistema de Usuários (</text:span><text:span text:style-name="Source_20_Text"><text:span text:style-name="T4">users</text:span></text:span><text:span text:style-name="T4">). Como este é um software SaaS, todo usuário (seja uma secretária, médico ou administrador) precisa estar obrigatoriamente vinculado a uma das associações cadastradas. Além disso, como lidamos com dados médicos sensíveis, aprenderemos a criptografar a senha antes de salvá-la no banco de dados. </text:span></text:p>
      <text:p text:style-name="P34">Vamos fazer o passo a passo com calma:</text:p>
      <text:p text:style-name="P72"/>
      <text:h text:style-name="P71" text:outline-level="2">🛠️ Passo 1: A Migration dos Usuários</text:h>
      <text:p text:style-name="P72">Vamos criar a tabela de usuários com um vínculo de chave estrangeira (<text:span text:style-name="Source_20_Text">FOREIGN KEY</text:span>) apontando para a tabela <text:span text:style-name="Source_20_Text">associations</text:span>. Desse modo, o banco garante que nenhum usuário exista "solto" no sistema.</text:p>
      <text:p text:style-name="P72">Execute no terminal:</text:p>
      <text:p text:style-name="P72">gemini-code-1782832820655.sh</text:p>
      <text:p text:style-name="P72"/>
      <text:h text:style-name="P71" text:outline-level="2">🔒 Passo 2: Baixando a biblioteca de Criptografia</text:h>
      <text:p text:style-name="P72">No Go, nunca salvamos a senha em texto aberto (como <text:span text:style-name="Source_20_Text">123456</text:span>). Usamos o algoritmo Bcrypt para transformar a senha em um código embaralhado impossível de ser descriptografado de volta.</text:p>
      <text:p text:style-name="P72">Execute no terminal para baixar a biblioteca oficial de criptografia do Go:</text:p>
      <text:p text:style-name="P72"/>
      <text:p text:style-name="P72">go get golang.org/x/crypto/bcrypt</text:p>
      <text:p text:style-name="P72"/>
      <text:h text:style-name="P71" text:outline-level="2">🧠 Passo 3: O Domínio do Usuário (<text:span text:style-name="Source_20_Text">domain/user</text:span>)</text:h>
      <text:p text:style-name="P72">Agora criamos as regras do Usuário no Go e a função que criptografa a senha na hora da criação.</text:p>
      <text:p text:style-name="P72">Execute no seu terminal:</text:p>
      <text:p text:style-name="P72"/>
      <text:p text:style-name="P72">gemini-code-1782832992944.sh</text:p>
      <text:p text:style-name="P72"/>
      <text:p text:style-name="P72"/>
      <text:h text:style-name="P71" text:outline-level="2">🏁 Parabéns, a fundação do módulo está criada!</text:h>
      <text:p text:style-name="P72">Fizemos a estrutura de banco de dados e as regras de negócio puras de segurança do Usuário. Para finalizarmos a Semana 1 por completo, nos faltam apenas o Repositório Postgres e o Caso de Uso de Criação do Usuário para testar o cadastro.</text:p>
      <text:p text:style-name="P72"><text:soft-page-break/>Vamos finalizar o módulo de usuários para fechar com sucesso a nossa Semana 1.</text:p>
      <text:p text:style-name="P72">Neste passo final, vamos criar a persistência no banco de dados e o caso de uso. Como todo usuário precisa pertencer a uma associação, o nosso caso de uso vai garantir essa validação.</text:p>
      <text:p text:style-name="P72">Siga os passos abaixo para gerar os arquivos restantes:</text:p>
      <text:p text:style-name="P72"/>
      <text:h text:style-name="P75" text:outline-level="3">🛠️ Passo 1: O Repositório do Usuário (<text:span text:style-name="Source_20_Text">infrastructure/repository</text:span>)</text:h>
      <text:p text:style-name="P72">Este arquivo implementa os comandos SQL no PostgreSQL para salvar o usuário com a sua senha criptografada e também buscar por e-mail (essencial para o futuro fluxo de login).</text:p>
      <text:p text:style-name="P72">Execute no terminal:</text:p>
      <text:p text:style-name="P72"/>
      <text:p text:style-name="P72">gemini-code-1782833140818.sh</text:p>
      <text:p text:style-name="P72"/>
      <text:h text:style-name="P75" text:outline-level="3">🛠️ Passo 2: O Caso de Uso de Criação de Usuário (<text:span text:style-name="Source_20_Text">usecase</text:span>)</text:h>
      <text:p text:style-name="P72">O caso de uso recebe os dados brutos, verifica se o e-mail já existe e aciona a regra de domínio que criptografa a senha.</text:p>
      <text:p text:style-name="P72">Execute no terminal:</text:p>
      <text:p text:style-name="P72">gemini-code-1782833193217.sh</text:p>
      <text:p text:style-name="P72"/>
      <text:p text:style-name="P72"/>
      <text:h text:style-name="P75" text:outline-level="3">🛠️ Passo 3: Handler HTTP e Rotas do Usuário (<text:span text:style-name="Source_20_Text">interfaces/http</text:span>)</text:h>
      <text:p text:style-name="P72">Vamos expor a rota para cadastrar usuários administradores e colaboradores das associações.</text:p>
      <text:p text:style-name="P72">Execute no terminal:</text:p>
      <text:p text:style-name="P72">gemini-code-1782833232982.sh</text:p>
      <text:p text:style-name="P72"/>
      <text:p text:style-name="P72"/>
      <text:h text:style-name="P75" text:outline-level="3">🪢 Passo 4: Fiação Final no <text:span text:style-name="Source_20_Text">main.go</text:span></text:h>
      <text:p text:style-name="P72">Agora, vamos atualizar o nosso arquivo central para inicializar também o módulo de usuários.</text:p>
      <text:p text:style-name="P72">Execute no terminal:</text:p>
      <text:p text:style-name="P72"/>
      <text:p text:style-name="P72">gemini-code-1782833278952.sh</text:p>
      <text:p text:style-name="P72"/>
      <text:p text:style-name="P78">Antes de testar! Esquecemos de criar as tabelas.</text:p>
      <text:p text:style-name="P78">Abra uma nova aba do terminal e execute este comando para injetar as duas tabelas que planejamos diretamente no PostgreSQL:</text:p>
      <text:p text:style-name="P78"/>
      <text:p text:style-name="P78">gemini-code-1782833870313.sh</text:p>
      <text:p text:style-name="P78"/>
      <text:h text:style-name="P71" text:outline-level="2">🏎️ Teste Prático do Usuário</text:h>
      <text:list text:style-name="L14">
        <text:list-item>
          <text:p text:style-name="P79">Execute o servidor: <text:span text:style-name="T16">go mod tidy </text:span><text:span text:style-name="Source_20_Text">go run cmd/api/main.go</text:span></text:p>
        </text:list-item>
        <text:list-item>
          <text:p text:style-name="P79"><text:soft-page-break/>Em outro terminal, envie um <text:span text:style-name="Source_20_Text">POST</text:span> para cadastrar um usuário associado. Atenção: No campo <text:span text:style-name="Source_20_Text">association_id</text:span>, você deve colocar o ID em formato UUID que o banco te retornou quando você cadastrou a associação no passo anterior!</text:p>
        </text:list-item>
      </text:list>
      <text:p text:style-name="P80">curl -X POST http://localhost:8080/associations \</text:p>
      <text:p text:style-name="P80"><text:s text:c="2"/>-H "Content-Type: application/json" \</text:p>
      <text:p text:style-name="P80">-d '{"name": "Associação Canábica Esperança", "cnpj": "12.345.678/0001-99"}'</text:p>
      <text:p text:style-name="P80"/>
      <text:p text:style-name="P80"/>
      <text:p text:style-name="P80"/>
      <text:p text:style-name="P80">============================================================</text:p>
      <text:p text:style-name="P80"><text:s/>🎉 PARABÉNS, LUCAS! A SEMANA 1 ESTÁ 100% CONCLUÍDA! 🎉</text:p>
      <text:p text:style-name="P80">============================================================</text:p>
      <text:p text:style-name="P80"><text:s/>✓ Docker e PostgreSQL Configurados na porta 5433</text:p>
      <text:p text:style-name="P80"><text:s/>✓ Conexão Segura e Pool do Banco Estabelecidos no Go</text:p>
      <text:p text:style-name="P80"><text:s/>✓ Conceitos de Clean Architecture Aplicados (Domain, UseCase, Repo)</text:p>
      <text:p text:style-name="P80"><text:s/>✓ Módulo Multi-Tenant de Associações Operando</text:p>
      <text:p text:style-name="P80"><text:s/>✓ Módulo de Usuários com Criptografia Bcrypt Ativo</text:p>
      <text:p text:style-name="P80">============================================================</text:p>
      <text:p text:style-name="P81">Semana 2:</text:p>
      <text:p text:style-name="P82"/>
      <text:p text:style-name="P83"><text:bookmark text:name="p-rc_7ce3d62e4360b6df-144"/>Agora entramos no <text:span text:style-name="T3">Módulo Clínico (Gestão de Pacientes)</text:span>, que é o verdadeiro coração do sistema baseado no fluxo do seu documento. Aqui, o objetivo é permitir que a secretaria cadastre o paciente e anexe toda a documentação obrigatória. </text:p>
      <text:p text:style-name="P84">Como estamos seguindo com paciência e explicando cada passo, vamos primeiro planejar o que faremos nesta semana.</text:p>
      <text:p text:style-name="P83"/>
      <text:h text:style-name="P85" text:outline-level="2">📅 <text:span text:style-name="T9">O Plano da Semana 2: Módulo de Pacientes</text:span></text:h>
      <text:p text:style-name="P84"><text:bookmark text:name="p-rc_7ce3d62e4360b6df-145"/><text:span text:style-name="T4">Seguindo as regras do seu arquivo, um paciente não pode ficar "solto" no sistema: ele pertence a uma associação (</text:span><text:span text:style-name="Source_20_Text"><text:span text:style-name="T4">association_id</text:span></text:span><text:span text:style-name="T4">) e foi cadastrado por um usuário/secretária (</text:span><text:span text:style-name="Source_20_Text"><text:span text:style-name="T4">created_by</text:span></text:span><text:span text:style-name="T4">). </text:span></text:p>
      <text:p text:style-name="P86">Nesta semana, dividiremos o trabalho em:</text:p>
      <text:list text:style-name="L15">
        <text:list-item>
          <text:p text:style-name="P87"><text:bookmark text:name="p-rc_7ce3d62e4360b6df-146"/><text:span text:style-name="T17">Banco de Dados:</text:span><text:span text:style-name="T4"> Criar a tabela </text:span><text:span text:style-name="Source_20_Text"><text:span text:style-name="T4">patients</text:span></text:span><text:span text:style-name="T4"> com suporte aos status descritos no seu PDF (</text:span><text:span text:style-name="Source_20_Text"><text:span text:style-name="T4">pending_documentation</text:span></text:span><text:span text:style-name="T4">, </text:span><text:span text:style-name="Source_20_Text"><text:span text:style-name="T4">under_analysis</text:span></text:span><text:span text:style-name="T4">, </text:span><text:span text:style-name="Source_20_Text"><text:span text:style-name="T4">approved</text:span></text:span><text:span text:style-name="T4">, etc.). </text:span></text:p>
        </text:list-item>
        <text:list-item>
          <text:p text:style-name="P87"><text:span text:style-name="T17">Domínio em Go:</text:span><text:span text:style-name="T4"> Estruturar a entidade </text:span><text:span text:style-name="Source_20_Text"><text:span text:style-name="T4">Patient</text:span></text:span><text:span text:style-name="T4"> com validações (como checar se o nome não está vazio e o formato do CPF).</text:span></text:p>
        </text:list-item>
        <text:list-item>
          <text:p text:style-name="P88"><text:span text:style-name="T3">Casos de Uso:</text:span> Criar a lógica para cadastrar o paciente e impedir que o mesmo CPF seja registrado duas vezes na <text:span text:style-name="T3">mesma</text:span> associação (regra de multi-tenancy).</text:p>
        </text:list-item>
        <text:list-item>
          <text:p text:style-name="P88"><text:span text:style-name="T3">Interface HTTP (Gin):</text:span> Criar as rotas para salvar e listar os pacientes.</text:p>
        </text:list-item>
      </text:list>
      <text:p text:style-name="P83"/>
      <text:p text:style-name="P83"/>
      <text:h text:style-name="P85" text:outline-level="2"><text:soft-page-break/>🛠️ <text:span text:style-name="T9">Passo 1: A Nova Tabela no Banco de Dados (</text:span><text:span text:style-name="Source_20_Text"><text:span text:style-name="T4">patients</text:span></text:span><text:span text:style-name="T9">)</text:span></text:h>
      <text:p text:style-name="P86"><text:bookmark text:name="p-rc_7ce3d62e4360b6df-147"/>Para começar, vamos rodar o comando SQL diretamente no seu Docker para criar a tabela de pacientes com todos os campos exigidos na sua pesquisa (Dados pessoais, contatos e o controle de status). </text:p>
      <text:p text:style-name="P83">Abra o terminal na pasta do seu projeto e execute este bloco para injetar a tabela no PostgreSQL:</text:p>
      <text:p text:style-name="P83"/>
      <text:p text:style-name="P83">gemini-code-1782836833805.sh</text:p>
      <text:p text:style-name="P83"/>
      <text:p text:style-name="P83"/>
      <text:p text:style-name="P83"><text:span text:style-name="T3">Nota de aprendizado:</text:span> Repare no campo <text:span text:style-name="Source_20_Text">status</text:span>. Ele já nasce como <text:span text:style-name="Source_20_Text">'pending_documentation'</text:span>, exatamente como manda o primeiro passo do fluxo resumido do seu sistema ("Entrada do paciente cadastro + documentos").</text:p>
      <text:p text:style-name="P83"/>
      <text:h text:style-name="P85" text:outline-level="2">📂 Organizando a pasta do Domínio</text:h>
      <text:p text:style-name="P89">Agora que a tabela existe no banco de dados, o próximo passo é criar a camada de <text:span text:style-name="T3">Domínio</text:span> do paciente no Go (<text:span text:style-name="Source_20_Text">internal/domain/patient</text:span>), onde escreveremos as regras puras de validação.</text:p>
      <text:p text:style-name="P83"><text:span text:style-name="T4">Com a tabela de pacientes criada diretamente no PostgreSQL, vamos construir o </text:span><text:span text:style-name="T17">Domínio (</text:span><text:span text:style-name="Source_20_Text"><text:span text:style-name="T17">domain/patient</text:span></text:span><text:span text:style-name="T17">)</text:span><text:span text:style-name="T4"> no Go.</text:span></text:p>
      <text:p text:style-name="P84"><text:bookmark text:name="p-rc_60e131d01b3b5aac-155"/><text:span text:style-name="T4">Como você listou no seu documento de requisitos que o paciente possui uma série de dados pessoais e contatos (Nome, Data de Nascimento, Gênero, Telefone, E-mail, Endereço) e passa por um controle de status rigoroso (</text:span><text:span text:style-name="Source_20_Text"><text:span text:style-name="T4">pending_documentation</text:span></text:span><text:span text:style-name="T4">, </text:span><text:span text:style-name="Source_20_Text"><text:span text:style-name="T4">under_analysis</text:span></text:span><text:span text:style-name="T4">, </text:span><text:span text:style-name="Source_20_Text"><text:span text:style-name="T4">approved</text:span></text:span><text:span text:style-name="T4">, </text:span><text:span text:style-name="Source_20_Text"><text:span text:style-name="T4">denied</text:span></text:span><text:span text:style-name="T4">), vamos refletir tudo isso na nossa estrutura pura em Go. </text:span></text:p>
      <text:h text:style-name="P90" text:outline-level="3">🛠️ <text:span text:style-name="T9">Passo Prático: Criando o Domínio de Pacientes</text:span></text:h>
      <text:p text:style-name="P86">Execute o comando abaixo no seu terminal para criar a pasta correspondente e gerar os arquivos contendo a <text:span text:style-name="T3">Entidade</text:span> e o <text:span text:style-name="T3">Contrato (Interface)</text:span> do Repositório:</text:p>
      <text:p text:style-name="P83">gemini-code-1782837029267.sh</text:p>
      <text:h text:style-name="P91" text:outline-level="3">🧠 Análise do Design Multi-Tenant</text:h>
      <text:p text:style-name="P89">Preste bastante atenção na interface do repositório: as funções <text:span text:style-name="Source_20_Text">FindByID</text:span> e <text:span text:style-name="Source_20_Text">FindByEmail</text:span> recebem tanto o dado buscado quanto o <text:span text:style-name="Source_20_Text">association_id</text:span>.</text:p>
      <text:p text:style-name="P89">Isso é fundamental no modelo SaaS. Quando a secretaria buscar por um paciente, o sistema garante que ela <text:span text:style-name="T3">só consiga encontrar registros que pertençam à própria associação dela</text:span>, criando uma barreira de segurança lógica intransponível entre as instituições parceiras.</text:p>
      <text:p text:style-name="P89">Agora que definimos a entidade pura e seu contrato, o nosso próximo passo lógico é criar a <text:span text:style-name="T3">Infraestrutura</text:span>, escrevendo as queries SQL correspondentes para salvar e consultar essas informações no PostgreSQL.</text:p>
      <text:p text:style-name="P83">Agora, vamos criar a implementação prática do banco de dados para os pacientes, que chamamos de <text:span text:style-name="T3">Repositório de Infraestrutura</text:span>. Como você está aprendendo a integração com banco de dados em Go, note como estruturamos os comandos SQL para tratar as datas (<text:span text:style-name="Source_20_Text">birth_date</text:span>) e strings perfeitamente.</text:p>
      <text:p text:style-name="P83"/>
      <text:h text:style-name="P91" text:outline-level="3">🛠️ Passo Prático: Criando o Repositório Postgres de Pacientes</text:h>
      <text:p text:style-name="P89">Execute o comando abaixo no seu terminal para gerar o arquivo de persistência:</text:p>
      <text:p text:style-name="P83">gemini-code-1782837305126.sh</text:p>
      <text:h text:style-name="P91" text:outline-level="3">🧠 Dica de Aprendizado em Go: O tipo <text:span text:style-name="Source_20_Text">time.Time</text:span> e o SQL</text:h>
      <text:p text:style-name="P89">O driver do Postgres que baixamos (<text:span text:style-name="Source_20_Text">lib/pq</text:span>) é inteligente o suficiente para entender que o tipo estruturado <text:span text:style-name="Source_20_Text">time.Time</text:span> do Go deve ser convertido e salvo perfeitamente como campos do tipo <text:span text:style-name="Source_20_Text">DATE</text:span> ou <text:span text:style-name="Source_20_Text">TIMESTAMP</text:span> no banco de dados, poupando a gente de fazer conversões manuais de texto chata.</text:p>
      <text:p text:style-name="P89"><text:soft-page-break/>Com o banco de dados pronto para receber e buscar pacientes, o próximo passo é criar a camada de <text:span text:style-name="T3">Aplicação (Caso de Uso)</text:span>, onde vamos gerenciar as regras de validação antes de mandar salvar.</text:p>
      <text:p text:style-name="P83"/>
      <text:p text:style-name="P92">Vamos agora construir a camada de <text:span text:style-name="T3">Aplicação</text:span> com o Caso de Uso responsável por <text:span text:style-name="T3">Cadastrar um Novo Paciente</text:span>.</text:p>
      <text:p text:style-name="P86"><text:bookmark text:name="p-rc_c38d02a1fe93444d-159"/>Como vimos no seu modelo de requisitos, a entrada do paciente envolve coletar dados estruturados e colocá-lo no status inicial de aguardando documentação. A lógica do Caso de Uso vai garantir que um e-mail não seja duplicado dentro da <text:span text:style-name="T3">mesma</text:span> associação (respeitando o isolamento do SaaS).</text:p>
      <text:p text:style-name="P83"/>
      <text:h text:style-name="P91" text:outline-level="3">🛠️ Passo Prático: Criando o Caso de Uso de Paciente</text:h>
      <text:p text:style-name="P89">Execute o comando abaixo no terminal para criar o arquivo do caso de uso:</text:p>
      <text:p text:style-name="P93"/>
      <text:p text:style-name="P93">gemini-code-1782837448353.sh</text:p>
      <text:p text:style-name="P93"/>
      <text:h text:style-name="P94" text:outline-level="2">📂 <text:span text:style-name="T9">O Próximo Passo: Interface HTTP (Gin)</text:span></text:h>
      <text:p text:style-name="P95"><text:bookmark text:name="p-rc_c38d02a1fe93444d-160"/>Com a lógica de negócios e o banco amarrados, precisamos apenas criar o <text:span text:style-name="T3">Handler</text:span> e a <text:span text:style-name="T3">Rota</text:span> no Gin para receber esses dados de pacientes via requisições HTTP.</text:p>
      <text:p text:style-name="P93"/>
      <text:p text:style-name="P96"><text:bookmark text:name="p-rc_5e44a597e1c3e46e-163"/>Vamos criar agora o <text:span text:style-name="T3">Handler</text:span> e a <text:span text:style-name="T3">Rota</text:span> para os pacientes usando o framework Gin, completando a camada de entrega. </text:p>
      <text:p text:style-name="P95">Siga os passos abaixo para gerar esses arquivos:</text:p>
      <text:h text:style-name="P97" text:outline-level="3">🛠️ <text:span text:style-name="T9">Passo 1: Criando Handler e Rotas de Pacientes</text:span></text:h>
      <text:p text:style-name="P95">Execute o bloco abaixo no seu terminal para gerar a camada HTTP:</text:p>
      <text:p text:style-name="P93">gemini-code-1782837575247.sh</text:p>
      <text:p text:style-name="P93"/>
      <text:h text:style-name="P98" text:outline-level="3">🪢 Passo 2: Atualizando a Fiação Geral no <text:span text:style-name="Source_20_Text">main.go</text:span></text:h>
      <text:p text:style-name="P99">Para que o servidor Gin reconheça as rotas de pacientes, precisamos instanciar o repositório, caso de uso e handler e registrá-los no arquivo principal.</text:p>
      <text:p text:style-name="P99">Execute no terminal para atualizar o seu <text:span text:style-name="Source_20_Text">main.go</text:span>:</text:p>
      <text:p text:style-name="P93"/>
      <text:p text:style-name="P93">gemini-code-1782837805367.sh</text:p>
      <text:p text:style-name="P93"><text:span text:style-name="T4">O terminal deve retornar o JSON completo do paciente criado com o status </text:span><text:span text:style-name="Source_20_Text"><text:span text:style-name="T4">"pending_documentation"</text:span></text:span><text:span text:style-name="T4">.</text:span></text:p>
      <text:p text:style-name="P93"/>
      <text:h text:style-name="P98" text:outline-level="3">🧪 O Comando de Teste</text:h>
      <text:p text:style-name="P100"><text:span text:style-name="T18">Abra uma </text:span><text:span text:style-name="T19">nova aba do terminal</text:span><text:span text:style-name="T18"> (deixando o servidor rodando na primeira) e execute o comando </text:span><text:span text:style-name="Source_20_Text"><text:span text:style-name="T18">curl</text:span></text:span><text:span text:style-name="T18"> abaixo.</text:span></text:p>
      <text:p text:style-name="P101"><text:span text:style-name="T19">Atenção:</text:span><text:span text:style-name="T18"> Eu já deixei o ID da associação preenchido com o valor </text:span><text:span text:style-name="Source_20_Text"><text:span text:style-name="T18">"61a72d3e-d4f9-4b34-b37a-6b0c26ede728"</text:span></text:span><text:span text:style-name="T18"> que apareceu no seu print. Como ainda não criamos o teste de retorno do usuário para ver o ID dele, usei o mesmo UUID para o campo </text:span><text:span text:style-name="Source_20_Text"><text:span text:style-name="T18">created_by</text:span></text:span><text:span text:style-name="T18"> apenas para passar na validação do banco por enquanto.</text:span></text:p>
      <text:p text:style-name="P102"/>
      <text:p text:style-name="P102"><text:soft-page-break/></text:p>
      <text:p text:style-name="P93">gemini-code-1782838114635.sh</text:p>
      <text:p text:style-name="P93"/>
      <text:p text:style-name="P103">para testar:</text:p>
      <text:p text:style-name="P103">Precisamos passar um ID de usuário que <text:span text:style-name="T3">realmente exista</text:span> na sua tabela <text:span text:style-name="Source_20_Text">users</text:span>. Vamos criar esse usuário atrelado à sua associação agora mesmo.</text:p>
      <text:p text:style-name="P104">Execute este comando no seu terminal para criar o seu usuário administrador:</text:p>
      <text:p text:style-name="P103"/>
      <text:p text:style-name="P93">gemini-code-1782838790508.sh</text:p>
      <text:p text:style-name="P93"/>
      <text:p text:style-name="P93"/>
      <text:p text:style-name="P102"><text:span text:style-name="T18">Ao rodar esse comando, o terminal vai te devolver o JSON do usuário criado. </text:span><text:span text:style-name="T19">Copie o </text:span><text:span text:style-name="Source_20_Text"><text:span text:style-name="T19">"id"</text:span></text:span><text:span text:style-name="T19"> gerado para ele.</text:span></text:p>
      <text:h text:style-name="P105" text:outline-level="3">🏎️ Agora sim: Cadastrando o Paciente</text:h>
      <text:p text:style-name="P100"><text:span text:style-name="T18">Com o ID real do usuário que você acabou de copiar, substitua-o no campo </text:span><text:span text:style-name="Source_20_Text"><text:span text:style-name="T18">"created_by"</text:span></text:span><text:span text:style-name="T18"> abaixo e rode o comando:</text:span></text:p>
      <text:p text:style-name="P93"/>
      <text:p text:style-name="P93">gemini-code-1782838827633.sh</text:p>
      <text:p text:style-name="P93"/>
      <text:p text:style-name="P93"/>
      <text:p text:style-name="P102"/>
      <text:p text:style-name="P102"/>
      <text:p text:style-name="P102"/>
      <text:p text:style-name="P102">🏆 MARCO ALCANÇADO: FIM DA SEMANA 2!</text:p>
      <text:p text:style-name="P102"/>
      <text:p text:style-name="P93">============================================================</text:p>
      <text:p text:style-name="P93"><text:s/>🎉 PARABÉNS, LUCAS! A SEMANA 2 ESTÁ CONCLUÍDA COM SUCESSO! 🎉</text:p>
      <text:p text:style-name="P93">============================================================</text:p>
      <text:p text:style-name="P93"><text:s/>✓ Tabela de Pacientes estruturada no PostgreSQL</text:p>
      <text:p text:style-name="P93"><text:s/>✓ Domínio de Pacientes isolado por Associação (Multi-Tenant)</text:p>
      <text:p text:style-name="P93"><text:s/>✓ Lógica de Entrada de Paciente do seu PDF implementada</text:p>
      <text:p text:style-name="P93"><text:s/>✓ Validação de e-mail único por Associação ativa</text:p>
      <text:p text:style-name="P93"><text:s/>✓ Rota POST /patients operando com sucesso</text:p>
      <text:p text:style-name="P93">============================================================</text:p>
      <text:p text:style-name="P93"/>
      <text:p text:style-name="P93"/>
      <text:p text:style-name="P93"/>
      <text:p text:style-name="P93"/>
      <text:h text:style-name="P94" text:outline-level="2"><text:soft-page-break/>📅 Bem-vindo à Semana 3: O Fluxo de Documentação e Prescrições</text:h>
      <text:p text:style-name="P99">Dando sequência ao fluxo de operações do sistema, uma vez que o paciente está cadastrado e com status <text:span text:style-name="Source_20_Text">pending_documentation</text:span>, o próximo passo crítico é a <text:span text:style-name="T3">Entrada de Documentos e o Controle Clínico</text:span>.</text:p>
      <text:p text:style-name="P99">Nesta semana, vamos focar em construir a estrutura para gerenciar o coração do tratamento do paciente:</text:p>
      <text:list text:style-name="L16">
        <text:list-item>
          <text:p text:style-name="P106"><text:span text:style-name="T3">Banco de Dados:</text:span> Criar a tabela para registrar as <text:span text:style-name="T3">Prescrições Médicas</text:span> (receitas) vinculadas ao paciente.</text:p>
        </text:list-item>
        <text:list-item>
          <text:p text:style-name="P106"><text:span text:style-name="T3">Alertas de Validade:</text:span> Adicionar campos essenciais como a data de emissão e data de validade da receita médica (fundamental para o sistema alertar a associação quando o documento estiver prestes a vencer).</text:p>
        </text:list-item>
        <text:list-item>
          <text:p text:style-name="P106"><text:span text:style-name="T3">Casos de Uso em Go:</text:span> Regras de negócio para validar se uma receita inserida já não nasceu vencida e como vincular o médico responsável.</text:p>
        </text:list-item>
      </text:list>
      <text:h text:style-name="P105" text:outline-level="3">🛠️ Passo 1: Criando a Tabela de Prescrições (<text:span text:style-name="Source_20_Text">prescriptions</text:span>)</text:h>
      <text:p text:style-name="P99">Vamos rodar o comando SQL diretamente no seu container do Docker para subir a estrutura que vai armazenar as receitas e os prazos de validade.</text:p>
      <text:p text:style-name="P99">Abra o seu terminal e execute:</text:p>
      <text:p text:style-name="P93"/>
      <text:p text:style-name="P93">gemini-code-1782839094195.sh</text:p>
      <text:p text:style-name="P93"/>
      <text:p text:style-name="P93">Tabela criada no banco! O próximo passo é criar a nossa camada de <text:span text:style-name="T3">Domínio</text:span> para as prescrições (<text:span text:style-name="Source_20_Text">internal/domain/prescription</text:span>) no Go para começarmos a desenhar as regras de negócio de validação de datas.</text:p>
      <text:p text:style-name="P93"/>
      <text:p text:style-name="P93"/>
      <text:p text:style-name="P93"/>
      <text:p text:style-name="P93">Com a tabela de receitas (<text:span text:style-name="Source_20_Text">prescriptions</text:span>) rodando perfeitamente no PostgreSQL, vamos subir para o Go e construir o <text:span text:style-name="T3">Domínio da Prescrição (</text:span><text:span text:style-name="Source_20_Text"><text:span text:style-name="T3">domain/prescription</text:span></text:span><text:span text:style-name="T3">)</text:span>.</text:p>
      <text:p text:style-name="P99">Nesta camada, aplicaremos uma das regras de negócio mais importantes do módulo clínico: <text:span text:style-name="T3">impedir que uma receita seja cadastrada se a data de validade já tiver expirado</text:span>, além de garantir que os dados do médico (Nome e CRM) sejam obrigatórios.</text:p>
      <text:h text:style-name="P105" text:outline-level="3">🛠️ Passo Prático: Criando o Domínio de Prescrições</text:h>
      <text:p text:style-name="P99">Execute o comando abaixo no seu terminal para estruturar a nova pasta e criar a <text:span text:style-name="T3">Entidade</text:span> junto com o seu <text:span text:style-name="T3">Contrato (Interface)</text:span>:</text:p>
      <text:p text:style-name="P93"/>
      <text:p text:style-name="P93">gemini-code-1782840075109.sh</text:p>
      <text:p text:style-name="P93"/>
      <text:h text:style-name="P98" text:outline-level="3">🧠 O que mudou aqui?</text:h>
      <text:p text:style-name="P99">Note que na nossa <text:span text:style-name="Source_20_Text">interface Repository</text:span>, mudamos um detalhe interessante no método de busca: <text:span text:style-name="Source_20_Text">FindByPatientID(patientID string) ([]*Prescription, error)</text:span>.</text:p>
      <text:p text:style-name="P99">Usamos os colchetes <text:span text:style-name="Source_20_Text">[]</text:span> para indicar um <text:span text:style-name="T3">Slice</text:span> (uma lista/array dinâmico no Go). Fazemos isso porque, ao longo do tratamento, um único paciente pode ter <text:span text:style-name="T3">várias</text:span> receitas acumuladas no histórico do sistema. O Go vai nos retornar a lista completa delas.</text:p>
      <text:p text:style-name="P93"/>
      <text:p text:style-name="P93"/>
      <text:p text:style-name="P93"/>
      <text:p text:style-name="P93"/>
      <text:p text:style-name="P93"><text:soft-page-break/>Vamos agora implementar a camada de <text:span text:style-name="T3">Infraestrutura</text:span> para o módulo de receitas, criando o arquivo que converte as structs do Go em comandos <text:span text:style-name="Source_20_Text">INSERT</text:span> e <text:span text:style-name="Source_20_Text">SELECT</text:span> dentro da nossa tabela <text:span text:style-name="Source_20_Text">prescriptions</text:span> do PostgreSQL.</text:p>
      <text:h text:style-name="P105" text:outline-level="3">🛠️ Passo Prático: Criando o Repositório Postgres de Prescrições</text:h>
      <text:p text:style-name="P99">Execute o comando abaixo no seu terminal para gerar o repositório:</text:p>
      <text:p text:style-name="P93">gemini-code-1782841640603.sh</text:p>
      <text:p text:style-name="P93"/>
      <text:h text:style-name="P98" text:outline-level="3">🧠 Dica do Go: Entendendo o <text:span text:style-name="Source_20_Text">rows.Next()</text:span> e o <text:span text:style-name="Source_20_Text">defer rows.Close()</text:span></text:h>
      <text:p text:style-name="P99">Diferente dos métodos anteriores onde usamos <text:span text:style-name="Source_20_Text">QueryRow</text:span> (para trazer apenas um único registro), aqui usamos o <text:span text:style-name="Source_20_Text">r.db.Query</text:span>. Ele abre um ponteiro de leitura chamado <text:span text:style-name="T3">Cursor</text:span> no banco de dados. O comando <text:span text:style-name="Source_20_Text">defer rows.Close()</text:span> garante que, assim que a função terminar de rodar, essa conexão de leitura seja fechada, evitando que o banco de dados do seu Docker trave por falta de memória.</text:p>
      <text:p text:style-name="P99">Com o banco de dados pronto, o próximo passo lógico é criar o <text:span text:style-name="T3">Caso de Uso de Cadastro de Receita</text:span>. Além de salvar a receita, este caso de uso vai fazer algo muito legal: mudar automaticamente o status do paciente para <text:span text:style-name="Source_20_Text">"under_analysis"</text:span>, avançando o fluxo exatamente como manda o seu plano de negócios!</text:p>
      <text:p text:style-name="P93"/>
      <text:p text:style-name="P93"/>
      <text:p text:style-name="P93">Lucas! Agora vamos construir o <text:span text:style-name="T3">Caso de Uso de Cadastro de Prescrição (</text:span><text:span text:style-name="Source_20_Text"><text:span text:style-name="T3">create_prescription.go</text:span></text:span><text:span text:style-name="T3">)</text:span>.</text:p>
      <text:p text:style-name="P99">Aqui faremos algo muito importante para a automação do seu SaaS. Lembra que no fluxo do seu projeto, assim que a secretaria insere a receita do paciente, o status dele precisa progredir? Pois bem! Nosso Caso de Uso vai salvar a receita e, no mesmo segundo, atualizar o status do paciente no banco de dados de <text:span text:style-name="Source_20_Text">"pending_documentation"</text:span> para <text:span text:style-name="Source_20_Text">"under_analysis"</text:span>.</text:p>
      <text:p text:style-name="P99">Para que isso funcione redondinho, vamos precisar injetar <text:span text:style-name="T3">dois repositórios</text:span> dentro desse Caso de Uso: o de prescrições (para salvar a receita) e o de pacientes (para atualizar o status do paciente).</text:p>
      <text:h text:style-name="P105" text:outline-level="3">🛠️ Passo Prático: Criando o Caso de Uso de Prescrição</text:h>
      <text:p text:style-name="P99">Execute o comando abaixo no seu terminal para gerar o arquivo de caso de uso:</text:p>
      <text:p text:style-name="P93"/>
      <text:p text:style-name="P93">gemini-code-1782841722179.sh</text:p>
      <text:p text:style-name="P93"/>
      <text:h text:style-name="P98" text:outline-level="3">🧠 Entendendo a Arquitetura Limpa</text:h>
      <text:p text:style-name="P99">Veja que o caso de uso não quer saber se o banco é MySQL ou PostgreSQL. Ele apenas recebe as interfaces, executa as validações e dita o fluxo das regras de negócio organizadamente.</text:p>
      <text:p text:style-name="P99">Com a nossa lógica central de receitas finalizada, o próximo e último passo da <text:span text:style-name="T3">Semana 3</text:span> é expor a rota HTTP no Gin para que possamos fazer o teste de envio e checar se o sistema barra receitas com a validade expirada!</text:p>
      <text:p text:style-name="P93"/>
      <text:p text:style-name="P93">Excelente! Vamos fechar a nossa <text:span text:style-name="T3">Semana 3</text:span> criando a camada HTTP (<text:span text:style-name="T3">Handler</text:span> e <text:span text:style-name="T3">Rota</text:span>) do Gin para as prescrições médicas.</text:p>
      <text:p text:style-name="P99">Em seguida, faremos a fiação no <text:span text:style-name="Source_20_Text">main.go</text:span> e realizaremos dois testes fantásticos: um tentando cadastrar uma receita válida e outro tentando cadastrar uma receita com data vencida para ver o nosso domínio barrando a operação.</text:p>
      <text:h text:style-name="P105" text:outline-level="3">🛠️ Passo 1: Criando Handler e Rotas de Prescrições</text:h>
      <text:p text:style-name="P93">Execute o bloco abaixo no seu terminal para gerar a camada HTTP:</text:p>
      <text:p text:style-name="P93">gemini-code-1782841814510.sh</text:p>
      <text:p text:style-name="P93"/>
      <text:h text:style-name="P98" text:outline-level="3"><text:soft-page-break/>🪢 Passo 2: Atualizando a Fiação Geral no <text:span text:style-name="Source_20_Text">main.go</text:span></text:h>
      <text:p text:style-name="P99">Vamos abrir o arquivo principal e injetar a nova rota junto com as dependências cruzadas (já que o caso de uso de receitas pede o repositório de pacientes).</text:p>
      <text:p text:style-name="P99">Execute no terminal para atualizar o <text:span text:style-name="Source_20_Text">main.go</text:span>:</text:p>
      <text:p text:style-name="P93">gemini-code-1782841853240.sh</text:p>
      <text:p text:style-name="P93"/>
      <text:h text:style-name="P94" text:outline-level="2">🏎️ Testes Práticos da Semana 3</text:h>
      <text:p text:style-name="P99">Ligue o seu servidor: <text:span text:style-name="Source_20_Text">go run cmd/api/main.go</text:span></text:p>
      <text:p text:style-name="P99">Abra <text:span text:style-name="T3">outra aba do seu terminal</text:span>. Vamos fazer dois testes. Para eles, use o ID da sua associação (<text:span text:style-name="Source_20_Text">61a72d3e-d4f9-4b34-b37a-6b0c26ede728</text:span>) e o ID do paciente que criamos na semana passada (<text:span text:style-name="Source_20_Text">086b81b5-5ae4-4d13-b37a-6b0c26ede728</text:span> ou o UUID real que retornou do seu último print!).</text:p>
      <text:h text:style-name="P105" text:outline-level="3">❌ Teste 1: Cadastrar receita VENCIDA (Deve dar Erro!)</text:h>
      <text:p text:style-name="P99">Vamos enviar uma data de expiração no passado (ano de 2023) para ver o Go bloqueando a inserção:</text:p>
      <text:p text:style-name="P93"/>
      <text:p text:style-name="P93"/>
      <text:p text:style-name="P93">gemini-code-1782841891606.sh</text:p>
      <text:p text:style-name="P93"/>
      <text:p text:style-name="P93"><text:span text:style-name="T5">O sistema deve te retornar:</text:span> <text:span text:style-name="Source_20_Text">{"error":"não é possível cadastrar uma receita com data de validade vencida"}</text:span>.</text:p>
      <text:p text:style-name="P93"/>
      <text:h text:style-name="P98" text:outline-level="3">Teste 2: Cadastrar receita VÁLIDA (Deve dar Sucesso!)</text:h>
      <text:p text:style-name="P99">Agora, vamos colocar uma validade para o futuro (como final de 2026/2027):</text:p>
      <text:p text:style-name="P93"/>
      <text:p text:style-name="P93">gemini-code-1782841991834.sh</text:p>
      <text:p text:style-name="P93"/>
      <text:p text:style-name="P93"/>
      <text:p text:style-name="P107">Saida com erro pois não tem nada cadastrado:</text:p>
      <text:p text:style-name="P107"/>
      <text:p text:style-name="P107"><draw:frame draw:style-name="fr1" draw:name="Image1" text:anchor-type="char" svg:width="4.8898in" svg:height="3.4083in" draw:z-index="0"><draw:image xlink:href="Pictures/1000000100000557000003B9C1BE00FC.png" xlink:type="simple" xlink:show="embed" xlink:actuate="onLoad" draw:mime-type="image/png"/></draw:frame></text:p>
      <text:p text:style-name="P93"/>
      <text:p text:style-name="P93"/>
      <text:p text:style-name="P93"/>
      <text:p text:style-name="P93"/>
      <text:p text:style-name="P93"/>
      <text:p text:style-name="P93"/>
      <text:p text:style-name="P93"/>
      <text:p text:style-name="P93"/>
      <text:p text:style-name="P93"/>
      <text:p text:style-name="P93"/>
      <text:p text:style-name="P93"/>
      <text:h text:style-name="P98" text:outline-level="3"><text:soft-page-break/>🔍 Por que isso aconteceu?</text:h>
      <text:p text:style-name="P99">Essa é a nossa validação de segurança <text:span text:style-name="T3">Multi-Tenant</text:span> funcionando perfeitamente! No primeiro teste da Semana 2, o seu banco gerou um ID único real para o paciente. Como no meu exemplo de comando eu usei um ID genérico (<text:span text:style-name="Source_20_Text">086b81b5-5ae4-4d13-b37a-6b0c26ede728</text:span>), o Go foi até a tabela <text:span text:style-name="Source_20_Text">patients</text:span> procurar por ele e não achou nada.</text:p>
      <text:p text:style-name="P99">Para o teste passar, só precisamos usar o <text:span text:style-name="T3">ID real do paciente</text:span> que o banco te devolveu no passo anterior. Olhando para o seu print anterior (<text:span text:style-name="Source_20_Text">image_743eb8.png</text:span>), o ID do seu paciente criado é: 👉 <text:span text:style-name="Source_20_Text"><text:span text:style-name="T3">086b81b5-5ae4-4d13-b30b-b393e3503bd0</text:span></text:span> <text:span text:style-name="T5">(repare que o final do seu ID real termina com </text:span><text:span text:style-name="Source_20_Text"><text:span text:style-name="T5">3bd0</text:span></text:span><text:span text:style-name="T5">, e o do meu exemplo terminaitava em </text:span><text:span text:style-name="Source_20_Text"><text:span text:style-name="T5">728</text:span></text:span><text:span text:style-name="T5">!)</text:span></text:p>
      <text:h text:style-name="P105" text:outline-level="3">🏎️ Vamos refazer os testes com o ID correto!</text:h>
      <text:p text:style-name="P99">Substitua pelo ID real do seu print e execute no terminal:</text:p>
      <text:h text:style-name="P108" text:outline-level="4">❌ Teste 1: Cadastrar receita VENCIDA (Deve dar erro de data!)</text:h>
      <text:p text:style-name="P93"/>
      <text:h text:style-name="P94" text:outline-level="2">gemini-code-1782842180337.sh</text:h>
      <text:p text:style-name="P93"/>
      <text:p text:style-name="P93"><text:span text:style-name="T5">Deve retornar:</text:span> <text:span text:style-name="Source_20_Text">{"error":"não é possível cadastrar uma receita com data de validade vencida"}</text:span></text:p>
      <text:p text:style-name="P93"><text:span text:style-name="Source_20_Text"/></text:p>
      <text:p text:style-name="P93"><draw:frame draw:style-name="fr2" draw:name="Image2" text:anchor-type="char" svg:width="6.9252in" svg:height="2.8925in" draw:z-index="1"><draw:image xlink:href="Pictures/100000010000053F00000231ED86AD4C.png" xlink:type="simple" xlink:show="embed" xlink:actuate="onLoad" draw:mime-type="image/png"/></draw:frame><text:span text:style-name="Source_20_Text"/></text:p>
      <text:p text:style-name="P93"><text:span text:style-name="Source_20_Text"/></text:p>
      <text:p text:style-name="P93"><text:span text:style-name="Source_20_Text"/></text:p>
      <text:p text:style-name="P93"><text:span text:style-name="Source_20_Text"/></text:p>
      <text:p text:style-name="P93"><text:span text:style-name="Source_20_Text">🎯 Teste 2: Cadastrar receita VÁLIDA (Deve dar Sucesso - 201 Created!)</text:span></text:p>
      <text:p text:style-name="P93"><text:span text:style-name="Source_20_Text"/></text:p>
      <text:p text:style-name="P93"><text:span text:style-name="Source_20_Text">gemini-code-1782842323898.sh</text:span></text:p>
      <text:p text:style-name="P93"><text:span text:style-name="Source_20_Text"/></text:p>
      <text:p text:style-name="P93"><draw:frame draw:style-name="fr3" draw:name="Image3" text:anchor-type="char" svg:width="6.9252in" svg:height="4.6217in" draw:z-index="2"><draw:image xlink:href="Pictures/10000001000005520000038D6E33D761.png" xlink:type="simple" xlink:show="embed" xlink:actuate="onLoad" draw:mime-type="image/png"/></draw:frame><text:soft-page-break/><text:span text:style-name="Source_20_Text"/></text:p>
      <text:h text:style-name="P94" text:outline-level="2">MARCO ALCANÇADO: FIM DA SEMANA 3!</text:h>
      <text:p text:style-name="P99">Assim que você rodar os testes, você verá o poder do modelo de arquitetura que construiu. O banco de dados está protegido, as regras de saúde estão blindadas e o fluxo do seu SaaS avança com segurança.</text:p>
      <text:p text:style-name="P99">Me envie o resultado dos testes para carimbarmos oficialmente a Semana 3 e abrirmos a nossa última etapa: <text:span text:style-name="T3">Semana 4 (Módulo de Estoque e Dispensação de Medicamentos)</text:span>!</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h text:style-name="P94" text:outline-level="2">📅 Bem-vindo à Semana 4: O Módulo de Estoque e Dispensação</text:h>
      <text:p text:style-name="P99">Agora que o paciente tem uma receita ativa sob análise, o passo final do fluxo do seu projeto é a <text:span text:style-name="T3">venda/entrega do medicamento (Dispensação) e a baixa automática no estoque</text:span>.</text:p>
      <text:p text:style-name="P99">Nesta semana final do desenvolvimento do backend, vamos construir:</text:p>
      <text:list text:style-name="L17">
        <text:list-item>
          <text:p text:style-name="P109"><text:span text:style-name="T3">Banco de Dados (</text:span><text:span text:style-name="Source_20_Text"><text:span text:style-name="T3">inventory</text:span></text:span><text:span text:style-name="T3">):</text:span> Uma tabela para cadastrar os produtos da associação (ex: Óleo CBD Full Spectrum 30ml) e a quantidade atual em estoque.</text:p>
        </text:list-item>
        <text:list-item>
          <text:p text:style-name="P109"><text:span text:style-name="T3">Caso de Uso de Dispensação:</text:span> A regra de ouro. Quando um pedido for feito, o sistema deve:</text:p>
          <text:list>
            <text:list-item>
              <text:p text:style-name="P109">Verificar se há estoque suficiente do produto.</text:p>
            </text:list-item>
            <text:list-item>
              <text:p text:style-name="P109">Se houver, subtrair a quantidade vendida do estoque total.</text:p>
            </text:list-item>
            <text:list-item>
              <text:p text:style-name="P109">Se não houver, barrar a operação avisando "Estoque insuficiente".</text:p>
            </text:list-item>
          </text:list>
        </text:list-item>
      </text:list>
      <text:h text:style-name="P105" text:outline-level="3">🛠️ Passo 1: Criando a Tabela de Estoque (<text:span text:style-name="Source_20_Text">products</text:span>)</text:h>
      <text:p text:style-name="P99">Vamos rodar o comando SQL diretamente no seu Docker para subir a tabela de produtos. Cada produto também pertence a uma associação específica (<text:span text:style-name="Source_20_Text">association_id</text:span>), mantendo o isolamento total dos dados.</text:p>
      <text:p text:style-name="P99">Abra o terminal e execute:</text:p>
      <text:p text:style-name="P93"/>
      <text:p text:style-name="P93">gemini-code-1782842578878.sh</text:p>
      <text:p text:style-name="P93"/>
      <text:p text:style-name="P93">Tabela injetada! O próximo passo é criar a pasta e os arquivos de <text:span text:style-name="T3">Domínio do Produto (</text:span><text:span text:style-name="Source_20_Text"><text:span text:style-name="T3">domain/product</text:span></text:span><text:span text:style-name="T3">)</text:span> no Go para definirmos as regras de movimentação de estoque.</text:p>
      <text:p text:style-name="P93"/>
      <text:p text:style-name="P93"/>
      <text:p text:style-name="P93">Bora fechar esse backend com chave de ouro, Lucas! Com a tabela <text:span text:style-name="Source_20_Text">products</text:span> criada no Postgres, vamos construir o <text:span text:style-name="T3">Domínio do Produto (</text:span><text:span text:style-name="Source_20_Text"><text:span text:style-name="T3">domain/product</text:span></text:span><text:span text:style-name="T3">)</text:span> no Go.</text:p>
      <text:p text:style-name="P99">Nesta camada, vamos estruturar a entidade que gerencia as informações das medicações e aplicar a lógica de movimentação de estoque: dar entrada em novas unidades e, principalmente, validar se há saldo suficiente antes de efetuar uma baixa (venda/dispensação).</text:p>
      <text:h text:style-name="P105" text:outline-level="3">🛠️ Passo Prático: Criando o Domínio de Produtos</text:h>
      <text:p text:style-name="P99">Execute o comando abaixo no terminal para criar a pasta do domínio e estruturar o arquivo contendo a <text:span text:style-name="T3">Entidade</text:span> e a <text:span text:style-name="T3">Interface</text:span> do Repositório:</text:p>
      <text:p text:style-name="P93"/>
      <text:p text:style-name="P93">gemini-code-1782842751839.sh</text:p>
      <text:p text:style-name="P93"/>
      <text:h text:style-name="P98" text:outline-level="3">🧠 Análise do Código: Por que <text:span text:style-name="Source_20_Text">PriceCents</text:span> em vez de float?</text:h>
      <text:p text:style-name="P99">Você deve ter reparado que usamos <text:span text:style-name="Source_20_Text">price_cents INT</text:span> e <text:span text:style-name="Source_20_Text">PriceCents int</text:span> em vez de tipos de ponto flutuante como <text:span text:style-name="Source_20_Text">float64</text:span>.</text:p>
      <text:p text:style-name="P110"><text:span text:style-name="T3">Regra de ouro em sistemas financeiros/SaaS:</text:span> Nunca use floats para armazenar dinheiro. Computadores lidam mal com frações binárias de ponto flutuante, o que gera aquelas famosas dízimas estranhas (como <text:span text:style-name="Source_20_Text">99.99999994</text:span>). Guardar em centavos como um número inteiro limpo (<text:span text:style-name="Source_20_Text">int</text:span>) elimina qualquer chance de erro de arredondamento no seu banco de dados. Na hora de exibir no frontend, basta dividir por 100!</text:p>
      <text:p text:style-name="P99">Agora que nossa entidade está blindada com as regras de estoque, podemos avançar para o <text:span text:style-name="T3">Repositório de Infraestrutura</text:span> para escrever as queries no Postgres.</text:p>
      <text:p text:style-name="P93"/>
      <text:p text:style-name="P93"><text:soft-page-break/></text:p>
      <text:p text:style-name="P93">Perfeito, Lucas! Vamos criar a camada de <text:span text:style-name="T3">Infraestrutura</text:span> para o módulo de produtos, escrevendo o mapeamento SQL para salvar, buscar e atualizar as quantidades de estoque diretamente no PostgreSQL.</text:p>
      <text:p text:style-name="P99">Nesse repositório, além dos métodos tradicionais, adicionaremos o <text:span text:style-name="Source_20_Text">UpdateStock</text:span>, que será responsável por persistir a nova quantidade de frascos no banco de dados após uma venda ou entrada.</text:p>
      <text:h text:style-name="P105" text:outline-level="3">🛠️ Passo Prático: Criando o Repositório Postgres de Produtos</text:h>
      <text:p text:style-name="P99">Execute o comando abaixo no seu terminal para gerar o arquivo de persistência:</text:p>
      <text:p text:style-name="P93"/>
      <text:p text:style-name="P93">gemini-code-1782842842116.sh</text:p>
      <text:p text:style-name="P93"/>
      <text:h text:style-name="P98" text:outline-level="3">🧠 Foco no Multi-Tenancy</text:h>
      <text:p text:style-name="P99">Repare como todas as queries SQL, incluindo a de atualização (<text:span text:style-name="Source_20_Text">UPDATE products ... WHERE association_id = $3 AND id = $4</text:span>), exigem obrigatoriamente a checagem do <text:span text:style-name="Source_20_Text">association_id</text:span>.</text:p>
      <text:p text:style-name="P99">Isso previne uma das falhas de segurança mais graves em sistemas SaaS: o risco de um funcionário mal-intencionado ou um bug alterar o estoque ou o preço de produtos pertencentes a <text:span text:style-name="T3">outra</text:span> associação parceira.</text:p>
      <text:p text:style-name="P99">Com o banco de dados pronto, nosso próximo passo é construir os <text:span text:style-name="T3">Casos de Uso</text:span>. Desta vez, criaremos dois fluxos na aplicação: um para cadastrar o produto no catálogo e outro para realizar a dispensação (baixa de estoque).</text:p>
      <text:p text:style-name="P93"/>
      <text:p text:style-name="P93">Vamos agora construir a camada de <text:span text:style-name="T3">Aplicação</text:span> com os dois Casos de Uso fundamentais do estoque:</text:p>
      <text:list text:style-name="L18">
        <text:list-item>
          <text:p text:style-name="P111"><text:span text:style-name="Source_20_Text"><text:span text:style-name="T3">CreateProductUseCase</text:span></text:span><text:span text:style-name="T3">:</text:span> Para cadastrar os remédios (óleos, pomadas, etc.) no catálogo de cada associação.</text:p>
        </text:list-item>
        <text:list-item>
          <text:p text:style-name="P111"><text:span text:style-name="Source_20_Text"><text:span text:style-name="T3">DispenseProductUseCase</text:span></text:span><text:span text:style-name="T3">:</text:span> O coração da Semana 4! Ele vai buscar o produto, carregar as regras de negócio de estoque que escrevemos no domínio, subtrair a quantidade vendida e salvar o novo saldo no banco. Se o saldo for insuficiente, ele barra antes de tocar no banco de dados.</text:p>
        </text:list-item>
      </text:list>
      <text:h text:style-name="P105" text:outline-level="3">🛠️ Passo Prático: Criando os Casos de Uso do Estoque</text:h>
      <text:p text:style-name="P99">Execute o bloco abaixo no seu terminal para gerar os dois arquivos de fluxo:</text:p>
      <text:p text:style-name="P93"/>
      <text:p text:style-name="P93"/>
      <text:p text:style-name="P93">gemini-code-1782842923121.sh</text:p>
      <text:p text:style-name="P93"/>
      <text:h text:style-name="P98" text:outline-level="3">📂 O Próximo Passo: Interface HTTP (Gin)</text:h>
      <text:p text:style-name="P99">A lógica do controle de estoque e dispensação está 100% amarrada e protegida. Agora, precisamos criar os <text:span text:style-name="T3">Handlers</text:span> e as <text:span text:style-name="T3">Rotas</text:span> no Gin para expor os endpoints que o Next.js usará para criar produtos e realizar vendas.</text:p>
      <text:p text:style-name="P93"/>
      <text:p text:style-name="P93">Vamos concluir a <text:span text:style-name="T3">Semana 4</text:span> e fechar com chave de ouro o backend da nossa API!</text:p>
      <text:p text:style-name="P99">Vamos criar as rotas HTTP no Gin para o catálogo de produtos e para a dispensação (venda) do medicamento, além de amarrar tudo no nosso arquivo <text:span text:style-name="Source_20_Text">main.go</text:span>.</text:p>
      <text:h text:style-name="P105" text:outline-level="3">🛠️ Passo 1: Criando Handler e Rotas de Produtos e Estoque</text:h>
      <text:p text:style-name="P99">Execute o bloco abaixo no seu terminal para gerar a camada de entrega HTTP:</text:p>
      <text:p text:style-name="P93"/>
      <text:p text:style-name="P93">gemini-code-1782843007476.sh</text:p>
      <text:h text:style-name="P98" text:outline-level="3"><text:soft-page-break/>🪢 Passo 2: Atualizando a Fiação Geral no <text:span text:style-name="Source_20_Text">main.go</text:span></text:h>
      <text:p text:style-name="P99">Agora, vamos atualizar o ponto de entrada da API para plugar o nosso novo módulo de estoque. Execute no terminal:</text:p>
      <text:p text:style-name="P93"/>
      <text:p text:style-name="P93">gemini-code-1782843055053.sh</text:p>
      <text:p text:style-name="P93"/>
      <text:h text:style-name="P94" text:outline-level="2">🏎️ Os Testes Finais da Semana 4</text:h>
      <text:p text:style-name="P99">Inicie o servidor: <text:span text:style-name="Source_20_Text">go run cmd/api/main.go</text:span></text:p>
      <text:p text:style-name="P99">Abra outra aba no terminal e vamos rodar os cenários de teste usando o ID da sua associação (<text:span text:style-name="Source_20_Text">61a72d3e-d4f9-4b34-b37a-6b0c26ede728</text:span>).</text:p>
      <text:h text:style-name="P105" text:outline-level="3">📦 Teste 1: Cadastrar um Produto com estoque inicial</text:h>
      <text:p text:style-name="P99">Vamos cadastrar o frasco de óleo CBD com <text:span text:style-name="T3">10 unidades em estoque</text:span>, custando R$ 150,00 (representado em centavos: <text:span text:style-name="Source_20_Text">15000</text:span>):</text:p>
      <text:p text:style-name="P93"/>
      <text:p text:style-name="P93">gemini-code-1782843094471.sh</text:p>
      <text:p text:style-name="P93"><draw:frame draw:style-name="fr4" draw:name="Image4" text:anchor-type="char" svg:x="0.6402in" svg:y="0.0484in" svg:width="4.4772in" svg:height="2.9882in" draw:z-index="3"><draw:image xlink:href="Pictures/10000001000005520000038D79C39720.png" xlink:type="simple" xlink:show="embed" xlink:actuate="onLoad" draw:mime-type="image/png"/></draw:frame></text:p>
      <text:p text:style-name="P93"/>
      <text:p text:style-name="P93"/>
      <text:p text:style-name="P93"/>
      <text:p text:style-name="P93"/>
      <text:p text:style-name="P112"/>
      <text:p text:style-name="P112"/>
      <text:p text:style-name="P112"/>
      <text:p text:style-name="P112"/>
      <text:p text:style-name="P112"/>
      <text:p text:style-name="P112"/>
      <text:p text:style-name="P112"/>
      <text:p text:style-name="P112"/>
      <text:p text:style-name="P112"/>
      <text:p text:style-name="P112"><text:span text:style-name="T3">Copie o </text:span><text:span text:style-name="Source_20_Text"><text:span text:style-name="T3">"id"</text:span></text:span><text:span text:style-name="T3"> do produto que o terminal vai te retornar.</text:span></text:p>
      <text:p text:style-name="P113"/>
      <text:h text:style-name="P114" text:outline-level="3">🛒 Teste 2: Realizar Dispensação VÁLIDA (Baixa de Estoque)</text:h>
      <text:p text:style-name="P115">Vamos simular a retirada de 2 frascos (Substitua o <text:span text:style-name="Source_20_Text">COLE_O_ID_DO_PRODUTO_AQUI</text:span> pelo UUID copiado):</text:p>
      <text:p text:style-name="P113"/>
      <text:p text:style-name="P113">gemini-code-1782843231366.sh</text:p>
      <text:p text:style-name="P113"><draw:frame draw:style-name="fr1" draw:name="Image5" text:anchor-type="char" svg:width="4.3744in" svg:height="2.9193in" draw:z-index="4"><draw:image xlink:href="Pictures/10000001000005520000038D4DDC218F.png" xlink:type="simple" xlink:show="embed" xlink:actuate="onLoad" draw:mime-type="image/png"/></draw:frame><text:soft-page-break/></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pan text:style-name="T5">O sistema deve dar HTTP 200 e mostrar que o produto agora tem </text:span><text:span text:style-name="Source_20_Text"><text:span text:style-name="T5">"quantity": 8</text:span></text:span><text:span text:style-name="T5">!</text:span></text:p>
      <text:p text:style-name="P116"/>
      <text:p text:style-name="P116"/>
      <text:h text:style-name="P114" text:outline-level="3">❌ Teste 3: Tentar retirar mais do que tem no estoque (Erro!)</text:h>
      <text:p text:style-name="P115">Tente fazer uma dispensação pedindo 20 frascos do mesmo produto:</text:p>
      <text:p text:style-name="P113"/>
      <text:p text:style-name="P113">gemini-code-1782843596566.sh</text:p>
      <text:p text:style-name="P113"/>
      <text:p text:style-name="P113"><draw:frame draw:style-name="fr4" draw:name="Image6" text:anchor-type="char" svg:x="0.8799in" svg:y="-0.0902in" svg:width="4.2173in" svg:height="2.8146in" draw:z-index="5"><draw:image xlink:href="Pictures/10000001000005520000038D741A9312.png" xlink:type="simple" xlink:show="embed" xlink:actuate="onLoad" draw:mime-type="image/png"/></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pan text:style-name="T5">O sistema deve interceptar e devolver:</text:span> <text:span text:style-name="Source_20_Text">{"error":"saldo insuficiente em estoque para realizar a dispensação"}</text:span>.</text:p>
      <text:p text:style-name="P113"/>
      <text:p text:style-name="P113"/>
      <text:p text:style-name="P113"/>
      <text:p text:style-name="P113"><text:soft-page-break/></text:p>
      <text:p text:style-name="P113"/>
      <text:p text:style-name="P113">🏆 BACKEND CONCLUÍDO COM SUCESSO! 🏆</text:p>
      <text:p text:style-name="P113"/>
      <text:p text:style-name="P113">============================================================</text:p>
      <text:p text:style-name="P113"><text:s/>🔥 PARABÉNS, LUCAS! FIM DO BACKEND EM GO! 🔥</text:p>
      <text:p text:style-name="P113">============================================================</text:p>
      <text:p text:style-name="P113"><text:s/>✓ Semana 1: Estrutura, Associações e Usuários [OK]</text:p>
      <text:p text:style-name="P113"><text:s/>✓ Semana 2: Gestão de Pacientes Multi-Tenant [OK]</text:p>
      <text:p text:style-name="P113"><text:s/>✓ Semana 3: Controle de Prescrições e Validades [OK]</text:p>
      <text:p text:style-name="P113"><text:s/>✓ Semana 4: Catálogo de Produtos, Estoque e Vendas [OK]</text:p>
      <text:p text:style-name="P113">============================================================</text:p>
      <text:p text:style-name="P113"/>
      <text:p text:style-name="P113">Olhando para a imagem <text:span text:style-name="Source_20_Text">image_8010dd.png</text:span>, o teste rodou de forma impecável:</text:p>
      <text:list text:style-name="L19">
        <text:list-item>
          <text:p text:style-name="P117">Cadastro do Produto: Criou o Óleo CBD com o ID <text:span text:style-name="Source_20_Text">28ec987f-c1ec-4071-add8-73dd5f2c78aa</text:span> e estoque inicial de 10 unidades (<text:span text:style-name="Source_20_Text">201 Created</text:span>).</text:p>
        </text:list-item>
        <text:list-item>
          <text:p text:style-name="P117">Dispensação Válida: Você pediu 2 unidades, o sistema aceitou (<text:span text:style-name="Source_20_Text">200 OK</text:span>) e o saldo caiu exatamente para <text:span text:style-name="Source_20_Text">8</text:span>.</text:p>
        </text:list-item>
        <text:list-item>
          <text:p text:style-name="P117">Bloqueio de Segurança: Você tentou forçar a retirada de 20 unidades e o domínio barrou retornando o erro de negócio <text:span text:style-name="Source_20_Text">"saldo insuficiente em estoque para realizar a dispensação"</text:span> com <text:span text:style-name="Source_20_Text">400 Bad Request</text:span>.</text:p>
        </text:list-item>
      </text:list>
      <text:p text:style-name="P115">Os logs do Gin no fundo do terminal mostram a sequência exata acontecendo de forma limpa e rápida. O backend do seu SaaS Multi-Tenant está pronto, blindado e robusto.</text:p>
      <text:h text:style-name="P118" text:outline-level="2">🚀 Próxima Parada: Frontend com Next.js</text:h>
      <text:p text:style-name="P115">Com o motor de pé, vamos começar a dar vida visual ao Cannacare V2. Na próxima etapa, mudaremos o chip para o ecossistema do JavaScript/TypeScript e prepararemos o ambiente visual.</text:p>
      <text:p text:style-name="P113"/>
      <text:p text:style-name="P113"/>
      <text:p text:style-name="P1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30T09:35:58.254007362</meta:creation-date>
    <meta:generator>LibreOffice/26.2.4.2$Linux_X86_64 LibreOffice_project/620$Build-2</meta:generator>
    <dc:date>2026-06-30T16:00:43.664931152</dc:date>
    <meta:editing-duration>PT5H51M21S</meta:editing-duration>
    <meta:editing-cycles>86</meta:editing-cycles>
    <meta:document-statistic meta:table-count="0" meta:image-count="6" meta:object-count="0" meta:page-count="24" meta:paragraph-count="461" meta:word-count="7126" meta:character-count="44131" meta:non-whitespace-character-count="37297"/>
  </office:meta>
</office:document-meta>
</file>