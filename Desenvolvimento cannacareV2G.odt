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00000041A0D9DC344.png" manifest:media-type="image/png"/>
  <manifest:file-entry manifest:full-path="Pictures/10000001000005520000038D741A9312.png" manifest:media-type="image/png"/>
  <manifest:file-entry manifest:full-path="Pictures/10000001000005520000038D4DDC218F.png" manifest:media-type="image/png"/>
  <manifest:file-entry manifest:full-path="Pictures/10000001000005520000038D79C39720.png" manifest:media-type="image/png"/>
  <manifest:file-entry manifest:full-path="Pictures/10000001000005520000038D6E33D761.png" manifest:media-type="image/png"/>
  <manifest:file-entry manifest:full-path="Pictures/100000010000053F00000231ED86AD4C.png" manifest:media-type="image/png"/>
  <manifest:file-entry manifest:full-path="Pictures/1000000100000557000003B9C1BE00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P103" style:family="paragraph" style:parent-style-name="Text_20_body">
      <style:text-properties style:font-name="Liberation Mono" fo:font-size="8pt" officeooo:rsid="004cd44d" officeooo:paragraph-rsid="004cd44d" style:font-size-asian="8pt" style:font-size-complex="8pt"/>
    </style:style>
    <style:style style:name="P104" style:family="paragraph" style:parent-style-name="Text_20_body">
      <style:text-properties style:font-name="Liberation Mono" fo:font-size="8pt" officeooo:rsid="004cd44d" style:font-size-asian="8pt" style:font-size-complex="8pt"/>
    </style:style>
    <style:style style:name="P105" style:family="paragraph" style:parent-style-name="Heading_20_3">
      <style:paragraph-properties fo:margin-top="0in" fo:margin-bottom="0.0972in" style:contextual-spacing="false" fo:line-height="115%"/>
      <style:text-properties style:font-name="Liberation Mono" fo:font-size="8pt" officeooo:rsid="0041caf7" style:font-size-asian="8pt" style:font-size-complex="8pt"/>
    </style:style>
    <style:style style:name="P106" style:family="paragraph" style:parent-style-name="Text_20_body" style:list-style-name="L16">
      <style:text-properties style:font-name="Liberation Mono" fo:font-size="8pt" officeooo:rsid="0041caf7" style:font-size-asian="8pt" style:font-size-complex="8pt"/>
    </style:style>
    <style:style style:name="P107" style:family="paragraph" style:parent-style-name="Text_20_body">
      <style:text-properties style:font-name="Liberation Mono" fo:font-size="8pt" officeooo:rsid="005b9c75" officeooo:paragraph-rsid="005b9c75" style:font-size-asian="8pt" style:font-size-complex="8pt"/>
    </style:style>
    <style:style style:name="P108" style:family="paragraph" style:parent-style-name="Heading_20_4">
      <style:paragraph-properties fo:margin-top="0in" fo:margin-bottom="0.0972in" style:contextual-spacing="false" fo:line-height="115%"/>
      <style:text-properties style:font-name="Liberation Mono" fo:font-size="8pt" officeooo:rsid="0041caf7" style:font-size-asian="8pt" style:font-size-complex="8pt"/>
    </style:style>
    <style:style style:name="P109" style:family="paragraph" style:parent-style-name="Text_20_body" style:list-style-name="L17">
      <style:text-properties style:font-name="Liberation Mono" fo:font-size="8pt" officeooo:rsid="0041caf7" style:font-size-asian="8pt" style:font-size-complex="8pt"/>
    </style:style>
    <style:style style:name="P110" style:family="paragraph" style:parent-style-name="Quotations">
      <style:paragraph-properties fo:margin-top="0in" fo:margin-bottom="0.0972in" style:contextual-spacing="false" fo:line-height="115%"/>
      <style:text-properties style:font-name="Liberation Mono" fo:font-size="8pt" officeooo:rsid="0041caf7" style:font-size-asian="8pt" style:font-size-complex="8pt"/>
    </style:style>
    <style:style style:name="P111" style:family="paragraph" style:parent-style-name="Text_20_body" style:list-style-name="L18">
      <style:text-properties style:font-name="Liberation Mono" fo:font-size="8pt" officeooo:rsid="0041caf7" style:font-size-asian="8pt" style:font-size-complex="8pt"/>
    </style:style>
    <style:style style:name="P112" style:family="paragraph" style:parent-style-name="Text_20_body">
      <style:text-properties style:font-name="Liberation Mono" fo:font-size="8pt" officeooo:rsid="0069969f" officeooo:paragraph-rsid="0041caf7" style:font-size-asian="8pt" style:font-size-complex="8pt"/>
    </style:style>
    <style:style style:name="P113" style:family="paragraph" style:parent-style-name="Text_20_body">
      <style:text-properties style:font-name="Liberation Mono" fo:font-size="8pt" fo:font-weight="bold" officeooo:rsid="0069969f" officeooo:paragraph-rsid="0041caf7" style:font-size-asian="8pt" style:font-size-complex="8pt"/>
    </style:style>
    <style:style style:name="P114" style:family="paragraph" style:parent-style-name="Heading_20_3">
      <style:text-properties style:font-name="Liberation Mono" fo:font-size="8pt" fo:font-weight="bold" officeooo:rsid="0069969f" officeooo:paragraph-rsid="0041caf7" style:font-size-asian="8pt" style:font-size-complex="8pt"/>
    </style:style>
    <style:style style:name="P115" style:family="paragraph" style:parent-style-name="Text_20_body">
      <style:text-properties style:font-name="Liberation Mono" fo:font-size="8pt" fo:font-weight="bold" officeooo:rsid="0069969f" style:font-size-asian="8pt" style:font-size-complex="8pt"/>
    </style:style>
    <style:style style:name="P116" style:family="paragraph" style:parent-style-name="Text_20_body">
      <style:text-properties style:font-name="Liberation Mono" fo:font-size="8pt" fo:font-style="italic" fo:font-weight="bold" officeooo:rsid="0069969f" officeooo:paragraph-rsid="0041caf7" style:font-size-asian="8pt" style:font-size-complex="8pt"/>
    </style:style>
    <style:style style:name="P117" style:family="paragraph" style:parent-style-name="Text_20_body" style:list-style-name="L19">
      <style:text-properties style:font-name="Liberation Mono" fo:font-size="8pt" fo:font-weight="bold" officeooo:rsid="0069969f" style:font-size-asian="8pt" style:font-size-complex="8pt"/>
    </style:style>
    <style:style style:name="P118" style:family="paragraph" style:parent-style-name="Heading_20_2">
      <style:text-properties style:font-name="Liberation Mono" fo:font-size="8pt" fo:font-weight="bold" officeooo:rsid="0069969f" officeooo:paragraph-rsid="0041caf7" style:font-size-asian="8pt" style:font-size-complex="8pt"/>
    </style:style>
    <style:style style:name="P119" style:family="paragraph" style:parent-style-name="Text_20_body">
      <style:text-properties style:font-name="Liberation Mono" fo:font-size="8pt" fo:font-weight="bold" officeooo:rsid="007361b0" officeooo:paragraph-rsid="007361b0" style:font-size-asian="8pt" style:font-size-complex="8pt"/>
    </style:style>
    <style:style style:name="P120" style:family="paragraph" style:parent-style-name="Text_20_body">
      <style:text-properties style:font-name="Liberation Mono" fo:font-size="8pt" fo:font-weight="bold" officeooo:rsid="007361b0" style:font-size-asian="8pt" style:font-size-complex="8pt"/>
    </style:style>
    <style:style style:name="P121" style:family="paragraph" style:parent-style-name="Heading_20_3">
      <style:paragraph-properties fo:margin-top="0in" fo:margin-bottom="0.0972in" style:contextual-spacing="false" fo:line-height="115%"/>
      <style:text-properties style:font-name="Liberation Mono" fo:font-size="8pt" officeooo:rsid="007361b0" style:font-size-asian="8pt" style:font-size-complex="8pt"/>
    </style:style>
    <style:style style:name="P122" style:family="paragraph" style:parent-style-name="Heading_20_3">
      <style:paragraph-properties fo:margin-top="0in" fo:margin-bottom="0.0972in" style:contextual-spacing="false" fo:line-height="115%"/>
      <style:text-properties style:font-name="Liberation Mono" fo:font-size="8pt" officeooo:rsid="0069969f" style:font-size-asian="8pt" style:font-size-complex="8pt"/>
    </style:style>
    <style:style style:name="P123" style:family="paragraph" style:parent-style-name="Text_20_body">
      <style:text-properties style:font-name="Liberation Mono" fo:font-size="8pt" fo:font-weight="bold" officeooo:rsid="007a79ce" officeooo:paragraph-rsid="007a79ce" style:font-size-asian="8pt" style:font-size-complex="8pt"/>
    </style:style>
    <style:style style:name="P124" style:family="paragraph" style:parent-style-name="Quotations">
      <style:text-properties style:font-name="Liberation Mono" fo:font-size="8pt" fo:font-weight="bold" officeooo:rsid="0069969f" officeooo:paragraph-rsid="0041caf7" style:font-size-asian="8pt" style:font-size-complex="8pt"/>
    </style:style>
    <style:style style:name="P125" style:family="paragraph" style:parent-style-name="Text_20_body" style:list-style-name="L20">
      <style:text-properties style:font-name="Liberation Mono" fo:font-size="8pt" fo:font-weight="bold" officeooo:rsid="0069969f" style:font-size-asian="8pt" style:font-size-complex="8pt"/>
    </style:style>
    <style:style style:name="P126" style:family="paragraph" style:parent-style-name="Text_20_body">
      <style:paragraph-properties fo:margin-top="0in" fo:margin-bottom="0.0972in" style:contextual-spacing="false" fo:line-height="115%"/>
      <style:text-properties style:font-name="Liberation Mono" fo:font-size="8pt" officeooo:rsid="0080bb59" officeooo:paragraph-rsid="0080bb59" style:font-size-asian="8pt" style:font-size-complex="8pt"/>
    </style:style>
    <style:style style:name="P127" style:family="paragraph" style:parent-style-name="Text_20_body">
      <style:text-properties style:font-name="Liberation Mono" fo:font-size="8pt" fo:font-weight="bold" officeooo:rsid="0080bb59" officeooo:paragraph-rsid="0080bb59" style:font-size-asian="8pt" style:font-size-complex="8pt"/>
    </style:style>
    <style:style style:name="P128" style:family="paragraph" style:parent-style-name="Text_20_body" style:list-style-name="L21">
      <style:text-properties style:font-name="Liberation Mono" fo:font-size="8pt" fo:font-weight="bold" officeooo:rsid="0069969f" style:font-size-asian="8pt" style:font-size-complex="8pt"/>
    </style:style>
    <style:style style:name="P129" style:family="paragraph" style:parent-style-name="Text_20_body">
      <style:text-properties style:font-name="Liberation Mono" fo:font-size="8pt" fo:font-weight="bold" officeooo:rsid="0080bb59" style:font-size-asian="8pt" style:font-size-complex="8pt"/>
    </style:style>
    <style:style style:name="P130" style:family="paragraph" style:parent-style-name="Heading_20_3">
      <style:paragraph-properties fo:margin-top="0in" fo:margin-bottom="0.0972in" style:contextual-spacing="false" fo:line-height="115%"/>
      <style:text-properties style:font-name="Liberation Mono" fo:font-size="8pt" officeooo:rsid="0080bb59"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93">gemini-code-1782838114635.sh</text:p>
      <text:p text:style-name="P93"/>
      <text:p text:style-name="P103">para testar:</text:p>
      <text:p text:style-name="P103">Precisamos passar um ID de usuário que <text:span text:style-name="T3">realmente exista</text:span> na sua tabela <text:span text:style-name="Source_20_Text">users</text:span>. Vamos criar esse usuário atrelado à sua associação agora mesmo.</text:p>
      <text:p text:style-name="P104">Execute este comando no seu terminal para criar o seu usuário administrador:</text:p>
      <text:p text:style-name="P103"/>
      <text:p text:style-name="P93">gemini-code-1782838790508.sh</text:p>
      <text:p text:style-name="P93"/>
      <text:p text:style-name="P93"/>
      <text:p text:style-name="P102"><text:span text:style-name="T18">Ao rodar esse comando, o terminal vai te devolver o JSON do usuário criado. </text:span><text:span text:style-name="T19">Copie o </text:span><text:span text:style-name="Source_20_Text"><text:span text:style-name="T19">"id"</text:span></text:span><text:span text:style-name="T19"> gerado para ele.</text:span></text:p>
      <text:h text:style-name="P105" text:outline-level="3">🏎️ Agora sim: Cadastrando o Paciente</text:h>
      <text:p text:style-name="P100"><text:span text:style-name="T18">Com o ID real do usuário que você acabou de copiar, substitua-o no campo </text:span><text:span text:style-name="Source_20_Text"><text:span text:style-name="T18">"created_by"</text:span></text:span><text:span text:style-name="T18"> abaixo e rode o comando:</text:span></text:p>
      <text:p text:style-name="P93"/>
      <text:p text:style-name="P93">gemini-code-1782838827633.sh</text:p>
      <text:p text:style-name="P93"/>
      <text:p text:style-name="P93"/>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h text:style-name="P94" text:outline-level="2"><text:soft-page-break/>📅 Bem-vindo à Semana 3: O Fluxo de Documentação e Prescrições</text:h>
      <text:p text:style-name="P99">Dando sequência ao fluxo de operações do sistema, uma vez que o paciente está cadastrado e com status <text:span text:style-name="Source_20_Text">pending_documentation</text:span>, o próximo passo crítico é a <text:span text:style-name="T3">Entrada de Documentos e o Controle Clínico</text:span>.</text:p>
      <text:p text:style-name="P99">Nesta semana, vamos focar em construir a estrutura para gerenciar o coração do tratamento do paciente:</text:p>
      <text:list text:style-name="L16">
        <text:list-item>
          <text:p text:style-name="P106"><text:span text:style-name="T3">Banco de Dados:</text:span> Criar a tabela para registrar as <text:span text:style-name="T3">Prescrições Médicas</text:span> (receitas) vinculadas ao paciente.</text:p>
        </text:list-item>
        <text:list-item>
          <text:p text:style-name="P106"><text:span text:style-name="T3">Alertas de Validade:</text:span> Adicionar campos essenciais como a data de emissão e data de validade da receita médica (fundamental para o sistema alertar a associação quando o documento estiver prestes a vencer).</text:p>
        </text:list-item>
        <text:list-item>
          <text:p text:style-name="P106"><text:span text:style-name="T3">Casos de Uso em Go:</text:span> Regras de negócio para validar se uma receita inserida já não nasceu vencida e como vincular o médico responsável.</text:p>
        </text:list-item>
      </text:list>
      <text:h text:style-name="P105" text:outline-level="3">🛠️ Passo 1: Criando a Tabela de Prescrições (<text:span text:style-name="Source_20_Text">prescriptions</text:span>)</text:h>
      <text:p text:style-name="P99">Vamos rodar o comando SQL diretamente no seu container do Docker para subir a estrutura que vai armazenar as receitas e os prazos de validade.</text:p>
      <text:p text:style-name="P99">Abra o seu terminal e execute:</text:p>
      <text:p text:style-name="P93"/>
      <text:p text:style-name="P93">gemini-code-1782839094195.sh</text:p>
      <text:p text:style-name="P93"/>
      <text:p text:style-name="P93">Tabela criada no banco! O próximo passo é criar a nossa camada de <text:span text:style-name="T3">Domínio</text:span> para as prescrições (<text:span text:style-name="Source_20_Text">internal/domain/prescription</text:span>) no Go para começarmos a desenhar as regras de negócio de validação de datas.</text:p>
      <text:p text:style-name="P93"/>
      <text:p text:style-name="P93"/>
      <text:p text:style-name="P93"/>
      <text:p text:style-name="P93">Com a tabela de receitas (<text:span text:style-name="Source_20_Text">prescriptions</text:span>) rodando perfeitamente no PostgreSQL, vamos subir para o Go e construir o <text:span text:style-name="T3">Domínio da Prescrição (</text:span><text:span text:style-name="Source_20_Text"><text:span text:style-name="T3">domain/prescription</text:span></text:span><text:span text:style-name="T3">)</text:span>.</text:p>
      <text:p text:style-name="P99">Nesta camada, aplicaremos uma das regras de negócio mais importantes do módulo clínico: <text:span text:style-name="T3">impedir que uma receita seja cadastrada se a data de validade já tiver expirado</text:span>, além de garantir que os dados do médico (Nome e CRM) sejam obrigatórios.</text:p>
      <text:h text:style-name="P105" text:outline-level="3">🛠️ Passo Prático: Criando o Domínio de Prescrições</text:h>
      <text:p text:style-name="P99">Execute o comando abaixo no seu terminal para estruturar a nova pasta e criar a <text:span text:style-name="T3">Entidade</text:span> junto com o seu <text:span text:style-name="T3">Contrato (Interface)</text:span>:</text:p>
      <text:p text:style-name="P93"/>
      <text:p text:style-name="P93">gemini-code-1782840075109.sh</text:p>
      <text:p text:style-name="P93"/>
      <text:h text:style-name="P98" text:outline-level="3">🧠 O que mudou aqui?</text:h>
      <text:p text:style-name="P99">Note que na nossa <text:span text:style-name="Source_20_Text">interface Repository</text:span>, mudamos um detalhe interessante no método de busca: <text:span text:style-name="Source_20_Text">FindByPatientID(patientID string) ([]*Prescription, error)</text:span>.</text:p>
      <text:p text:style-name="P99">Usamos os colchetes <text:span text:style-name="Source_20_Text">[]</text:span> para indicar um <text:span text:style-name="T3">Slice</text:span> (uma lista/array dinâmico no Go). Fazemos isso porque, ao longo do tratamento, um único paciente pode ter <text:span text:style-name="T3">várias</text:span> receitas acumuladas no histórico do sistema. O Go vai nos retornar a lista completa delas.</text:p>
      <text:p text:style-name="P93"/>
      <text:p text:style-name="P93"/>
      <text:p text:style-name="P93"/>
      <text:p text:style-name="P93"/>
      <text:p text:style-name="P93"><text:soft-page-break/>Vamos agora implementar a camada de <text:span text:style-name="T3">Infraestrutura</text:span> para o módulo de receitas, criando o arquivo que converte as structs do Go em comandos <text:span text:style-name="Source_20_Text">INSERT</text:span> e <text:span text:style-name="Source_20_Text">SELECT</text:span> dentro da nossa tabela <text:span text:style-name="Source_20_Text">prescriptions</text:span> do PostgreSQL.</text:p>
      <text:h text:style-name="P105" text:outline-level="3">🛠️ Passo Prático: Criando o Repositório Postgres de Prescrições</text:h>
      <text:p text:style-name="P99">Execute o comando abaixo no seu terminal para gerar o repositório:</text:p>
      <text:p text:style-name="P93">gemini-code-1782841640603.sh</text:p>
      <text:p text:style-name="P93"/>
      <text:h text:style-name="P98" text:outline-level="3">🧠 Dica do Go: Entendendo o <text:span text:style-name="Source_20_Text">rows.Next()</text:span> e o <text:span text:style-name="Source_20_Text">defer rows.Close()</text:span></text:h>
      <text:p text:style-name="P99">Diferente dos métodos anteriores onde usamos <text:span text:style-name="Source_20_Text">QueryRow</text:span> (para trazer apenas um único registro), aqui usamos o <text:span text:style-name="Source_20_Text">r.db.Query</text:span>. Ele abre um ponteiro de leitura chamado <text:span text:style-name="T3">Cursor</text:span> no banco de dados. O comando <text:span text:style-name="Source_20_Text">defer rows.Close()</text:span> garante que, assim que a função terminar de rodar, essa conexão de leitura seja fechada, evitando que o banco de dados do seu Docker trave por falta de memória.</text:p>
      <text:p text:style-name="P99">Com o banco de dados pronto, o próximo passo lógico é criar o <text:span text:style-name="T3">Caso de Uso de Cadastro de Receita</text:span>. Além de salvar a receita, este caso de uso vai fazer algo muito legal: mudar automaticamente o status do paciente para <text:span text:style-name="Source_20_Text">"under_analysis"</text:span>, avançando o fluxo exatamente como manda o seu plano de negócios!</text:p>
      <text:p text:style-name="P93"/>
      <text:p text:style-name="P93"/>
      <text:p text:style-name="P93">Lucas! Agora vamos construir o <text:span text:style-name="T3">Caso de Uso de Cadastro de Prescrição (</text:span><text:span text:style-name="Source_20_Text"><text:span text:style-name="T3">create_prescription.go</text:span></text:span><text:span text:style-name="T3">)</text:span>.</text:p>
      <text:p text:style-name="P99">Aqui faremos algo muito importante para a automação do seu SaaS. Lembra que no fluxo do seu projeto, assim que a secretaria insere a receita do paciente, o status dele precisa progredir? Pois bem! Nosso Caso de Uso vai salvar a receita e, no mesmo segundo, atualizar o status do paciente no banco de dados de <text:span text:style-name="Source_20_Text">"pending_documentation"</text:span> para <text:span text:style-name="Source_20_Text">"under_analysis"</text:span>.</text:p>
      <text:p text:style-name="P99">Para que isso funcione redondinho, vamos precisar injetar <text:span text:style-name="T3">dois repositórios</text:span> dentro desse Caso de Uso: o de prescrições (para salvar a receita) e o de pacientes (para atualizar o status do paciente).</text:p>
      <text:h text:style-name="P105" text:outline-level="3">🛠️ Passo Prático: Criando o Caso de Uso de Prescrição</text:h>
      <text:p text:style-name="P99">Execute o comando abaixo no seu terminal para gerar o arquivo de caso de uso:</text:p>
      <text:p text:style-name="P93"/>
      <text:p text:style-name="P93">gemini-code-1782841722179.sh</text:p>
      <text:p text:style-name="P93"/>
      <text:h text:style-name="P98" text:outline-level="3">🧠 Entendendo a Arquitetura Limpa</text:h>
      <text:p text:style-name="P99">Veja que o caso de uso não quer saber se o banco é MySQL ou PostgreSQL. Ele apenas recebe as interfaces, executa as validações e dita o fluxo das regras de negócio organizadamente.</text:p>
      <text:p text:style-name="P99">Com a nossa lógica central de receitas finalizada, o próximo e último passo da <text:span text:style-name="T3">Semana 3</text:span> é expor a rota HTTP no Gin para que possamos fazer o teste de envio e checar se o sistema barra receitas com a validade expirada!</text:p>
      <text:p text:style-name="P93"/>
      <text:p text:style-name="P93">Excelente! Vamos fechar a nossa <text:span text:style-name="T3">Semana 3</text:span> criando a camada HTTP (<text:span text:style-name="T3">Handler</text:span> e <text:span text:style-name="T3">Rota</text:span>) do Gin para as prescrições médicas.</text:p>
      <text:p text:style-name="P99">Em seguida, faremos a fiação no <text:span text:style-name="Source_20_Text">main.go</text:span> e realizaremos dois testes fantásticos: um tentando cadastrar uma receita válida e outro tentando cadastrar uma receita com data vencida para ver o nosso domínio barrando a operação.</text:p>
      <text:h text:style-name="P105" text:outline-level="3">🛠️ Passo 1: Criando Handler e Rotas de Prescrições</text:h>
      <text:p text:style-name="P93">Execute o bloco abaixo no seu terminal para gerar a camada HTTP:</text:p>
      <text:p text:style-name="P93">gemini-code-1782841814510.sh</text:p>
      <text:p text:style-name="P93"/>
      <text:h text:style-name="P98" text:outline-level="3"><text:soft-page-break/>🪢 Passo 2: Atualizando a Fiação Geral no <text:span text:style-name="Source_20_Text">main.go</text:span></text:h>
      <text:p text:style-name="P99">Vamos abrir o arquivo principal e injetar a nova rota junto com as dependências cruzadas (já que o caso de uso de receitas pede o repositório de pacientes).</text:p>
      <text:p text:style-name="P99">Execute no terminal para atualizar o <text:span text:style-name="Source_20_Text">main.go</text:span>:</text:p>
      <text:p text:style-name="P93">gemini-code-1782841853240.sh</text:p>
      <text:p text:style-name="P93"/>
      <text:h text:style-name="P94" text:outline-level="2">🏎️ Testes Práticos da Semana 3</text:h>
      <text:p text:style-name="P99">Ligue o seu servidor: <text:span text:style-name="Source_20_Text">go run cmd/api/main.go</text:span></text:p>
      <text:p text:style-name="P99">Abra <text:span text:style-name="T3">outra aba do seu terminal</text:span>. Vamos fazer dois testes. Para eles, use o ID da sua associação (<text:span text:style-name="Source_20_Text">61a72d3e-d4f9-4b34-b37a-6b0c26ede728</text:span>) e o ID do paciente que criamos na semana passada (<text:span text:style-name="Source_20_Text">086b81b5-5ae4-4d13-b37a-6b0c26ede728</text:span> ou o UUID real que retornou do seu último print!).</text:p>
      <text:h text:style-name="P105" text:outline-level="3">❌ Teste 1: Cadastrar receita VENCIDA (Deve dar Erro!)</text:h>
      <text:p text:style-name="P99">Vamos enviar uma data de expiração no passado (ano de 2023) para ver o Go bloqueando a inserção:</text:p>
      <text:p text:style-name="P93"/>
      <text:p text:style-name="P93"/>
      <text:p text:style-name="P93">gemini-code-1782841891606.sh</text:p>
      <text:p text:style-name="P93"/>
      <text:p text:style-name="P93"><text:span text:style-name="T5">O sistema deve te retornar:</text:span> <text:span text:style-name="Source_20_Text">{"error":"não é possível cadastrar uma receita com data de validade vencida"}</text:span>.</text:p>
      <text:p text:style-name="P93"/>
      <text:h text:style-name="P98" text:outline-level="3">Teste 2: Cadastrar receita VÁLIDA (Deve dar Sucesso!)</text:h>
      <text:p text:style-name="P99">Agora, vamos colocar uma validade para o futuro (como final de 2026/2027):</text:p>
      <text:p text:style-name="P93"/>
      <text:p text:style-name="P93">gemini-code-1782841991834.sh</text:p>
      <text:p text:style-name="P93"/>
      <text:p text:style-name="P93"/>
      <text:p text:style-name="P107">Saida com erro pois não tem nada cadastrado:</text:p>
      <text:p text:style-name="P107"/>
      <text:p text:style-name="P107"><draw:frame draw:style-name="fr1" draw:name="Image1" text:anchor-type="char" svg:width="4.8898in" svg:height="3.4083in" draw:z-index="0"><draw:image xlink:href="Pictures/1000000100000557000003B9C1BE00FC.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h text:style-name="P98" text:outline-level="3"><text:soft-page-break/>🔍 Por que isso aconteceu?</text:h>
      <text:p text:style-name="P99">Essa é a nossa validação de segurança <text:span text:style-name="T3">Multi-Tenant</text:span> funcionando perfeitamente! No primeiro teste da Semana 2, o seu banco gerou um ID único real para o paciente. Como no meu exemplo de comando eu usei um ID genérico (<text:span text:style-name="Source_20_Text">086b81b5-5ae4-4d13-b37a-6b0c26ede728</text:span>), o Go foi até a tabela <text:span text:style-name="Source_20_Text">patients</text:span> procurar por ele e não achou nada.</text:p>
      <text:p text:style-name="P99">Para o teste passar, só precisamos usar o <text:span text:style-name="T3">ID real do paciente</text:span> que o banco te devolveu no passo anterior. Olhando para o seu print anterior (<text:span text:style-name="Source_20_Text">image_743eb8.png</text:span>), o ID do seu paciente criado é: 👉 <text:span text:style-name="Source_20_Text"><text:span text:style-name="T3">086b81b5-5ae4-4d13-b30b-b393e3503bd0</text:span></text:span> <text:span text:style-name="T5">(repare que o final do seu ID real termina com </text:span><text:span text:style-name="Source_20_Text"><text:span text:style-name="T5">3bd0</text:span></text:span><text:span text:style-name="T5">, e o do meu exemplo terminaitava em </text:span><text:span text:style-name="Source_20_Text"><text:span text:style-name="T5">728</text:span></text:span><text:span text:style-name="T5">!)</text:span></text:p>
      <text:h text:style-name="P105" text:outline-level="3">🏎️ Vamos refazer os testes com o ID correto!</text:h>
      <text:p text:style-name="P99">Substitua pelo ID real do seu print e execute no terminal:</text:p>
      <text:h text:style-name="P108" text:outline-level="4">❌ Teste 1: Cadastrar receita VENCIDA (Deve dar erro de data!)</text:h>
      <text:p text:style-name="P93"/>
      <text:h text:style-name="P94" text:outline-level="2">gemini-code-1782842180337.sh</text:h>
      <text:p text:style-name="P93"/>
      <text:p text:style-name="P93"><text:span text:style-name="T5">Deve retornar:</text:span> <text:span text:style-name="Source_20_Text">{"error":"não é possível cadastrar uma receita com data de validade vencida"}</text:span></text:p>
      <text:p text:style-name="P93"><text:span text:style-name="Source_20_Text"/></text:p>
      <text:p text:style-name="P93"><draw:frame draw:style-name="fr2" draw:name="Image2" text:anchor-type="char" svg:width="6.9252in" svg:height="2.8925in" draw:z-index="1"><draw:image xlink:href="Pictures/100000010000053F00000231ED86AD4C.png" xlink:type="simple" xlink:show="embed" xlink:actuate="onLoad" draw:mime-type="image/png"/></draw:frame><text:span text:style-name="Source_20_Text"/></text:p>
      <text:p text:style-name="P93"><text:span text:style-name="Source_20_Text"/></text:p>
      <text:p text:style-name="P93"><text:span text:style-name="Source_20_Text"/></text:p>
      <text:p text:style-name="P93"><text:span text:style-name="Source_20_Text"/></text:p>
      <text:p text:style-name="P93"><text:span text:style-name="Source_20_Text">🎯 Teste 2: Cadastrar receita VÁLIDA (Deve dar Sucesso - 201 Created!)</text:span></text:p>
      <text:p text:style-name="P93"><text:span text:style-name="Source_20_Text"/></text:p>
      <text:p text:style-name="P93"><text:span text:style-name="Source_20_Text">gemini-code-1782842323898.sh</text:span></text:p>
      <text:p text:style-name="P93"><text:span text:style-name="Source_20_Text"/></text:p>
      <text:p text:style-name="P93"><draw:frame draw:style-name="fr3" draw:name="Image3" text:anchor-type="char" svg:width="6.9252in" svg:height="4.6217in" draw:z-index="2"><draw:image xlink:href="Pictures/10000001000005520000038D6E33D761.png" xlink:type="simple" xlink:show="embed" xlink:actuate="onLoad" draw:mime-type="image/png"/></draw:frame><text:soft-page-break/><text:span text:style-name="Source_20_Text"/></text:p>
      <text:h text:style-name="P94" text:outline-level="2">MARCO ALCANÇADO: FIM DA SEMANA 3!</text:h>
      <text:p text:style-name="P99">Assim que você rodar os testes, você verá o poder do modelo de arquitetura que construiu. O banco de dados está protegido, as regras de saúde estão blindadas e o fluxo do seu SaaS avança com segurança.</text:p>
      <text:p text:style-name="P99">Me envie o resultado dos testes para carimbarmos oficialmente a Semana 3 e abrirmos a nossa última etapa: <text:span text:style-name="T3">Semana 4 (Módulo de Estoque e Dispensação de Medicamentos)</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P94" text:outline-level="2">📅 Bem-vindo à Semana 4: O Módulo de Estoque e Dispensação</text:h>
      <text:p text:style-name="P99">Agora que o paciente tem uma receita ativa sob análise, o passo final do fluxo do seu projeto é a <text:span text:style-name="T3">venda/entrega do medicamento (Dispensação) e a baixa automática no estoque</text:span>.</text:p>
      <text:p text:style-name="P99">Nesta semana final do desenvolvimento do backend, vamos construir:</text:p>
      <text:list text:style-name="L17">
        <text:list-item>
          <text:p text:style-name="P109"><text:span text:style-name="T3">Banco de Dados (</text:span><text:span text:style-name="Source_20_Text"><text:span text:style-name="T3">inventory</text:span></text:span><text:span text:style-name="T3">):</text:span> Uma tabela para cadastrar os produtos da associação (ex: Óleo CBD Full Spectrum 30ml) e a quantidade atual em estoque.</text:p>
        </text:list-item>
        <text:list-item>
          <text:p text:style-name="P109"><text:span text:style-name="T3">Caso de Uso de Dispensação:</text:span> A regra de ouro. Quando um pedido for feito, o sistema deve:</text:p>
          <text:list>
            <text:list-item>
              <text:p text:style-name="P109">Verificar se há estoque suficiente do produto.</text:p>
            </text:list-item>
            <text:list-item>
              <text:p text:style-name="P109">Se houver, subtrair a quantidade vendida do estoque total.</text:p>
            </text:list-item>
            <text:list-item>
              <text:p text:style-name="P109">Se não houver, barrar a operação avisando "Estoque insuficiente".</text:p>
            </text:list-item>
          </text:list>
        </text:list-item>
      </text:list>
      <text:h text:style-name="P105" text:outline-level="3">🛠️ Passo 1: Criando a Tabela de Estoque (<text:span text:style-name="Source_20_Text">products</text:span>)</text:h>
      <text:p text:style-name="P99">Vamos rodar o comando SQL diretamente no seu Docker para subir a tabela de produtos. Cada produto também pertence a uma associação específica (<text:span text:style-name="Source_20_Text">association_id</text:span>), mantendo o isolamento total dos dados.</text:p>
      <text:p text:style-name="P99">Abra o terminal e execute:</text:p>
      <text:p text:style-name="P93"/>
      <text:p text:style-name="P93">gemini-code-1782842578878.sh</text:p>
      <text:p text:style-name="P93"/>
      <text:p text:style-name="P93">Tabela injetada! O próximo passo é criar a pasta e os arquivos de <text:span text:style-name="T3">Domínio do Produto (</text:span><text:span text:style-name="Source_20_Text"><text:span text:style-name="T3">domain/product</text:span></text:span><text:span text:style-name="T3">)</text:span> no Go para definirmos as regras de movimentação de estoque.</text:p>
      <text:p text:style-name="P93"/>
      <text:p text:style-name="P93"/>
      <text:p text:style-name="P93">Bora fechar esse backend com chave de ouro, Lucas! Com a tabela <text:span text:style-name="Source_20_Text">products</text:span> criada no Postgres, vamos construir o <text:span text:style-name="T3">Domínio do Produto (</text:span><text:span text:style-name="Source_20_Text"><text:span text:style-name="T3">domain/product</text:span></text:span><text:span text:style-name="T3">)</text:span> no Go.</text:p>
      <text:p text:style-name="P99">Nesta camada, vamos estruturar a entidade que gerencia as informações das medicações e aplicar a lógica de movimentação de estoque: dar entrada em novas unidades e, principalmente, validar se há saldo suficiente antes de efetuar uma baixa (venda/dispensação).</text:p>
      <text:h text:style-name="P105" text:outline-level="3">🛠️ Passo Prático: Criando o Domínio de Produtos</text:h>
      <text:p text:style-name="P99">Execute o comando abaixo no terminal para criar a pasta do domínio e estruturar o arquivo contendo a <text:span text:style-name="T3">Entidade</text:span> e a <text:span text:style-name="T3">Interface</text:span> do Repositório:</text:p>
      <text:p text:style-name="P93"/>
      <text:p text:style-name="P93">gemini-code-1782842751839.sh</text:p>
      <text:p text:style-name="P93"/>
      <text:h text:style-name="P98" text:outline-level="3">🧠 Análise do Código: Por que <text:span text:style-name="Source_20_Text">PriceCents</text:span> em vez de float?</text:h>
      <text:p text:style-name="P99">Você deve ter reparado que usamos <text:span text:style-name="Source_20_Text">price_cents INT</text:span> e <text:span text:style-name="Source_20_Text">PriceCents int</text:span> em vez de tipos de ponto flutuante como <text:span text:style-name="Source_20_Text">float64</text:span>.</text:p>
      <text:p text:style-name="P110"><text:span text:style-name="T3">Regra de ouro em sistemas financeiros/SaaS:</text:span> Nunca use floats para armazenar dinheiro. Computadores lidam mal com frações binárias de ponto flutuante, o que gera aquelas famosas dízimas estranhas (como <text:span text:style-name="Source_20_Text">99.99999994</text:span>). Guardar em centavos como um número inteiro limpo (<text:span text:style-name="Source_20_Text">int</text:span>) elimina qualquer chance de erro de arredondamento no seu banco de dados. Na hora de exibir no frontend, basta dividir por 100!</text:p>
      <text:p text:style-name="P99">Agora que nossa entidade está blindada com as regras de estoque, podemos avançar para o <text:span text:style-name="T3">Repositório de Infraestrutura</text:span> para escrever as queries no Postgres.</text:p>
      <text:p text:style-name="P93"/>
      <text:p text:style-name="P93"><text:soft-page-break/></text:p>
      <text:p text:style-name="P93">Perfeito, Lucas! Vamos criar a camada de <text:span text:style-name="T3">Infraestrutura</text:span> para o módulo de produtos, escrevendo o mapeamento SQL para salvar, buscar e atualizar as quantidades de estoque diretamente no PostgreSQL.</text:p>
      <text:p text:style-name="P99">Nesse repositório, além dos métodos tradicionais, adicionaremos o <text:span text:style-name="Source_20_Text">UpdateStock</text:span>, que será responsável por persistir a nova quantidade de frascos no banco de dados após uma venda ou entrada.</text:p>
      <text:h text:style-name="P105" text:outline-level="3">🛠️ Passo Prático: Criando o Repositório Postgres de Produtos</text:h>
      <text:p text:style-name="P99">Execute o comando abaixo no seu terminal para gerar o arquivo de persistência:</text:p>
      <text:p text:style-name="P93"/>
      <text:p text:style-name="P93">gemini-code-1782842842116.sh</text:p>
      <text:p text:style-name="P93"/>
      <text:h text:style-name="P98" text:outline-level="3">🧠 Foco no Multi-Tenancy</text:h>
      <text:p text:style-name="P99">Repare como todas as queries SQL, incluindo a de atualização (<text:span text:style-name="Source_20_Text">UPDATE products ... WHERE association_id = $3 AND id = $4</text:span>), exigem obrigatoriamente a checagem do <text:span text:style-name="Source_20_Text">association_id</text:span>.</text:p>
      <text:p text:style-name="P99">Isso previne uma das falhas de segurança mais graves em sistemas SaaS: o risco de um funcionário mal-intencionado ou um bug alterar o estoque ou o preço de produtos pertencentes a <text:span text:style-name="T3">outra</text:span> associação parceira.</text:p>
      <text:p text:style-name="P99">Com o banco de dados pronto, nosso próximo passo é construir os <text:span text:style-name="T3">Casos de Uso</text:span>. Desta vez, criaremos dois fluxos na aplicação: um para cadastrar o produto no catálogo e outro para realizar a dispensação (baixa de estoque).</text:p>
      <text:p text:style-name="P93"/>
      <text:p text:style-name="P93">Vamos agora construir a camada de <text:span text:style-name="T3">Aplicação</text:span> com os dois Casos de Uso fundamentais do estoque:</text:p>
      <text:list text:style-name="L18">
        <text:list-item>
          <text:p text:style-name="P111"><text:span text:style-name="Source_20_Text"><text:span text:style-name="T3">CreateProductUseCase</text:span></text:span><text:span text:style-name="T3">:</text:span> Para cadastrar os remédios (óleos, pomadas, etc.) no catálogo de cada associação.</text:p>
        </text:list-item>
        <text:list-item>
          <text:p text:style-name="P111"><text:span text:style-name="Source_20_Text"><text:span text:style-name="T3">DispenseProductUseCase</text:span></text:span><text:span text:style-name="T3">:</text:span> O coração da Semana 4! Ele vai buscar o produto, carregar as regras de negócio de estoque que escrevemos no domínio, subtrair a quantidade vendida e salvar o novo saldo no banco. Se o saldo for insuficiente, ele barra antes de tocar no banco de dados.</text:p>
        </text:list-item>
      </text:list>
      <text:h text:style-name="P105" text:outline-level="3">🛠️ Passo Prático: Criando os Casos de Uso do Estoque</text:h>
      <text:p text:style-name="P99">Execute o bloco abaixo no seu terminal para gerar os dois arquivos de fluxo:</text:p>
      <text:p text:style-name="P93"/>
      <text:p text:style-name="P93"/>
      <text:p text:style-name="P93">gemini-code-1782842923121.sh</text:p>
      <text:p text:style-name="P93"/>
      <text:h text:style-name="P98" text:outline-level="3">📂 O Próximo Passo: Interface HTTP (Gin)</text:h>
      <text:p text:style-name="P99">A lógica do controle de estoque e dispensação está 100% amarrada e protegida. Agora, precisamos criar os <text:span text:style-name="T3">Handlers</text:span> e as <text:span text:style-name="T3">Rotas</text:span> no Gin para expor os endpoints que o Next.js usará para criar produtos e realizar vendas.</text:p>
      <text:p text:style-name="P93"/>
      <text:p text:style-name="P93">Vamos concluir a <text:span text:style-name="T3">Semana 4</text:span> e fechar com chave de ouro o backend da nossa API!</text:p>
      <text:p text:style-name="P99">Vamos criar as rotas HTTP no Gin para o catálogo de produtos e para a dispensação (venda) do medicamento, além de amarrar tudo no nosso arquivo <text:span text:style-name="Source_20_Text">main.go</text:span>.</text:p>
      <text:h text:style-name="P105" text:outline-level="3">🛠️ Passo 1: Criando Handler e Rotas de Produtos e Estoque</text:h>
      <text:p text:style-name="P99">Execute o bloco abaixo no seu terminal para gerar a camada de entrega HTTP:</text:p>
      <text:p text:style-name="P93"/>
      <text:p text:style-name="P93">gemini-code-1782843007476.sh</text:p>
      <text:h text:style-name="P98" text:outline-level="3"><text:soft-page-break/>🪢 Passo 2: Atualizando a Fiação Geral no <text:span text:style-name="Source_20_Text">main.go</text:span></text:h>
      <text:p text:style-name="P99">Agora, vamos atualizar o ponto de entrada da API para plugar o nosso novo módulo de estoque. Execute no terminal:</text:p>
      <text:p text:style-name="P93"/>
      <text:p text:style-name="P93">gemini-code-1782843055053.sh</text:p>
      <text:p text:style-name="P93"/>
      <text:h text:style-name="P94" text:outline-level="2">🏎️ Os Testes Finais da Semana 4</text:h>
      <text:p text:style-name="P99">Inicie o servidor: <text:span text:style-name="Source_20_Text">go run cmd/api/main.go</text:span></text:p>
      <text:p text:style-name="P99">Abra outra aba no terminal e vamos rodar os cenários de teste usando o ID da sua associação (<text:span text:style-name="Source_20_Text">61a72d3e-d4f9-4b34-b37a-6b0c26ede728</text:span>).</text:p>
      <text:h text:style-name="P105" text:outline-level="3">📦 Teste 1: Cadastrar um Produto com estoque inicial</text:h>
      <text:p text:style-name="P99">Vamos cadastrar o frasco de óleo CBD com <text:span text:style-name="T3">10 unidades em estoque</text:span>, custando R$ 150,00 (representado em centavos: <text:span text:style-name="Source_20_Text">15000</text:span>):</text:p>
      <text:p text:style-name="P93"/>
      <text:p text:style-name="P93">gemini-code-1782843094471.sh</text:p>
      <text:p text:style-name="P93"><draw:frame draw:style-name="fr4" draw:name="Image4" text:anchor-type="char" svg:x="0.6402in" svg:y="0.0484in" svg:width="4.4772in" svg:height="2.9882in" draw:z-index="3"><draw:image xlink:href="Pictures/10000001000005520000038D79C39720.png" xlink:type="simple" xlink:show="embed" xlink:actuate="onLoad" draw:mime-type="image/png"/></draw:frame></text:p>
      <text:p text:style-name="P93"/>
      <text:p text:style-name="P93"/>
      <text:p text:style-name="P93"/>
      <text:p text:style-name="P93"/>
      <text:p text:style-name="P112"/>
      <text:p text:style-name="P112"/>
      <text:p text:style-name="P112"/>
      <text:p text:style-name="P112"/>
      <text:p text:style-name="P112"/>
      <text:p text:style-name="P112"/>
      <text:p text:style-name="P112"/>
      <text:p text:style-name="P112"/>
      <text:p text:style-name="P112"/>
      <text:p text:style-name="P112"><text:span text:style-name="T3">Copie o </text:span><text:span text:style-name="Source_20_Text"><text:span text:style-name="T3">"id"</text:span></text:span><text:span text:style-name="T3"> do produto que o terminal vai te retornar.</text:span></text:p>
      <text:p text:style-name="P113"/>
      <text:h text:style-name="P114" text:outline-level="3">🛒 Teste 2: Realizar Dispensação VÁLIDA (Baixa de Estoque)</text:h>
      <text:p text:style-name="P115">Vamos simular a retirada de 2 frascos (Substitua o <text:span text:style-name="Source_20_Text">COLE_O_ID_DO_PRODUTO_AQUI</text:span> pelo UUID copiado):</text:p>
      <text:p text:style-name="P113"/>
      <text:p text:style-name="P113">gemini-code-1782843231366.sh</text:p>
      <text:p text:style-name="P113"><draw:frame draw:style-name="fr1" draw:name="Image5" text:anchor-type="char" svg:width="4.3744in" svg:height="2.9193in" draw:z-index="4"><draw:image xlink:href="Pictures/10000001000005520000038D4DDC218F.png" xlink:type="simple" xlink:show="embed" xlink:actuate="onLoad" draw:mime-type="image/png"/></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dar HTTP 200 e mostrar que o produto agora tem </text:span><text:span text:style-name="Source_20_Text"><text:span text:style-name="T5">"quantity": 8</text:span></text:span><text:span text:style-name="T5">!</text:span></text:p>
      <text:p text:style-name="P116"/>
      <text:p text:style-name="P116"/>
      <text:h text:style-name="P114" text:outline-level="3">❌ Teste 3: Tentar retirar mais do que tem no estoque (Erro!)</text:h>
      <text:p text:style-name="P115">Tente fazer uma dispensação pedindo 20 frascos do mesmo produto:</text:p>
      <text:p text:style-name="P113"/>
      <text:p text:style-name="P113">gemini-code-1782843596566.sh</text:p>
      <text:p text:style-name="P113"/>
      <text:p text:style-name="P113"><draw:frame draw:style-name="fr4" draw:name="Image6" text:anchor-type="char" svg:x="0.8799in" svg:y="-0.0902in" svg:width="4.2173in" svg:height="2.8146in" draw:z-index="5"><draw:image xlink:href="Pictures/10000001000005520000038D741A931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5">O sistema deve interceptar e devolver:</text:span> <text:span text:style-name="Source_20_Text">{"error":"saldo insuficiente em estoque para realizar a dispensação"}</text:span>.</text:p>
      <text:p text:style-name="P113"/>
      <text:p text:style-name="P113"/>
      <text:p text:style-name="P113"/>
      <text:p text:style-name="P113"><text:soft-page-break/></text:p>
      <text:p text:style-name="P113"/>
      <text:p text:style-name="P113">🏆 BACKEND CONCLUÍDO COM SUCESSO! 🏆</text:p>
      <text:p text:style-name="P113"/>
      <text:p text:style-name="P113">============================================================</text:p>
      <text:p text:style-name="P113"><text:s/>🔥 PARABÉNS, LUCAS! FIM DO BACKEND EM GO! 🔥</text:p>
      <text:p text:style-name="P113">============================================================</text:p>
      <text:p text:style-name="P113"><text:s/>✓ Semana 1: Estrutura, Associações e Usuários [OK]</text:p>
      <text:p text:style-name="P113"><text:s/>✓ Semana 2: Gestão de Pacientes Multi-Tenant [OK]</text:p>
      <text:p text:style-name="P113"><text:s/>✓ Semana 3: Controle de Prescrições e Validades [OK]</text:p>
      <text:p text:style-name="P113"><text:s/>✓ Semana 4: Catálogo de Produtos, Estoque e Vendas [OK]</text:p>
      <text:p text:style-name="P113">============================================================</text:p>
      <text:p text:style-name="P113"/>
      <text:p text:style-name="P113">Olhando para a imagem <text:span text:style-name="Source_20_Text">image_8010dd.png</text:span>, o teste rodou de forma impecável:</text:p>
      <text:list text:style-name="L19">
        <text:list-item>
          <text:p text:style-name="P117">Cadastro do Produto: Criou o Óleo CBD com o ID <text:span text:style-name="Source_20_Text">28ec987f-c1ec-4071-add8-73dd5f2c78aa</text:span> e estoque inicial de 10 unidades (<text:span text:style-name="Source_20_Text">201 Created</text:span>).</text:p>
        </text:list-item>
        <text:list-item>
          <text:p text:style-name="P117">Dispensação Válida: Você pediu 2 unidades, o sistema aceitou (<text:span text:style-name="Source_20_Text">200 OK</text:span>) e o saldo caiu exatamente para <text:span text:style-name="Source_20_Text">8</text:span>.</text:p>
        </text:list-item>
        <text:list-item>
          <text:p text:style-name="P117">Bloqueio de Segurança: Você tentou forçar a retirada de 20 unidades e o domínio barrou retornando o erro de negócio <text:span text:style-name="Source_20_Text">"saldo insuficiente em estoque para realizar a dispensação"</text:span> com <text:span text:style-name="Source_20_Text">400 Bad Request</text:span>.</text:p>
        </text:list-item>
      </text:list>
      <text:p text:style-name="P115">Os logs do Gin no fundo do terminal mostram a sequência exata acontecendo de forma limpa e rápida. O backend do seu SaaS Multi-Tenant está pronto, blindado e robusto.</text:p>
      <text:h text:style-name="P118" text:outline-level="2">🚀 Próxima Parada: Frontend com Next.js</text:h>
      <text:p text:style-name="P115">Com o motor de pé, vamos começar a dar vida visual ao Cannacare V2. Na próxima etapa, mudaremos o chip para o ecossistema do JavaScript/TypeScript e prepararemos o ambiente visual.</text:p>
      <text:p text:style-name="P113"/>
      <text:p text:style-name="P113"/>
      <text:p text:style-name="P113"/>
      <text:p text:style-name="P119">Front:</text:p>
      <text:p text:style-name="P119"/>
      <text:p text:style-name="P119"/>
      <text:p text:style-name="P119">Vamos começar do jeito certo, estruturando o projeto Next.js com TypeScript e Tailwind CSS de forma organizada para conversar perfeitamente com o backend que acabamos de blindar.</text:p>
      <text:p text:style-name="P120">Como estamos lidando com uma arquitetura robusta no backend, manteremos o mesmo nível de capricho e organização no frontend.</text:p>
      <text:h text:style-name="P121" text:outline-level="3">📂 Estrutura de Pastas Planejada</text:h>
      <text:p text:style-name="P120">Adotaremos a estrutura padrão do Next.js App Router, separando a lógica visual das requisições de API:</text:p>
      <text:p text:style-name="P119"/>
      <text:p text:style-name="P113">Node.js e o npm não estão instalados globalmente no seu sistema ainda. Como o <text:span text:style-name="Source_20_Text">npx</text:span> vem junto com o ecossistema do Node, precisamos dar essa rápida configurada na sua máquina para o comando funcionar.</text:p>
      <text:p text:style-name="P115">Como você está no Ubuntu/Debian (pelo formato do seu terminal), vamos instalar o Node.js da forma correta e mais atualizada.</text:p>
      <text:h text:style-name="P122" text:outline-level="3"><text:soft-page-break/>🛠️ Passo 1: Instalar o Node.js e o NPM</text:h>
      <text:p text:style-name="P115">Rode os comandos abaixo no seu terminal para atualizar a lista de pacotes e instalar o Node.js:</text:p>
      <text:p text:style-name="P113">sudo apt update</text:p>
      <text:p text:style-name="P113">sudo apt install -y nodejs npm</text:p>
      <text:p text:style-name="P113"/>
      <text:h text:style-name="P114" text:outline-level="3">🔍 Passo 2: Validar a Instalação</text:h>
      <text:p text:style-name="P115">Assim que o terminal terminar de processar, garanta que deu tudo certo rodando:</text:p>
      <text:p text:style-name="P113"/>
      <text:p text:style-name="P113">node -v</text:p>
      <text:p text:style-name="P113">npm -v</text:p>
      <text:p text:style-name="P113"/>
      <text:h text:style-name="P114" text:outline-level="3">🚀 Passo 3: Criar o Projeto Next.js</text:h>
      <text:p text:style-name="P115">Agora sim, com o ambiente configurado, rode novamente o comando do Next.js usando o ponto (<text:span text:style-name="Source_20_Text">.</text:span>) para instalar direto na sua pasta atual:</text:p>
      <text:p text:style-name="P115"/>
      <text:p text:style-name="P123">Atenção!! O nome da pasta deve estar em minúscula</text:p>
      <text:p text:style-name="P123"/>
      <text:p text:style-name="P113">npx create-next-app@latest . --typescript --tailwind --eslint --app --src-dir --import-alias "@/*"</text:p>
      <text:p text:style-name="P113"/>
      <text:p text:style-name="P113">O validador de nome passou com sucesso (sinal verde para as letras minúsculas) e ele só travou por segurança porque encontrou o arquivo <text:span text:style-name="Source_20_Text">README.md</text:span> que o GitHub cria automaticamente quando você inicializa o repositório por lá.</text:p>
      <text:p text:style-name="P115">Como o Next.js vai criar o seu próprio <text:span text:style-name="Source_20_Text">README.md</text:span> novinho em folha, nós podemos remover esse arquivo existente sem medo.</text:p>
      <text:p text:style-name="P115">Execute este comando para deletar o <text:span text:style-name="Source_20_Text">README.md</text:span> atual e, em seguida, rodar o instalador do Next.js:</text:p>
      <text:p text:style-name="P113"/>
      <text:p text:style-name="P113">rm README.md &amp;&amp; npx create-next-app@latest . --typescript --tailwind --eslint --app --src-dir --import-alias "@/*"</text:p>
      <text:p text:style-name="P113"/>
      <text:p text:style-name="P113">O Next.js já instalou tudo o que precisávamos na raiz do seu projeto. Agora sim, com a carcaça limpa e configurada, vamos ligar o painel visual e dar os nossos primeiros passos.</text:p>
      <text:h text:style-name="P122" text:outline-level="3">🚀 Passo 1: Ligando o Servidor de Desenvolvimento</text:h>
      <text:p text:style-name="P115">Para rodar o servidor local do Next.js e ver a página padrão de boas-vindas do framework, execute o comando abaixo no seu terminal:</text:p>
      <text:p text:style-name="P113"/>
      <text:p text:style-name="P113">O terminal vai te indicar que o servidor está de pé rodando em <text:span text:style-name="Source_20_Text">http://localhost:3000</text:span>. Se você abrir essa URL no seu navegador, já conseguirá ver a aplicação rodando!</text:p>
      <text:h text:style-name="P122" text:outline-level="3">🎨 Passo 2: Limpando a Casa e Conectando com o Backend</text:h>
      <text:p text:style-name="P115">O Next.js vem com um layout padrão cheio de estilos e imagens da própria Vercel. Vamos fazer uma limpeza rápida no arquivo de estilos globais para podermos criar nossas próprias telas do zero, com o Tailwind CSS limpo.</text:p>
      <text:p text:style-name="P115">Abra o arquivo <text:span text:style-name="Source_20_Text">src/app/globals.css</text:span> no seu VS Code, apague tudo o que estiver lá dentro e substitua por apenas estas três linhas essenciais do Tailwind:</text:p>
      <text:h text:style-name="P114" text:outline-level="3"><text:soft-page-break/>🌐 Passo 3: Configurando a Conexão com o Go (<text:span text:style-name="Source_20_Text">.env.local</text:span>)</text:h>
      <text:p text:style-name="P115">Para que o Next.js saiba exatamente onde o nosso backend em Go está rodando (na porta <text:span text:style-name="Source_20_Text">8080</text:span>), precisamos criar um arquivo de variáveis de ambiente na raiz do projeto do frontend.</text:p>
      <text:p text:style-name="P115">Abra outra aba do seu terminal (deixando o <text:span text:style-name="Source_20_Text">npm run dev</text:span> rodando na primeira) e crie o arquivo executando:</text:p>
      <text:p text:style-name="P124">💡 Por que o prefixo <text:span text:style-name="Source_20_Text">NEXT_PUBLIC_</text:span>? No Next.js, qualquer variável de ambiente que precise ficar visível no código do navegador (client-side) precisa obrigatoriamente começar com esse prefixo, garantindo que o framework a exponha de forma segura.</text:p>
      <text:p text:style-name="P115">Tudo configurado! Quer dar uma olhada em como estruturar a primeira tela do sistema — a nossa Página de Login para bater na rota de usuários do Go — ou prefere entender como criar o serviço de chamadas de API antes?</text:p>
      <text:p text:style-name="P113"/>
      <text:p text:style-name="P113"/>
      <text:p text:style-name="P113">O Next.js subiu com o Turbopack voando em apenas 623ms. Se você acessar <text:span text:style-name="Source_20_Text">http://localhost:3000</text:span> no seu navegador agora, já verá o projeto respondendo.</text:p>
      <text:p text:style-name="P115">Como estamos com o servidor de pé e a "casa limpa" (com o <text:span text:style-name="Source_20_Text">.env.local</text:span> e o <text:span text:style-name="Source_20_Text">globals.css</text:span> configurados), vamos dar o pontapé inicial construindo o Serviço de API. É essa camada que vai centralizar todas as funções do <text:span text:style-name="Source_20_Text">fetch</text:span> para conversar com o nosso backend em Go sem precisarmos repetir a URL base em todo arquivo.</text:p>
      <text:h text:style-name="P122" text:outline-level="3">🛠️ Passo Prático: Criando o Serviço Base da API</text:h>
      <text:p text:style-name="P115">Abra outra aba no seu terminal (dentro da pasta do frontend) e execute o bloco abaixo para criar a pasta de serviços e estruturar a nossa instância base de conexão:</text:p>
      <text:p text:style-name="P113"/>
      <text:p text:style-name="P113">gemini-code-1782847340494.sh</text:p>
      <text:h text:style-name="P114" text:outline-level="3">🧠 O que esse arquivo faz?</text:h>
      <text:p text:style-name="P115">Ele encapsula o <text:span text:style-name="Source_20_Text">fetch</text:span> nativo do navegador. Quando formos criar as chamadas para cadastrar usuários, pacientes ou dar baixa no estoque, só precisaremos passar a rota relativa (como <text:span text:style-name="Source_20_Text">/products/dispense</text:span>) e os dados em formato de objeto JavaScript puro. O <text:span text:style-name="Source_20_Text">apiFetch</text:span> cuida de transformar em string JSON, setar os headers e tratar os erros que o Go responder de forma automática.</text:p>
      <text:p text:style-name="P115">Agora que nossa fundação de rede está pronta, vamos criar o primeiro fluxo visual!</text:p>
      <text:p text:style-name="P113">Com a nossa base de comunicação via <text:span text:style-name="Source_20_Text">fetch</text:span> pronta no <text:span text:style-name="Source_20_Text">src/services/api.ts</text:span>, vamos direto para o design e a lógica da nossa Tela de Login (<text:span text:style-name="Source_20_Text">src/app/page.tsx</text:span>).</text:p>
      <text:p text:style-name="P115">Como o arquivo <text:span text:style-name="Source_20_Text">page.tsx</text:span> na raiz da pasta <text:span text:style-name="Source_20_Text">src/app</text:span> representa a rota inicial (<text:span text:style-name="Source_20_Text">/</text:span>) do nosso sistema, vamos limpá-lo e construir um formulário de login responsivo e moderno usando o Tailwind CSS.</text:p>
      <text:p text:style-name="P115">Este formulário capturará o e-mail e a senha digitados, chamará nossa API em Go e, caso o login falhe, exibirá o erro na tela com um alerta visual amigável.</text:p>
      <text:h text:style-name="P122" text:outline-level="3">🛠️ Passo Prático: Criando a Tela de Login</text:h>
      <text:p text:style-name="P115">Execute o comando abaixo no seu terminal para sobrescrever o arquivo de entrada visual da aplicação:</text:p>
      <text:p text:style-name="P113"/>
      <text:p text:style-name="P113">gemini-code-1782847454411.sh</text:p>
      <text:p text:style-name="P113"/>
      <text:p text:style-name="P113"/>
      <text:h text:style-name="P114" text:outline-level="3">🧠 Entendendo os conceitos do Next.js aplicados</text:h>
      <text:list text:style-name="L20">
        <text:list-item>
          <text:p text:style-name="P125"><text:span text:style-name="Source_20_Text">'use client';</text:span> no topo do arquivo: Indica que esta página roda interatividade no navegador (como capturar cliques e estados com <text:span text:style-name="Source_20_Text">useState</text:span>).</text:p>
        </text:list-item>
        <text:list-item>
          <text:p text:style-name="P125"><text:soft-page-break/><text:span text:style-name="Source_20_Text">bg-slate-900</text:span>, <text:span text:style-name="Source_20_Text">bg-emerald-500</text:span>: Classes utilitárias do Tailwind CSS. Elas cuidam do modo escuro por padrão, deixando o painel com visual profissional (fundo escuro e detalhes em verde esmeralda).</text:p>
        </text:list-item>
      </text:list>
      <text:h text:style-name="P122" text:outline-level="3">🧪 Como testar a comunicação agora?</text:h>
      <text:p text:style-name="P126">Primeiro!!</text:p>
      <text:p text:style-name="P127">Rode o comando :</text:p>
      <text:p text:style-name="P127">npm run dev</text:p>
      <text:p text:style-name="P127">e depois rode o backend</text:p>
      <text:p text:style-name="P127">go run cmd/api/main.go</text:p>
      <text:p text:style-name="P127"/>
      <text:list text:style-name="L21">
        <text:list-item>
          <text:p text:style-name="P128">Certifique-se de que o seu backend em Go está ligado e rodando na porta <text:span text:style-name="Source_20_Text">:8080</text:span>.</text:p>
        </text:list-item>
        <text:list-item>
          <text:p text:style-name="P128">Vá até o seu navegador e abra <text:span text:style-name="Source_20_Text">http://localhost:3000</text:span>. Você verá a tela de login novinha em folha.</text:p>
        </text:list-item>
        <text:list-item>
          <text:p text:style-name="P128">Digite um e-mail novo (ex: <text:span text:style-name="Source_20_Text">teste_frontend@email.com</text:span>) e qualquer senha, e clique em Entrar no Sistema.</text:p>
        </text:list-item>
      </text:list>
      <text:p text:style-name="P115">Como o nosso formulário está configurado para disparar um <text:span text:style-name="Source_20_Text">POST</text:span> real na rota <text:span text:style-name="Source_20_Text">/users</text:span>, se a integração estiver certa, o Go vai processar no Postgres e o Next.js vai exibir na tela a mensagem verde de sucesso com o ID real gerado pelo banco!</text:p>
      <text:p text:style-name="P113"/>
      <text:p text:style-name="P113"/>
      <text:p text:style-name="P127"/>
      <text:p text:style-name="P127"/>
      <text:p text:style-name="P127"><draw:frame draw:style-name="fr1" draw:name="Image7" text:anchor-type="char" svg:width="4.3693in" svg:height="2.4508in" draw:z-index="6"><draw:image xlink:href="Pictures/10000001000007500000041A0D9DC344.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Com o visual do Tailwind batendo certinho e a tela de login estilizada, o próximo passo natural é criar o nosso primeiro grande painel: o Dashboard Principal.</text:p>
      <text:p text:style-name="P129">No ecossistema do Next.js App Router, nós criamos novas rotas criando novas pastas dentro de <text:span text:style-name="Source_20_Text">src/app</text:span>. Vamos criar a rota <text:span text:style-name="Source_20_Text">/dashboard</text:span>, e dentro dela vamos estruturar uma interface limpa com um menu lateral (Sidebar) e uma área central para exibir os dados e navegar entre Pacientes, Prescrições e o nosso recém-criado Estoque de Produtos.</text:p>
      <text:h text:style-name="P130" text:outline-level="3">🛠️ Passo Prático: Criando a Rota do Dashboard</text:h>
      <text:p text:style-name="P129">Abra uma aba do seu terminal (na pasta do frontend) e execute o bloco abaixo para gerar a nova pasta e a página inicial do Dashboard:</text:p>
      <text:p text:style-name="P127"><text:soft-page-break/>gemini-code-1782849126881.sh</text:p>
      <text:p text:style-name="P127"/>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6:52:20.198394079</dc:date>
    <meta:editing-duration>PT6H42M48S</meta:editing-duration>
    <meta:editing-cycles>101</meta:editing-cycles>
    <meta:document-statistic meta:table-count="0" meta:image-count="7" meta:object-count="0" meta:page-count="28" meta:paragraph-count="528" meta:word-count="8351" meta:character-count="51352" meta:non-whitespace-character-count="43375"/>
  </office:meta>
</office:document-meta>
</file>